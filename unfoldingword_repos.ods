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False</text:p>
          </table:table-cell>
          <table:table-cell office:value-type="string">
            <text:p>3896</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False</text:p>
          </table:table-cell>
          <table:table-cell office:value-type="string">
            <text:p>2345</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False</text:p>
          </table:table-cell>
          <table:table-cell office:value-type="string">
            <text:p>225</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False</text:p>
          </table:table-cell>
          <table:table-cell office:value-type="string">
            <text:p>186</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17:48:59Z</text:p>
          </table:table-cell>
          <table:table-cell office:value-type="string">
            <text:p>2026-06-13T17:48:58Z</text:p>
          </table:table-cell>
          <table:table-cell office:value-type="string">
            <text:p/>
          </table:table-cell>
          <table:table-cell office:value-type="string">
            <text:p>7</text:p>
          </table:table-cell>
          <table:table-cell office:value-type="string">
            <text:p>1</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3T17:49:02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58:52Z</text:p>
          </table:table-cell>
          <table:table-cell office:value-type="string">
            <text:p>2026-06-10T12:58:51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0T12:59:00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47:17Z</text:p>
          </table:table-cell>
          <table:table-cell office:value-type="string">
            <text:p>2026-06-10T12:47:16Z</text:p>
          </table:table-cell>
          <table:table-cell office:value-type="string">
            <text:p/>
          </table:table-cell>
          <table:table-cell office:value-type="string">
            <text:p>0</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0T12:47:2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uw-content-validation</text:p>
          </table:table-cell>
          <table:table-cell office:value-type="string">
            <text:p>False</text:p>
          </table:table-cell>
          <table:table-cell office:value-type="string">
            <text:p>2052</text:p>
          </table:table-cell>
          <table:table-cell office:value-type="string">
            <text:p>2026-06-07T09:30:48.45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20:04:13Z</text:p>
          </table:table-cell>
          <table:table-cell office:value-type="string">
            <text:p>2026-06-05T20:04:11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05T20:04:1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53:21Z</text:p>
          </table:table-cell>
          <table:table-cell office:value-type="string">
            <text:p>2026-06-05T07:53:19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False</text:p>
          </table:table-cell>
          <table:table-cell office:value-type="string">
            <text:p>5434</text:p>
          </table:table-cell>
          <table:table-cell office:value-type="string">
            <text:p>2026-06-05T07:54:21.337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05T07:53:25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47:31Z</text:p>
          </table:table-cell>
          <table:table-cell office:value-type="string">
            <text:p>2026-06-05T07:47:2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05T07:47:35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3T18:25:41Z</text:p>
          </table:table-cell>
          <table:table-cell office:value-type="string">
            <text:p>2026-06-03T18:25:34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03T18:25:59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09:29:35Z</text:p>
          </table:table-cell>
          <table:table-cell office:value-type="string">
            <text:p>2026-06-03T09:2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03T09:29:39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02T19:21:1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02T19:21:17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False</text:p>
          </table:table-cell>
          <table:table-cell office:value-type="string">
            <text:p>24652</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False</text:p>
          </table:table-cell>
          <table:table-cell office:value-type="string">
            <text:p>1201</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8:26:02Z</text:p>
          </table:table-cell>
          <table:table-cell office:value-type="string">
            <text:p>2026-05-28T15:55:55Z</text:p>
          </table:table-cell>
          <table:table-cell office:value-type="string">
            <text:p/>
          </table:table-cell>
          <table:table-cell office:value-type="string">
            <text:p>89</text:p>
          </table:table-cell>
          <table:table-cell office:value-type="string">
            <text:p>9</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5-28T15:56:00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False</text:p>
          </table:table-cell>
          <table:table-cell office:value-type="string">
            <text:p>97848</text:p>
          </table:table-cell>
          <table:table-cell office:value-type="string">
            <text:p>2021-08-25T21:55:46.406Z</text:p>
          </table:table-cell>
          <table:table-cell office: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False</text:p>
          </table:table-cell>
          <table:table-cell office:value-type="string">
            <text:p>16507</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False</text:p>
          </table:table-cell>
          <table:table-cell office:value-type="string">
            <text:p>4730</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False</text:p>
          </table:table-cell>
          <table:table-cell office:value-type="string">
            <text:p>44656</text:p>
          </table:table-cell>
          <table:table-cell office:value-type="string">
            <text:p>2026-05-24T21:22:13.663Z</text:p>
          </table:table-cell>
          <table:table-cell office: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5-16T19:38:34Z</text:p>
          </table:table-cell>
          <table:table-cell office:value-type="string">
            <text:p>2026-05-16T19:38: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5-16T19:38:3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False</text:p>
          </table:table-cell>
          <table:table-cell office:value-type="string">
            <text:p>17468</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5-08T16:01:37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7T17:00: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5-07T17:00:32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6T05:40:18Z</text:p>
          </table:table-cell>
          <table:table-cell office:value-type="string">
            <text:p>2026-05-05T16:33:43Z</text:p>
          </table:table-cell>
          <table:table-cell office:value-type="string">
            <text:p/>
          </table:table-cell>
          <table:table-cell office:value-type="string">
            <text:p>9</text:p>
          </table:table-cell>
          <table:table-cell office:value-type="string">
            <text:p>1</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8</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14T01:06:51Z</text:p>
          </table:table-cell>
          <table:table-cell office:value-type="string">
            <text:p>2026-04-19T02:36:29Z</text:p>
          </table:table-cell>
          <table:table-cell office:value-type="string">
            <text:p>2026-06-03T23:53:30Z</text:p>
          </table:table-cell>
          <table:table-cell office:value-type="string">
            <text:p>48</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4</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False</text:p>
          </table:table-cell>
          <table:table-cell office:value-type="string">
            <text:p>9756</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False</text:p>
          </table:table-cell>
          <table:table-cell office:value-type="string">
            <text:p>14995</text:p>
          </table:table-cell>
          <table:table-cell office:value-type="string">
            <text:p>2026-03-27T22:01:47.002Z</text:p>
          </table:table-cell>
          <table:table-cell office:value-type="string">
            <text:p>next-js-template, gateway-edit, admin-app, create-app, gateway-admin, single-scripture-rcl, bsa,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False</text:p>
          </table:table-cell>
          <table:table-cell office:value-type="string">
            <text:p>3614</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False</text:p>
          </table:table-cell>
          <table:table-cell office:value-type="string">
            <text:p>15217</text:p>
          </table:table-cell>
          <table:table-cell office:value-type="string">
            <text:p>2026-03-19T13:24:25.124Z</text:p>
          </table:table-cell>
          <table:table-cell office: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False</text:p>
          </table:table-cell>
          <table:table-cell office:value-type="string">
            <text:p>3135</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0976</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False</text:p>
          </table:table-cell>
          <table:table-cell office:value-type="string">
            <text:p>6398</text:p>
          </table:table-cell>
          <table:table-cell office:value-type="string">
            <text:p>2024-10-16T17:43:33.516Z</text:p>
          </table:table-cell>
          <table:table-cell office:value-type="string">
            <text:p>checking-extension, pdf-generator, translationCore, uw-quote-helpers,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False</text:p>
          </table:table-cell>
          <table:table-cell office:value-type="string">
            <text:p>7747</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False</text:p>
          </table:table-cell>
          <table:table-cell office:value-type="string">
            <text:p>5898</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translationCore, wordAlignment, word-aligner-rcl, uw-wordmapbooster</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False</text:p>
          </table:table-cell>
          <table:table-cell office:value-type="string">
            <text:p>18050</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False</text:p>
          </table:table-cell>
          <table:table-cell office:value-type="string">
            <text:p>29495</text:p>
          </table:table-cell>
          <table:table-cell office:value-type="string">
            <text:p>2024-12-31T18:53:34.752Z</text:p>
          </table:table-cell>
          <table:table-cell office:value-type="string">
            <text:p>alignment-playground, next-js-template, gateway-edit, translationCore, wordAlignment, gateway-admin, tc-create-app, single-scripture-rcl, translation-helps-rcl, scripture-resources-rcl, bsa,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False</text:p>
          </table:table-cell>
          <table:table-cell office:value-type="string">
            <text:p>116</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False</text:p>
          </table:table-cell>
          <table:table-cell office:value-type="string">
            <text:p>5142</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False</text:p>
          </table:table-cell>
          <table:table-cell office:value-type="string">
            <text:p>2648</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False</text:p>
          </table:table-cell>
          <table:table-cell office:value-type="string">
            <text:p>16574</text:p>
          </table:table-cell>
          <table:table-cell office:value-type="string">
            <text:p>2023-12-07T19:15:35.590Z</text:p>
          </table:table-cell>
          <table:table-cell office: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False</text:p>
          </table:table-cell>
          <table:table-cell office:value-type="string">
            <text:p>4593</text:p>
          </table:table-cell>
          <table:table-cell office:value-type="string">
            <text:p>2022-02-02T14:06:17.344Z</text:p>
          </table:table-cell>
          <table:table-cell office:value-type="string">
            <text:p>checking-extension, gateway-admin, tc-create-app, word-aligner-rcl, tsv-groupdata-parser, checking-tool-rcl</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False</text:p>
          </table:table-cell>
          <table:table-cell office:value-type="string">
            <text:p>9613</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False</text:p>
          </table:table-cell>
          <table:table-cell office:value-type="string">
            <text:p>607</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True</text:p>
          </table:table-cell>
          <table:table-cell office:value-type="string">
            <text:p>1163</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False</text:p>
          </table:table-cell>
          <table:table-cell office:value-type="string">
            <text:p>179</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False</text:p>
          </table:table-cell>
          <table:table-cell office:value-type="string">
            <text:p>2783</text:p>
          </table:table-cell>
          <table:table-cell office:value-type="string">
            <text:p>2023-06-13T13:51:03.803Z</text:p>
          </table:table-cell>
          <table:table-cell office:value-type="string">
            <text:p>next-js-template, gateway-edit, admin-app, create-app, gateway-admin, bsa,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False</text:p>
          </table:table-cell>
          <table:table-cell office:value-type="string">
            <text:p>114</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enhanced-word-aligner-rcl, gitea-react-toolkit, single-scripture-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False</text:p>
          </table:table-cell>
          <table:table-cell office:value-type="string">
            <text:p>345</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translationCore, wordAlignment, string-punctuation-tokenizer, word-aligner-rcl, word-aligner-lib, uw-wordmapbooster, checking-tool-rcl, wordmap, wordmap-usfm</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7</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False</text:p>
          </table:table-cell>
          <table:table-cell office:value-type="string">
            <text:p>6726</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False</text:p>
          </table:table-cell>
          <table:table-cell office:value-type="string">
            <text:p>2608</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False</text:p>
          </table:table-cell>
          <table:table-cell office:value-type="string">
            <text:p>3107</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True</text:p>
          </table:table-cell>
          <table:table-cell office:value-type="string">
            <text:p>1504</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16-08-15T16:29:38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
          </table:table-cell>
          <table:table-cell office:value-type="string">
            <text:p>1852</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
          </table:table-cell>
          <table:table-cell office:value-type="string">
            <text:p>405</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
          </table:table-cell>
          <table:table-cell office:value-type="string">
            <text:p>129</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
          </table:table-cell>
          <table:table-cell office:value-type="string">
            <text:p>641</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
          </table:table-cell>
          <table:table-cell office:value-type="string">
            <text:p>335</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
          </table:table-cell>
          <table:table-cell office:value-type="string">
            <text:p>37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
          </table:table-cell>
          <table:table-cell office:value-type="string">
            <text:p>96</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
          </table:table-cell>
          <table:table-cell office:value-type="string">
            <text:p>607</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False</text:p>
          </table:table-cell>
          <table:table-cell office:value-type="string">
            <text:p>3896</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False</text:p>
          </table:table-cell>
          <table:table-cell office:value-type="string">
            <text:p>2345</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False</text:p>
          </table:table-cell>
          <table:table-cell office:value-type="string">
            <text:p>225</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False</text:p>
          </table:table-cell>
          <table:table-cell office:value-type="string">
            <text:p>186</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17:48:59Z</text:p>
          </table:table-cell>
          <table:table-cell office:value-type="string">
            <text:p>2026-06-13T17:48:58Z</text:p>
          </table:table-cell>
          <table:table-cell office:value-type="string">
            <text:p/>
          </table:table-cell>
          <table:table-cell office:value-type="string">
            <text:p>7</text:p>
          </table:table-cell>
          <table:table-cell office:value-type="string">
            <text:p>1</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3T17:49:02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58:52Z</text:p>
          </table:table-cell>
          <table:table-cell office:value-type="string">
            <text:p>2026-06-10T12:58:51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0T12:59:00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47:17Z</text:p>
          </table:table-cell>
          <table:table-cell office:value-type="string">
            <text:p>2026-06-10T12:47:16Z</text:p>
          </table:table-cell>
          <table:table-cell office:value-type="string">
            <text:p/>
          </table:table-cell>
          <table:table-cell office:value-type="string">
            <text:p>0</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0T12:47:2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uw-content-validation</text:p>
          </table:table-cell>
          <table:table-cell office:value-type="string">
            <text:p>False</text:p>
          </table:table-cell>
          <table:table-cell office:value-type="string">
            <text:p>2052</text:p>
          </table:table-cell>
          <table:table-cell office:value-type="string">
            <text:p>2026-06-07T09:30:48.45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20:04:13Z</text:p>
          </table:table-cell>
          <table:table-cell office:value-type="string">
            <text:p>2026-06-05T20:04:11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05T20:04:1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53:21Z</text:p>
          </table:table-cell>
          <table:table-cell office:value-type="string">
            <text:p>2026-06-05T07:53:19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False</text:p>
          </table:table-cell>
          <table:table-cell office:value-type="string">
            <text:p>5434</text:p>
          </table:table-cell>
          <table:table-cell office:value-type="string">
            <text:p>2026-06-05T07:54:21.337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05T07:53:25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47:31Z</text:p>
          </table:table-cell>
          <table:table-cell office:value-type="string">
            <text:p>2026-06-05T07:47:2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05T07:47:35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3T18:25:41Z</text:p>
          </table:table-cell>
          <table:table-cell office:value-type="string">
            <text:p>2026-06-03T18:25:34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03T18:25:59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False</text:p>
          </table:table-cell>
          <table:table-cell office:value-type="string">
            <text:p>24652</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False</text:p>
          </table:table-cell>
          <table:table-cell office:value-type="string">
            <text:p>1201</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8:26:02Z</text:p>
          </table:table-cell>
          <table:table-cell office:value-type="string">
            <text:p>2026-05-28T15:55:55Z</text:p>
          </table:table-cell>
          <table:table-cell office:value-type="string">
            <text:p/>
          </table:table-cell>
          <table:table-cell office:value-type="string">
            <text:p>89</text:p>
          </table:table-cell>
          <table:table-cell office:value-type="string">
            <text:p>9</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5-28T15:56:00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False</text:p>
          </table:table-cell>
          <table:table-cell office:value-type="string">
            <text:p>97848</text:p>
          </table:table-cell>
          <table:table-cell office:value-type="string">
            <text:p>2021-08-25T21:55:46.406Z</text:p>
          </table:table-cell>
          <table:table-cell office: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False</text:p>
          </table:table-cell>
          <table:table-cell office:value-type="string">
            <text:p>16507</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False</text:p>
          </table:table-cell>
          <table:table-cell office:value-type="string">
            <text:p>4730</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False</text:p>
          </table:table-cell>
          <table:table-cell office:value-type="string">
            <text:p>44656</text:p>
          </table:table-cell>
          <table:table-cell office:value-type="string">
            <text:p>2026-05-24T21:22:13.663Z</text:p>
          </table:table-cell>
          <table:table-cell office: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False</text:p>
          </table:table-cell>
          <table:table-cell office:value-type="string">
            <text:p>17468</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6T05:40:18Z</text:p>
          </table:table-cell>
          <table:table-cell office:value-type="string">
            <text:p>2026-05-05T16:33:43Z</text:p>
          </table:table-cell>
          <table:table-cell office:value-type="string">
            <text:p/>
          </table:table-cell>
          <table:table-cell office:value-type="string">
            <text:p>9</text:p>
          </table:table-cell>
          <table:table-cell office:value-type="string">
            <text:p>1</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8</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False</text:p>
          </table:table-cell>
          <table:table-cell office:value-type="string">
            <text:p>9756</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False</text:p>
          </table:table-cell>
          <table:table-cell office:value-type="string">
            <text:p>14995</text:p>
          </table:table-cell>
          <table:table-cell office:value-type="string">
            <text:p>2026-03-27T22:01:47.002Z</text:p>
          </table:table-cell>
          <table:table-cell office:value-type="string">
            <text:p>next-js-template, gateway-edit, admin-app, create-app, gateway-admin, single-scripture-rcl, bsa,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False</text:p>
          </table:table-cell>
          <table:table-cell office:value-type="string">
            <text:p>3614</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False</text:p>
          </table:table-cell>
          <table:table-cell office:value-type="string">
            <text:p>15217</text:p>
          </table:table-cell>
          <table:table-cell office:value-type="string">
            <text:p>2026-03-19T13:24:25.124Z</text:p>
          </table:table-cell>
          <table:table-cell office: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False</text:p>
          </table:table-cell>
          <table:table-cell office:value-type="string">
            <text:p>3135</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False</text:p>
          </table:table-cell>
          <table:table-cell office:value-type="string">
            <text:p>6398</text:p>
          </table:table-cell>
          <table:table-cell office:value-type="string">
            <text:p>2024-10-16T17:43:33.516Z</text:p>
          </table:table-cell>
          <table:table-cell office:value-type="string">
            <text:p>checking-extension, pdf-generator, translationCore, uw-quote-helpers,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False</text:p>
          </table:table-cell>
          <table:table-cell office:value-type="string">
            <text:p>7747</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False</text:p>
          </table:table-cell>
          <table:table-cell office:value-type="string">
            <text:p>5898</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translationCore, wordAlignment, word-aligner-rcl, uw-wordmapbooster</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False</text:p>
          </table:table-cell>
          <table:table-cell office:value-type="string">
            <text:p>18050</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False</text:p>
          </table:table-cell>
          <table:table-cell office:value-type="string">
            <text:p>29495</text:p>
          </table:table-cell>
          <table:table-cell office:value-type="string">
            <text:p>2024-12-31T18:53:34.752Z</text:p>
          </table:table-cell>
          <table:table-cell office:value-type="string">
            <text:p>alignment-playground, next-js-template, gateway-edit, translationCore, wordAlignment, gateway-admin, tc-create-app, single-scripture-rcl, translation-helps-rcl, scripture-resources-rcl, bsa,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False</text:p>
          </table:table-cell>
          <table:table-cell office:value-type="string">
            <text:p>116</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False</text:p>
          </table:table-cell>
          <table:table-cell office:value-type="string">
            <text:p>5142</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False</text:p>
          </table:table-cell>
          <table:table-cell office:value-type="string">
            <text:p>2648</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False</text:p>
          </table:table-cell>
          <table:table-cell office:value-type="string">
            <text:p>16574</text:p>
          </table:table-cell>
          <table:table-cell office:value-type="string">
            <text:p>2023-12-07T19:15:35.590Z</text:p>
          </table:table-cell>
          <table:table-cell office: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False</text:p>
          </table:table-cell>
          <table:table-cell office:value-type="string">
            <text:p>4593</text:p>
          </table:table-cell>
          <table:table-cell office:value-type="string">
            <text:p>2022-02-02T14:06:17.344Z</text:p>
          </table:table-cell>
          <table:table-cell office:value-type="string">
            <text:p>checking-extension, gateway-admin, tc-create-app, word-aligner-rcl, tsv-groupdata-parser, checking-tool-rcl</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False</text:p>
          </table:table-cell>
          <table:table-cell office:value-type="string">
            <text:p>9613</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False</text:p>
          </table:table-cell>
          <table:table-cell office:value-type="string">
            <text:p>607</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True</text:p>
          </table:table-cell>
          <table:table-cell office:value-type="string">
            <text:p>1163</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False</text:p>
          </table:table-cell>
          <table:table-cell office:value-type="string">
            <text:p>179</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False</text:p>
          </table:table-cell>
          <table:table-cell office:value-type="string">
            <text:p>2783</text:p>
          </table:table-cell>
          <table:table-cell office:value-type="string">
            <text:p>2023-06-13T13:51:03.803Z</text:p>
          </table:table-cell>
          <table:table-cell office:value-type="string">
            <text:p>next-js-template, gateway-edit, admin-app, create-app, gateway-admin, bsa,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False</text:p>
          </table:table-cell>
          <table:table-cell office:value-type="string">
            <text:p>114</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enhanced-word-aligner-rcl, gitea-react-toolkit, single-scripture-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False</text:p>
          </table:table-cell>
          <table:table-cell office:value-type="string">
            <text:p>345</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translationCore, wordAlignment, string-punctuation-tokenizer, word-aligner-rcl, word-aligner-lib, uw-wordmapbooster, checking-tool-rcl, wordmap, wordmap-usfm</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False</text:p>
          </table:table-cell>
          <table:table-cell office:value-type="string">
            <text:p>6726</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False</text:p>
          </table:table-cell>
          <table:table-cell office:value-type="string">
            <text:p>2608</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False</text:p>
          </table:table-cell>
          <table:table-cell office:value-type="string">
            <text:p>3107</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True</text:p>
          </table:table-cell>
          <table:table-cell office:value-type="string">
            <text:p>1504</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
          </table:table-cell>
          <table:table-cell office:value-type="string">
            <text:p>1852</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
          </table:table-cell>
          <table:table-cell office:value-type="string">
            <text:p>405</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
          </table:table-cell>
          <table:table-cell office:value-type="string">
            <text:p>129</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
          </table:table-cell>
          <table:table-cell office:value-type="string">
            <text:p>641</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
          </table:table-cell>
          <table:table-cell office:value-type="string">
            <text:p>335</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
          </table:table-cell>
          <table:table-cell office:value-type="string">
            <text:p>37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
          </table:table-cell>
          <table:table-cell office:value-type="string">
            <text:p>96</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
          </table:table-cell>
          <table:table-cell office:value-type="string">
            <text:p>607</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
    </office:spreadsheet>
  </office:body>
</office:document-content>
</file>