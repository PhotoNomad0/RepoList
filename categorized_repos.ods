
<file path=META-INF/manifest.xml><?xml version="1.0" encoding="utf-8"?>
<manifest:manifest xmlns:office="urn:oasis:names:tc:opendocument:xmlns:office:1.0" xmlns:text="urn:oasis:names:tc:opendocument:xmlns:text:1.0" xmlns:meta="urn:oasis:names:tc:opendocument:xmlns:meta:1.0" xmlns:table="urn:oasis:names:tc:opendocument:xmlns:table:1.0" xmlns:manifest="urn:oasis:names:tc:opendocument:xmlns:manifest:1.0" xmlns:chart="urn:oasis:names:tc:opendocument:xmlns:chart:1.0" xmlns:draw="urn:oasis:names:tc:opendocument:xmlns:drawing:1.0" xmlns:presentation="urn:oasis:names:tc:opendocument:xmlns:presentation:1.0" xmlns:style="urn:oasis:names:tc:opendocument:xmlns:style: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manifest="urn:oasis:names:tc:opendocument:xmlns:manifest:1.0" office:version="1.2">
  <office:automatic-styles/>
  <office:body>
    <office:spreadsheet>
      <table:table table:name="Repositories">
        <table:table-row>
          <table:table-cell office:value-type="string" office:string-value="repo name">
            <text:p>repo name</text:p>
          </table:table-cell>
          <table:table-cell office:value-type="string" office:string-value="organization name">
            <text:p>organization name</text:p>
          </table:table-cell>
          <table:table-cell office:value-type="string" office:string-value="language">
            <text:p>language</text:p>
          </table:table-cell>
          <table:table-cell office:value-type="string" office:string-value="archived">
            <text:p>archived</text:p>
          </table:table-cell>
          <table:table-cell office:value-type="string" office:string-value="is fork">
            <text:p>is fork</text:p>
          </table:table-cell>
          <table:table-cell office:value-type="string" office:string-value="pushed at">
            <text:p>pushed at</text:p>
          </table:table-cell>
          <table:table-cell office:value-type="string" office:string-value="last commit date">
            <text:p>last commit date</text:p>
          </table:table-cell>
          <table:table-cell office:value-type="string" office:string-value="last release date">
            <text:p>last release date</text:p>
          </table:table-cell>
          <table:table-cell office:value-type="string" office:string-value="open issues count">
            <text:p>open issues count</text:p>
          </table:table-cell>
          <table:table-cell office:value-type="string" office:string-value="open prs count">
            <text:p>open prs count</text:p>
          </table:table-cell>
          <table:table-cell office:value-type="string" office:string-value="npmjs package name">
            <text:p>npmjs package name</text:p>
          </table:table-cell>
          <table:table-cell office:value-type="string" office:string-value="npm is deprecated">
            <text:p>npm is deprecated</text:p>
          </table:table-cell>
          <table:table-cell office:value-type="string" office:string-value="npmjs downloads last year">
            <text:p>npmjs downloads last year</text:p>
          </table:table-cell>
          <table:table-cell office:value-type="string" office:string-value="npmjs last published">
            <text:p>npmjs last published</text:p>
          </table:table-cell>
          <table:table-cell office:value-type="string" office:string-value="npmjs used by">
            <text:p>npmjs used by</text:p>
          </table:table-cell>
          <table:table-cell office:value-type="string" office:string-value="npmjs uses">
            <text:p>npmjs uses</text:p>
          </table:table-cell>
          <table:table-cell office:value-type="string" office:string-value="github dependents">
            <text:p>github dependents</text:p>
          </table:table-cell>
          <table:table-cell office:value-type="string" office:string-value="github contributors">
            <text:p>github contributors</text:p>
          </table:table-cell>
          <table:table-cell office:value-type="string" office:string-value="github release count">
            <text:p>github release count</text:p>
          </table:table-cell>
          <table:table-cell office:value-type="string" office:string-value="github downloads">
            <text:p>github downloads</text:p>
          </table:table-cell>
          <table:table-cell office:value-type="string" office:string-value="repo url">
            <text:p>repo url</text:p>
          </table:table-cell>
          <table:table-cell office:value-type="string" office:string-value="last edit date">
            <text:p>last edit date</text:p>
          </table:table-cell>
          <table:table-cell office:value-type="string" office:string-value="classification">
            <text:p>classification</text:p>
          </table:table-cell>
          <table:table-cell office:value-type="string" office:string-value="classification reason">
            <text:p>classification reason</text:p>
          </table:table-cell>
          <table:table-cell office:value-type="string" office:string-value="npmjs classification">
            <text:p>npmjs classification</text:p>
          </table:table-cell>
          <table:table-cell office:value-type="string" office:string-value="npmjs classification reason">
            <text:p>npmjs classification reason</text:p>
          </table:table-cell>
        </table:table-row>
        <table:table-row>
          <table:table-cell office:value-type="string" office:string-value="admin-app">
            <text:p>admin-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12T02:03:11Z">
            <text:p>2021-03-12T02:03:11Z</text:p>
          </table:table-cell>
          <table:table-cell office:value-type="string" office:string-value="2021-03-12T02:03:07Z">
            <text:p>2021-03-12T02:03: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dmin-app">
            <text:p>admi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translation-helps-rcl', 'resource-workspace-rcl']">
            <text:p>['gitea-react-toolkit', 'translation-helps-rcl', 'resource-workspace-rcl']</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admin-app">
            <text:p>https://github.com/unfoldingWord-box3/admin-app</text:p>
          </table:table-cell>
          <table:table-cell office:value-type="string" office:string-value="2021-03-12T02:03:10Z">
            <text:p>2021-03-12T02:03:10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nchor-alignment-poc">
            <text:p>anchor-alignment-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7-21T18:55:52Z">
            <text:p>2021-07-21T18:55:52Z</text:p>
          </table:table-cell>
          <table:table-cell office:value-type="string" office:string-value="2021-07-06T04:48:26Z">
            <text:p>2021-07-06T04:48:2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anchor-alignment-poc">
            <text:p>anchor-alignment-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ignment-editor-rcl', 'bible-reference-rcl', 'gitea-react-toolkit', 'string-punctuation-tokenizer']">
            <text:p>['alignment-editor-rcl', 'bible-reference-rcl', 'gitea-react-toolkit', 'string-punctuation-tokenizer']</text:p>
          </table:table-cell>
          <table:table-cell office:value-type="string" office:string-value="">
            <text:p/>
          </table:table-cell>
          <table:table-cell office:value-type="string" office:string-value="['ancientTexts-net', 'klappy', 'themikejr']">
            <text:p>['ancientTexts-net', 'klappy', 'themikejr']</text:p>
          </table:table-cell>
          <table:table-cell office:value-type="string" office:string-value="0">
            <text:p>0</text:p>
          </table:table-cell>
          <table:table-cell office:value-type="string" office:string-value="0">
            <text:p>0</text:p>
          </table:table-cell>
          <table:table-cell office:value-type="string" office:string-value="https://github.com/unfoldingWord-box3/anchor-alignment-poc">
            <text:p>https://github.com/unfoldingWord-box3/anchor-alignment-poc</text:p>
          </table:table-cell>
          <table:table-cell office:value-type="string" office:string-value="2021-08-09T17:50:41Z">
            <text:p>2021-08-09T17:50:41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udio-obs-navigator">
            <text:p>audio-obs-navigator</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8T13:58:29Z">
            <text:p>2024-03-08T13:58:29Z</text:p>
          </table:table-cell>
          <table:table-cell office:value-type="string" office:string-value="2024-03-08T12:08:48Z">
            <text:p>2024-03-08T12:08:48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audio-obs-navigator">
            <text:p>audio-obs-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intsoogi', 'blm', 'bspidel']">
            <text:p>['kintsoogi', 'blm', 'bspidel']</text:p>
          </table:table-cell>
          <table:table-cell office:value-type="string" office:string-value="0">
            <text:p>0</text:p>
          </table:table-cell>
          <table:table-cell office:value-type="string" office:string-value="0">
            <text:p>0</text:p>
          </table:table-cell>
          <table:table-cell office:value-type="string" office:string-value="https://github.com/unfoldingWord-box3/audio-obs-navigator">
            <text:p>https://github.com/unfoldingWord-box3/audio-obs-navigator</text:p>
          </table:table-cell>
          <table:table-cell office:value-type="string" office:string-value="2024-03-05T18:54:24Z">
            <text:p>2024-03-05T18:54:24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udio-quiz">
            <text:p>audio-quiz</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9T13:55:01Z">
            <text:p>2024-01-19T13:55:01Z</text:p>
          </table:table-cell>
          <table:table-cell office:value-type="string" office:string-value="2024-01-19T13:53:42Z">
            <text:p>2024-01-19T13:53: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audio-quiz">
            <text:p>https://github.com/unfoldingWord-box3/audio-quiz</text:p>
          </table:table-cell>
          <table:table-cell office:value-type="string" office:string-value="2024-02-28T16:05:13Z">
            <text:p>2024-02-28T16:05:13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utographa">
            <text:p>Autographa</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5:21Z">
            <text:p>2019-04-15T16:35:21Z</text:p>
          </table:table-cell>
          <table:table-cell office:value-type="string" office:string-value="2019-04-15T16:35:18Z">
            <text:p>2019-04-15T16:35:18Z</text:p>
          </table:table-cell>
          <table:table-cell office:value-type="string" office:string-value="">
            <text:p/>
          </table:table-cell>
          <table:table-cell office:value-type="string" office:string-value="12">
            <text:p>12</text:p>
          </table:table-cell>
          <table:table-cell office:value-type="string" office:string-value="0">
            <text:p>0</text:p>
          </table:table-cell>
          <table:table-cell office:value-type="string" office:string-value="Autographa">
            <text:p>Autograph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bajpai9', 'ayushnig', 'sandeeponrails', 'klappy', 'ImgBotApp', 'mannycolon']">
            <text:p>['nbajpai9', 'ayushnig', 'sandeeponrails', 'klappy', 'ImgBotApp', 'mannycolon']</text:p>
          </table:table-cell>
          <table:table-cell office:value-type="string" office:string-value="0">
            <text:p>0</text:p>
          </table:table-cell>
          <table:table-cell office:value-type="string" office:string-value="0">
            <text:p>0</text:p>
          </table:table-cell>
          <table:table-cell office:value-type="string" office:string-value="https://github.com/unfoldingWord-dev/Autographa">
            <text:p>https://github.com/unfoldingWord-dev/Autographa</text:p>
          </table:table-cell>
          <table:table-cell office:value-type="string" office:string-value="2019-10-22T20:35:02Z">
            <text:p>2019-10-22T20:35:0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aruch">
            <text:p>baruch</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20T22:23:08Z">
            <text:p>2026-04-20T22:23:08Z</text:p>
          </table:table-cell>
          <table:table-cell office:value-type="string" office:string-value="2026-04-20T22:22:00Z">
            <text:p>2026-04-20T22:22:00Z</text:p>
          </table:table-cell>
          <table:table-cell office:value-type="string" office:string-value="">
            <text:p/>
          </table:table-cell>
          <table:table-cell office:value-type="string" office:string-value="4">
            <text:p>4</text:p>
          </table:table-cell>
          <table:table-cell office:value-type="string" office:string-value="1">
            <text:p>1</text:p>
          </table:table-cell>
          <table:table-cell office:value-type="string" office:string-value="baruch">
            <text:p>baruc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ILindsley', 'claude']">
            <text:p>['IanLindsley', 'I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baruch">
            <text:p>https://github.com/unfoldingWord/baruch</text:p>
          </table:table-cell>
          <table:table-cell office:value-type="string" office:string-value="2026-04-20T22:22:05Z">
            <text:p>2026-04-20T22:22:05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eta-bibel-demo">
            <text:p>beta-bibel-demo</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08T14:50:24Z">
            <text:p>2024-08-08T14:50:24Z</text:p>
          </table:table-cell>
          <table:table-cell office:value-type="string" office:string-value="2024-07-26T16:13:53Z">
            <text:p>2024-07-26T16:13: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eta-bibel-wiki">
            <text:p>beta-bibel-wik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beta-bibel-demo">
            <text:p>https://github.com/unfoldingWord-box3/beta-bibel-demo</text:p>
          </table:table-cell>
          <table:table-cell office:value-type="string" office:string-value="2024-08-08T16:43:06Z">
            <text:p>2024-08-08T16:43:06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ible-preview-app">
            <text:p>bible-preview-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0-11T10:48:37Z">
            <text:p>2023-10-11T10:48:37Z</text:p>
          </table:table-cell>
          <table:table-cell office:value-type="string" office:string-value="2023-10-11T10:45:25Z">
            <text:p>2023-10-11T10:45: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ible-preview-app">
            <text:p>bible-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dcs-js']">
            <text:p>['bible-reference-rcl', 'dcs-js']</text:p>
          </table:table-cell>
          <table:table-cell office:value-type="string" office:string-value="">
            <text:p/>
          </table:table-cell>
          <table:table-cell office:value-type="string" office:string-value="['richmahn', 'mandolyte']">
            <text:p>['richmahn',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bible-preview-app">
            <text:p>https://github.com/unfoldingWord-box3/bible-preview-app</text:p>
          </table:table-cell>
          <table:table-cell office:value-type="string" office:string-value="2023-08-01T17:31:54Z">
            <text:p>2023-08-01T17:31:54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ook-package-viewer-poc">
            <text:p>book-package-viewer-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19T16:22:36Z">
            <text:p>2020-10-19T16:22:36Z</text:p>
          </table:table-cell>
          <table:table-cell office:value-type="string" office:string-value="2020-10-19T16:21:53Z">
            <text:p>2020-10-19T16:21: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ook-package-viewer-poc">
            <text:p>book-package-viewer-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scripture-resources-rcl']">
            <text:p>['gitea-react-toolkit', 'markdown-translatable', 'scripture-resources-rcl']</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book-package-viewer-poc">
            <text:p>https://github.com/unfoldingWord-box3/book-package-viewer-poc</text:p>
          </table:table-cell>
          <table:table-cell office:value-type="string" office:string-value="2020-10-21T20:48:29Z">
            <text:p>2020-10-21T20:48:29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p-assistant">
            <text:p>bp-assista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4T22:38:24Z">
            <text:p>2026-05-14T22:38:24Z</text:p>
          </table:table-cell>
          <table:table-cell office:value-type="string" office:string-value="2026-05-14T22:38:22Z">
            <text:p>2026-05-14T22:38:22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zulip-bot">
            <text:p>zulip-bo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benjamin-test', 'deferredreward', 'stephenwunrow', 'bp-assistant bot']">
            <text:p>['benjamin-test', 'deferredreward', 'stephenwunrow', 'bp-assistant bot']</text:p>
          </table:table-cell>
          <table:table-cell office:value-type="string" office:string-value="0">
            <text:p>0</text:p>
          </table:table-cell>
          <table:table-cell office:value-type="string" office:string-value="0">
            <text:p>0</text:p>
          </table:table-cell>
          <table:table-cell office:value-type="string" office:string-value="https://github.com/unfoldingWord/bp-assistant">
            <text:p>https://github.com/unfoldingWord/bp-assistant</text:p>
          </table:table-cell>
          <table:table-cell office:value-type="string" office:string-value="2026-05-14T22:38:27Z">
            <text:p>2026-05-14T22:38:27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p-assistant-skills">
            <text:p>bp-assistant-skill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4T22:38:31Z">
            <text:p>2026-05-14T22:38:31Z</text:p>
          </table:table-cell>
          <table:table-cell office:value-type="string" office:string-value="2026-05-14T22:38:30Z">
            <text:p>2026-05-14T22:38:30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cskillbp-prompt-over-code">
            <text:p>cskillbp-prompt-over-cod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BW Bot', 'deferredreward', 'benjamin-test', 'Nightly Issue Bot', 'stephenwunrow']">
            <text:p>['BW Bot', 'deferredreward', 'benjamin-test', 'Nightly Issue Bot', 'stephenwunrow']</text:p>
          </table:table-cell>
          <table:table-cell office:value-type="string" office:string-value="0">
            <text:p>0</text:p>
          </table:table-cell>
          <table:table-cell office:value-type="string" office:string-value="0">
            <text:p>0</text:p>
          </table:table-cell>
          <table:table-cell office:value-type="string" office:string-value="https://github.com/unfoldingWord/bp-assistant-skills">
            <text:p>https://github.com/unfoldingWord/bp-assistant-skills</text:p>
          </table:table-cell>
          <table:table-cell office:value-type="string" office:string-value="2026-05-14T22:38:35Z">
            <text:p>2026-05-14T22:38:35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hecking-app-theia/browser-app">
            <text:p>checking-app-theia/brows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rowser-app">
            <text:p>brows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hecking-app-theia/CheckingApp">
            <text:p>checking-app-theia/Checking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heckingApp">
            <text:p>Checking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hecking-app-theia/CheckingTool">
            <text:p>checking-app-theia/CheckingTool</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heckingTool">
            <text:p>Checking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hecking-app-theia/startChecking">
            <text:p>checking-app-theia/startChecking</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tartChecking">
            <text:p>startCheckin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heckingRubric_tool">
            <text:p>checkingRubric_tool</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28:23Z">
            <text:p>2019-04-15T16:28:23Z</text:p>
          </table:table-cell>
          <table:table-cell office:value-type="string" office:string-value="2019-04-15T16:28:18Z">
            <text:p>2019-04-15T16:28: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heckingRubricTool">
            <text:p>checkingRubric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ImgBotApp']">
            <text:p>['mannycolon', 'ihoegen', 'ImgBotApp']</text:p>
          </table:table-cell>
          <table:table-cell office:value-type="string" office:string-value="0">
            <text:p>0</text:p>
          </table:table-cell>
          <table:table-cell office:value-type="string" office:string-value="0">
            <text:p>0</text:p>
          </table:table-cell>
          <table:table-cell office:value-type="string" office:string-value="https://github.com/unfoldingWord-dev/checkingRubric_tool">
            <text:p>https://github.com/unfoldingWord-dev/checkingRubric_tool</text:p>
          </table:table-cell>
          <table:table-cell office:value-type="string" office:string-value="2019-10-22T19:40:10Z">
            <text:p>2019-10-22T19:40:10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odex-sb-handler">
            <text:p>codex-sb-handler</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12-03T13:53:27Z">
            <text:p>2024-12-03T13:53:27Z</text:p>
          </table:table-cell>
          <table:table-cell office:value-type="string" office:string-value="2024-12-03T13:53:27Z">
            <text:p>2024-12-03T13:53: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b-handler-sample">
            <text:p>sb-handler-s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codex-sb-handler">
            <text:p>https://github.com/unfoldingWord-box3/codex-sb-handler</text:p>
          </table:table-cell>
          <table:table-cell office:value-type="string" office:string-value="2024-12-03T13:57:40Z">
            <text:p>2024-12-03T13:57:40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omment_box">
            <text:p>comment_box</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3-13T15:21:35Z">
            <text:p>2017-03-13T15:21:35Z</text:p>
          </table:table-cell>
          <table:table-cell office:value-type="string" office:string-value="2017-03-13T15:19:36Z">
            <text:p>2017-03-13T15:19: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ommentBox">
            <text:p>CommentBox</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comment_box">
            <text:p>https://github.com/unfoldingWord-dev/comment_box</text:p>
          </table:table-cell>
          <table:table-cell office:value-type="string" office:string-value="2019-10-22T19:37:22Z">
            <text:p>2019-10-22T19:37:2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bbackupr2">
            <text:p>dbbackupr2</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7T12:19:22Z">
            <text:p>2025-11-27T12:19:22Z</text:p>
          </table:table-cell>
          <table:table-cell office:value-type="string" office:string-value="2025-11-27T12:19:17Z">
            <text:p>2025-11-27T12:19:17Z</text:p>
          </table:table-cell>
          <table:table-cell office:value-type="string" office:string-value="2024-07-09T13:34:50Z">
            <text:p>2024-07-09T13:34:50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2">
            <text:p>2</text:p>
          </table:table-cell>
          <table:table-cell office:value-type="string" office:string-value="6">
            <text:p>6</text:p>
          </table:table-cell>
          <table:table-cell office:value-type="string" office:string-value="https://github.com/unfoldingWord/dbbackupr2">
            <text:p>https://github.com/unfoldingWord/dbbackupr2</text:p>
          </table:table-cell>
          <table:table-cell office:value-type="string" office:string-value="2025-11-27T12:19:25Z">
            <text:p>2025-11-27T12:19:25Z</text:p>
          </table:table-cell>
          <table:table-cell office:value-type="string" office:string-value="No longer used candidate">
            <text:p>No longer used candidate</text:p>
          </table:table-cell>
          <table:table-cell office:value-type="string" office:string-value="Repository name suggests it may be old, legacy, deprecated, obsolete, archived, or a backup.">
            <text:p>Repository name suggests it may be old, legacy, deprecated, obsolete, archived, or a backup.</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esktop-app-liminal">
            <text:p>desktop-app-limina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7-15T13:09:17Z">
            <text:p>2025-07-15T13:09:17Z</text:p>
          </table:table-cell>
          <table:table-cell office:value-type="string" office:string-value="2025-05-13T00:55:06Z">
            <text:p>2025-05-13T00:55:0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pankosmia-app-builder">
            <text:p>pankosmia-app-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UN-Projects', 'mvahowe', 'PhotoNomad0', 'yakob-aleksandrovich']">
            <text:p>['RUN-Projects', 'mvahowe', 'PhotoNomad0',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desktop-app-liminal">
            <text:p>https://github.com/unfoldingWord-box3/desktop-app-liminal</text:p>
          </table:table-cell>
          <table:table-cell office:value-type="string" office:string-value="2025-05-14T14:59:15Z">
            <text:p>2025-05-14T14:59:15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fia-mcp">
            <text:p>fia-mc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3-11T19:28:14Z">
            <text:p>2026-03-11T19:28:14Z</text:p>
          </table:table-cell>
          <table:table-cell office:value-type="string" office:string-value="2026-03-11T19:28:02Z">
            <text:p>2026-03-11T19:28:02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fia-mcp">
            <text:p>fia-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text:p>['ILindsley',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fia-mcp">
            <text:p>https://github.com/unfoldingWord/fia-mcp</text:p>
          </table:table-cell>
          <table:table-cell office:value-type="string" office:string-value="2026-03-11T19:28:18Z">
            <text:p>2026-03-11T19:28:1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fred-zulip-bot-worker">
            <text:p>fred-zulip-bot-work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9T16:01:39Z">
            <text:p>2026-05-09T16:01:39Z</text:p>
          </table:table-cell>
          <table:table-cell office:value-type="string" office:string-value="2026-05-09T16:01:39Z">
            <text:p>2026-05-09T16:01: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red-zulip-bot-worker">
            <text:p>fred-zulip-bo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ILindsley']">
            <text:p>['IanLindsley', 'ILindsley']</text:p>
          </table:table-cell>
          <table:table-cell office:value-type="string" office:string-value="0">
            <text:p>0</text:p>
          </table:table-cell>
          <table:table-cell office:value-type="string" office:string-value="0">
            <text:p>0</text:p>
          </table:table-cell>
          <table:table-cell office:value-type="string" office:string-value="https://github.com/unfoldingWord/fred-zulip-bot-worker">
            <text:p>https://github.com/unfoldingWord/fred-zulip-bot-worker</text:p>
          </table:table-cell>
          <table:table-cell office:value-type="string" office:string-value="2026-05-09T16:01:43Z">
            <text:p>2026-05-09T16:01:43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gitea-offline-poc">
            <text:p>gitea-offline-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13:35:32Z">
            <text:p>2023-01-06T13:35:32Z</text:p>
          </table:table-cell>
          <table:table-cell office:value-type="string" office:string-value="2020-08-12T19:36:04Z">
            <text:p>2020-08-12T19:36:04Z</text:p>
          </table:table-cell>
          <table:table-cell office:value-type="string" office:string-value="">
            <text:p/>
          </table:table-cell>
          <table:table-cell office:value-type="string" office:string-value="20">
            <text:p>20</text:p>
          </table:table-cell>
          <table:table-cell office:value-type="string" office:string-value="20">
            <text:p>20</text:p>
          </table:table-cell>
          <table:table-cell office:value-type="string" office:string-value="gitea-offline-poc">
            <text:p>gitea-offlin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unfoldingword/eslint-config', 'markdown-translatable']">
            <text:p>['gitea-react-toolkit', '@unfoldingword/eslint-config', 'markdown-translatable']</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gitea-offline-poc">
            <text:p>https://github.com/unfoldingWord-box3/gitea-offline-poc</text:p>
          </table:table-cell>
          <table:table-cell office:value-type="string" office:string-value="2020-08-12T19:36:13Z">
            <text:p>2020-08-12T19:36:13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gutenberg-project">
            <text:p>gutenberg-projec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3-01T21:14:08Z">
            <text:p>2022-03-01T21:14:08Z</text:p>
          </table:table-cell>
          <table:table-cell office:value-type="string" office:string-value="2022-03-01T21:14:05Z">
            <text:p>2022-03-01T21:14: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gutenberg-project">
            <text:p>https://github.com/unfoldingWord-box3/gutenberg-project</text:p>
          </table:table-cell>
          <table:table-cell office:value-type="string" office:string-value="2022-03-01T21:05:23Z">
            <text:p>2022-03-01T21:05:23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keybase_git_backup">
            <text:p>keybase_git_backup</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1-18T11:32:21Z">
            <text:p>2024-01-18T11:32:21Z</text:p>
          </table:table-cell>
          <table:table-cell office:value-type="string" office:string-value="2024-01-18T11:32:10Z">
            <text:p>2024-01-18T11:32: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https://github.com/unfoldingWord/keybase_git_backup">
            <text:p>https://github.com/unfoldingWord/keybase_git_backup</text:p>
          </table:table-cell>
          <table:table-cell office:value-type="string" office:string-value="2022-10-31T10:09:39Z">
            <text:p>2022-10-31T10:09:39Z</text:p>
          </table:table-cell>
          <table:table-cell office:value-type="string" office:string-value="No longer used candidate">
            <text:p>No longer used candidate</text:p>
          </table:table-cell>
          <table:table-cell office:value-type="string" office:string-value="Repository name suggests it may be old, legacy, deprecated, obsolete, archived, or a backup.">
            <text:p>Repository name suggests it may be old, legacy, deprecated, obsolete, archived, or a backup.</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lang-as-graph">
            <text:p>lang-as-graph</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5T01:22:08Z">
            <text:p>2023-07-15T01:22:08Z</text:p>
          </table:table-cell>
          <table:table-cell office:value-type="string" office:string-value="2020-07-21T13:00:01Z">
            <text:p>2020-07-21T13:00:01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language-database-poc">
            <text:p>language-databas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vanmhale', 'jag3773']">
            <text:p>['ivanmhale',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lang-as-graph">
            <text:p>https://github.com/unfoldingWord-box3/lang-as-graph</text:p>
          </table:table-cell>
          <table:table-cell office:value-type="string" office:string-value="2020-07-21T13:00:12Z">
            <text:p>2020-07-21T13:00:1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md-converter-app">
            <text:p>md-converter-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2-20T19:28:22Z">
            <text:p>2021-12-20T19:28:22Z</text:p>
          </table:table-cell>
          <table:table-cell office:value-type="string" office:string-value="2021-12-20T19:28:22Z">
            <text:p>2021-12-20T19:28:22Z</text:p>
          </table:table-cell>
          <table:table-cell office:value-type="string" office:string-value="">
            <text:p/>
          </table:table-cell>
          <table:table-cell office:value-type="string" office:string-value="30">
            <text:p>30</text:p>
          </table:table-cell>
          <table:table-cell office:value-type="string" office:string-value="0">
            <text:p>0</text:p>
          </table:table-cell>
          <table:table-cell office:value-type="string" office:string-value="md-tsv-converter-app">
            <text:p>md-tsv-convert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mannycolon', 'PhotoNomad0', 'ImgBotApp']">
            <text:p>['mannycolon', 'PhotoNomad0', 'ImgBotApp']</text:p>
          </table:table-cell>
          <table:table-cell office:value-type="string" office:string-value="0">
            <text:p>0</text:p>
          </table:table-cell>
          <table:table-cell office:value-type="string" office:string-value="0">
            <text:p>0</text:p>
          </table:table-cell>
          <table:table-cell office:value-type="string" office:string-value="https://github.com/unfoldingWord-box3/md-converter-app">
            <text:p>https://github.com/unfoldingWord-box3/md-converter-app</text:p>
          </table:table-cell>
          <table:table-cell office:value-type="string" office:string-value="2021-12-20T19:28:57Z">
            <text:p>2021-12-20T19:28:57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next-js-template">
            <text:p>next-js-template</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9-26T15:07:50Z">
            <text:p>2022-09-26T15:07:50Z</text:p>
          </table:table-cell>
          <table:table-cell office:value-type="string" office:string-value="2022-09-26T15:07:50Z">
            <text:p>2022-09-26T15:07:50Z</text:p>
          </table:table-cell>
          <table:table-cell office:value-type="string" office:string-value="">
            <text:p/>
          </table:table-cell>
          <table:table-cell office:value-type="string" office:string-value="20">
            <text:p>20</text:p>
          </table:table-cell>
          <table:table-cell office:value-type="string" office:string-value="0">
            <text:p>0</text:p>
          </table:table-cell>
          <table:table-cell office:value-type="string" office:string-value="next-js-template">
            <text:p>next-js-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resource-workspace-rcl', 'scripture-resources-rcl', 'single-scripture-rcl', 'tc-ui-toolkit', 'translation-helps-rcl', 'word-aligner']">
            <text:p>['gitea-react-toolkit', 'markdown-translatable', 'resource-workspace-rcl', 'scripture-resources-rcl', 'single-scripture-rcl', 'tc-ui-toolkit', 'translation-helps-rcl', 'word-aligner']</text:p>
          </table:table-cell>
          <table:table-cell office:value-type="string" office:string-value="">
            <text:p/>
          </table:table-cell>
          <table:table-cell office:value-type="string" office:string-value="['mandolyte', 'superdav42', 'mannycolon', 'abelpz']">
            <text:p>['mandolyte', 'superdav42', 'mannycolon', 'abelpz']</text:p>
          </table:table-cell>
          <table:table-cell office:value-type="string" office:string-value="0">
            <text:p>0</text:p>
          </table:table-cell>
          <table:table-cell office:value-type="string" office:string-value="0">
            <text:p>0</text:p>
          </table:table-cell>
          <table:table-cell office:value-type="string" office:string-value="https://github.com/unfoldingWord-box3/next-js-template">
            <text:p>https://github.com/unfoldingWord-box3/next-js-template</text:p>
          </table:table-cell>
          <table:table-cell office:value-type="string" office:string-value="2022-06-17T15:46:29Z">
            <text:p>2022-06-17T15:46:29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node-cli-add-gl-quotes-to-tsv-files">
            <text:p>node-cli-add-gl-quotes-to-tsv-file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22:53:14Z">
            <text:p>2025-11-03T22:53:14Z</text:p>
          </table:table-cell>
          <table:table-cell office:value-type="string" office:string-value="2025-11-03T22:53:12Z">
            <text:p>2025-11-03T22:53:12Z</text:p>
          </table:table-cell>
          <table:table-cell office:value-type="string" office:string-value="2025-04-23T20:48:30Z">
            <text:p>2025-04-23T20:48:30Z</text:p>
          </table:table-cell>
          <table:table-cell office:value-type="string" office:string-value="0">
            <text:p>0</text:p>
          </table:table-cell>
          <table:table-cell office:value-type="string" office:string-value="0">
            <text:p>0</text:p>
          </table:table-cell>
          <table:table-cell office:value-type="string" office:string-value="add-gl-quotes-to-tsv-files">
            <text:p>add-gl-quotes-to-tsv-fil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ext:p>tsv-quote-converters</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0">
            <text:p>0</text:p>
          </table:table-cell>
          <table:table-cell office:value-type="string" office:string-value="https://github.com/unfoldingWord/node-cli-add-gl-quotes-to-tsv-files">
            <text:p>https://github.com/unfoldingWord/node-cli-add-gl-quotes-to-tsv-files</text:p>
          </table:table-cell>
          <table:table-cell office:value-type="string" office:string-value="2025-11-03T22:53:18Z">
            <text:p>2025-11-03T22:53:1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obs-audio-navigation">
            <text:p>obs-audio-navigat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7-05T11:05:54Z">
            <text:p>2024-07-05T11:05:54Z</text:p>
          </table:table-cell>
          <table:table-cell office:value-type="string" office:string-value="2024-07-05T11:05:54Z">
            <text:p>2024-07-05T11:05: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bs-audio-navigation">
            <text:p>obs-audio-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obs-audio-navigation">
            <text:p>https://github.com/unfoldingWord-box3/obs-audio-navigation</text:p>
          </table:table-cell>
          <table:table-cell office:value-type="string" office:string-value="2024-07-05T11:13:09Z">
            <text:p>2024-07-05T11:13:09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obs-pdf-poc">
            <text:p>obs-pdf-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26T01:31:57Z">
            <text:p>2023-04-26T01:31:57Z</text:p>
          </table:table-cell>
          <table:table-cell office:value-type="string" office:string-value="2023-04-26T01:31:54Z">
            <text:p>2023-04-26T01:31: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obs-pdf-poc">
            <text:p>https://github.com/unfoldingWord-box3/obs-pdf-poc</text:p>
          </table:table-cell>
          <table:table-cell office:value-type="string" office:string-value="2021-11-03T19:29:18Z">
            <text:p>2021-11-03T19:29:1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obsidian-uw-rc-link-opener">
            <text:p>obsidian-uw-rc-link-opener</text:p>
          </table:table-cell>
          <table:table-cell office:value-type="string" office:string-value="unfoldingWord-dev">
            <text:p>unfoldingWord-dev</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08T17:40:36Z">
            <text:p>2021-06-08T17:40:36Z</text:p>
          </table:table-cell>
          <table:table-cell office:value-type="string" office:string-value="2021-06-08T17:40:33Z">
            <text:p>2021-06-08T17:40:33Z</text:p>
          </table:table-cell>
          <table:table-cell office:value-type="string" office:string-value="2021-06-07T19:26:06Z">
            <text:p>2021-06-07T19:26:06Z</text:p>
          </table:table-cell>
          <table:table-cell office:value-type="string" office:string-value="0">
            <text:p>0</text:p>
          </table:table-cell>
          <table:table-cell office:value-type="string" office:string-value="0">
            <text:p>0</text:p>
          </table:table-cell>
          <table:table-cell office:value-type="string" office:string-value="uw-rc-link-opener">
            <text:p>uw-rc-link-ope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8">
            <text:p>8</text:p>
          </table:table-cell>
          <table:table-cell office:value-type="string" office:string-value="https://github.com/unfoldingWord-dev/obsidian-uw-rc-link-opener">
            <text:p>https://github.com/unfoldingWord-dev/obsidian-uw-rc-link-opener</text:p>
          </table:table-cell>
          <table:table-cell office:value-type="string" office:string-value="2021-06-08T17:40:39Z">
            <text:p>2021-06-08T17:40:39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oce-oak-edit">
            <text:p>oce-oak-ed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7T07:56:18Z">
            <text:p>2024-01-17T07:56:18Z</text:p>
          </table:table-cell>
          <table:table-cell office:value-type="string" office:string-value="2024-01-11T12:01:38Z">
            <text:p>2024-01-11T12:01: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 Oak Edit">
            <text:p>OCE Oak 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kintsoogi']">
            <text:p>['larsgson', 'kintsoogi']</text:p>
          </table:table-cell>
          <table:table-cell office:value-type="string" office:string-value="0">
            <text:p>0</text:p>
          </table:table-cell>
          <table:table-cell office:value-type="string" office:string-value="0">
            <text:p>0</text:p>
          </table:table-cell>
          <table:table-cell office:value-type="string" office:string-value="https://github.com/unfoldingWord/oce-oak-edit">
            <text:p>https://github.com/unfoldingWord/oce-oak-edit</text:p>
          </table:table-cell>
          <table:table-cell office:value-type="string" office:string-value="2023-09-18T05:39:45Z">
            <text:p>2023-09-18T05:39:45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oce-oak-render">
            <text:p>oce-oak-rend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14:27:05Z">
            <text:p>2024-01-12T14:27:05Z</text:p>
          </table:table-cell>
          <table:table-cell office:value-type="string" office:string-value="2024-01-12T14:27:05Z">
            <text:p>2024-01-12T14:27: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oak-render">
            <text:p>oce-oak-ren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PhotoNomad0']">
            <text:p>['larsgson',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oce-oak-render">
            <text:p>https://github.com/unfoldingWord/oce-oak-render</text:p>
          </table:table-cell>
          <table:table-cell office:value-type="string" office:string-value="2023-09-13T16:01:45Z">
            <text:p>2023-09-13T16:01:45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old-tx-manager-lambda">
            <text:p>old-tx-manager-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19T15:13:30Z">
            <text:p>2016-12-19T15:13:30Z</text:p>
          </table:table-cell>
          <table:table-cell office:value-type="string" office:string-value="2016-12-19T15:13:25Z">
            <text:p>2016-12-19T15:13: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old-tx-manager-lambda">
            <text:p>https://github.com/unfoldingWord-dev/old-tx-manager-lambda</text:p>
          </table:table-cell>
          <table:table-cell office:value-type="string" office:string-value="2017-01-23T14:56:14Z">
            <text:p>2017-01-23T14:56:14Z</text:p>
          </table:table-cell>
          <table:table-cell office:value-type="string" office:string-value="No longer used candidate">
            <text:p>No longer used candidate</text:p>
          </table:table-cell>
          <table:table-cell office:value-type="string" office:string-value="Repository name suggests it may be old, legacy, deprecated, obsolete, archived, or a backup.">
            <text:p>Repository name suggests it may be old, legacy, deprecated, obsolete, archived, or a backup.</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pen-languages">
            <text:p>open-languag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06T18:22:40Z">
            <text:p>2025-02-06T18:22:40Z</text:p>
          </table:table-cell>
          <table:table-cell office:value-type="string" office:string-value="2025-02-06T18:22:33Z">
            <text:p>2025-02-06T18:22: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penlanguages">
            <text:p>openlangu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mueljd">
            <text:p>samueljd</text:p>
          </table:table-cell>
          <table:table-cell office:value-type="string" office:string-value="0">
            <text:p>0</text:p>
          </table:table-cell>
          <table:table-cell office:value-type="string" office:string-value="0">
            <text:p>0</text:p>
          </table:table-cell>
          <table:table-cell office:value-type="string" office:string-value="https://github.com/unfoldingWord/open-languages">
            <text:p>https://github.com/unfoldingWord/open-languages</text:p>
          </table:table-cell>
          <table:table-cell office:value-type="string" office:string-value="2025-02-06T18:22:44Z">
            <text:p>2025-02-06T18:22:44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passage-recorder-app">
            <text:p>passage-record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6-11T15:50:11Z">
            <text:p>2025-06-11T15:50:11Z</text:p>
          </table:table-cell>
          <table:table-cell office:value-type="string" office:string-value="2025-06-11T15:49:10Z">
            <text:p>2025-06-11T15:49:10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scripture-simple-recorder">
            <text:p>scripture-simple-recor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passage-recorder-app">
            <text:p>https://github.com/unfoldingWord-box3/passage-recorder-app</text:p>
          </table:table-cell>
          <table:table-cell office:value-type="string" office:string-value="2025-06-11T16:03:07Z">
            <text:p>2025-06-11T16:03:07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pdf-generator">
            <text:p>pdf-generato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09T16:44:00Z">
            <text:p>2020-10-09T16:44:00Z</text:p>
          </table:table-cell>
          <table:table-cell office:value-type="string" office:string-value="2020-10-09T16:43:56Z">
            <text:p>2020-10-09T16:43: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df-generator">
            <text:p>pdf-gener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resources-rcl', 'string-punctuation-tokenizer', 'tc-source-content-updater', 'tsv-groupdata-parser', 'usfm-js']">
            <text:p>['scripture-resources-rcl', 'string-punctuation-tokenizer', 'tc-source-content-updater', 'tsv-groupdata-parser', 'usfm-j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pdf-generator">
            <text:p>https://github.com/unfoldingWord-box3/pdf-generator</text:p>
          </table:table-cell>
          <table:table-cell office:value-type="string" office:string-value="2020-10-09T16:44:02Z">
            <text:p>2020-10-09T16:44:0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RecordVoice">
            <text:p>RecordVoice</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6T14:13:55Z">
            <text:p>2024-03-06T14:13:55Z</text:p>
          </table:table-cell>
          <table:table-cell office:value-type="string" office:string-value="2024-03-06T14:13:51Z">
            <text:p>2024-03-06T14:13: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cord-voice">
            <text:p>record-voi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lm">
            <text:p>blm</text:p>
          </table:table-cell>
          <table:table-cell office:value-type="string" office:string-value="0">
            <text:p>0</text:p>
          </table:table-cell>
          <table:table-cell office:value-type="string" office:string-value="0">
            <text:p>0</text:p>
          </table:table-cell>
          <table:table-cell office:value-type="string" office:string-value="https://github.com/unfoldingWord-box3/RecordVoice">
            <text:p>https://github.com/unfoldingWord-box3/RecordVoice</text:p>
          </table:table-cell>
          <table:table-cell office:value-type="string" office:string-value="2024-03-05T16:10:13Z">
            <text:p>2024-03-05T16:10:13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sample-react-component-library">
            <text:p>sample-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7-28T16:44:35Z">
            <text:p>2020-07-28T16:44:35Z</text:p>
          </table:table-cell>
          <table:table-cell office:value-type="string" office:string-value="2020-07-28T16:43:21Z">
            <text:p>2020-07-28T16:43: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ample-react-component-library">
            <text:p>sample-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0">
            <text:p>0</text:p>
          </table:table-cell>
          <table:table-cell office:value-type="string" office:string-value="0">
            <text:p>0</text:p>
          </table:table-cell>
          <table:table-cell office:value-type="string" office:string-value="https://github.com/unfoldingWord-box3/sample-react-component-library">
            <text:p>https://github.com/unfoldingWord-box3/sample-react-component-library</text:p>
          </table:table-cell>
          <table:table-cell office:value-type="string" office:string-value="2020-07-28T16:44:37Z">
            <text:p>2020-07-28T16:44:37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simple-text-editor-app">
            <text:p>simple-text-editor-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23:50:37Z">
            <text:p>2023-03-02T23:50:37Z</text:p>
          </table:table-cell>
          <table:table-cell office:value-type="string" office:string-value="2022-05-09T18:19:08Z">
            <text:p>2022-05-09T18:19:08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simple-text-editor-app">
            <text:p>simple-text-edito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e-text-editor-rcl">
            <text:p>simple-text-editor-rcl</text:p>
          </table:table-cell>
          <table:table-cell office:value-type="string" office:string-value="">
            <text:p/>
          </table:table-cell>
          <table:table-cell office:value-type="string" office:string-value="['klappy', 'RUN-Projects']">
            <text:p>['klappy', 'RUN-Projects']</text:p>
          </table:table-cell>
          <table:table-cell office:value-type="string" office:string-value="0">
            <text:p>0</text:p>
          </table:table-cell>
          <table:table-cell office:value-type="string" office:string-value="0">
            <text:p>0</text:p>
          </table:table-cell>
          <table:table-cell office:value-type="string" office:string-value="https://github.com/unfoldingWord-box3/simple-text-editor-app">
            <text:p>https://github.com/unfoldingWord-box3/simple-text-editor-app</text:p>
          </table:table-cell>
          <table:table-cell office:value-type="string" office:string-value="2021-11-29T20:26:55Z">
            <text:p>2021-11-29T20:26:55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_pane">
            <text:p>t_pan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09T21:08:27Z">
            <text:p>2016-12-09T21:08:27Z</text:p>
          </table:table-cell>
          <table:table-cell office:value-type="string" office:string-value="2016-11-17T09:19:42Z">
            <text:p>2016-11-17T09:19: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Pane">
            <text:p>T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mannycolon', 'RoyalSix']">
            <text:p>['ihoegen', 'Sterling (Jay) Scott', 'mannycolon', 'RoyalSix']</text:p>
          </table:table-cell>
          <table:table-cell office:value-type="string" office:string-value="0">
            <text:p>0</text:p>
          </table:table-cell>
          <table:table-cell office:value-type="string" office:string-value="0">
            <text:p>0</text:p>
          </table:table-cell>
          <table:table-cell office:value-type="string" office:string-value="https://github.com/unfoldingWord-dev/t_pane">
            <text:p>https://github.com/unfoldingWord-dev/t_pane</text:p>
          </table:table-cell>
          <table:table-cell office:value-type="string" office:string-value="2019-10-22T19:34:26Z">
            <text:p>2019-10-22T19:34:26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
            <text:p>tc-stud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monorepo">
            <text:p>bt-synergy-monorepo</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cache-adapter-indexeddb">
            <text:p>tc-study/@bt-synergy/cache-adapter-indexedd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che-adapter-indexeddb">
            <text:p>@bt-synergy/cache-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cache-adapter-memory">
            <text:p>tc-study/@bt-synergy/cache-adapter-memo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che-adapter-memory">
            <text:p>@bt-synergy/cache-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cache-adapter-sqlite">
            <text:p>tc-study/@bt-synergy/cache-adapter-sql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che-adapter-sqlite">
            <text:p>@bt-synergy/cache-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linked-panels">
            <text:p>tc-study/@bt-synergy/linked-pane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linked-panels">
            <text:p>@bt-synergy/linked-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mobile">
            <text:p>tc-study/@bt-synergy/mobil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mobile">
            <text:p>@bt-synergy/mobi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navigation">
            <text:p>tc-study/@bt-synergy/navigation</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navigation">
            <text:p>@bt-synergy/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package-builder">
            <text:p>tc-study/@bt-synergy/package-buil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builder">
            <text:p>@bt-synergy/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tc-study/@bt-synergy/package-builder-engine">
            <text:p>tc-study/@bt-synergy/package-builder-engin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builder-engine">
            <text:p>@bt-synergy/package-builder-engi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tc-study/@bt-synergy/package-creator-core">
            <text:p>tc-study/@bt-synergy/package-creator-c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creator-core">
            <text:p>@bt-synergy/package-creator-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package-creator-state">
            <text:p>tc-study/@bt-synergy/package-creator-sta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creator-state">
            <text:p>@bt-synergy/package-creator-st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package-creator-web">
            <text:p>tc-study/@bt-synergy/package-creator-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creator-web">
            <text:p>@bt-synergy/package-cre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package-creator-workflow">
            <text:p>tc-study/@bt-synergy/package-creator-workflow</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creator-workflow">
            <text:p>@bt-synergy/package-creator-workflo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package-storage">
            <text:p>tc-study/@bt-synergy/package-storag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storage">
            <text:p>@bt-synergy/package-storag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passage-sets">
            <text:p>tc-study/@bt-synergy/passage-set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ssage-sets">
            <text:p>@bt-synergy/passage-se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passage-sets-cli">
            <text:p>tc-study/@bt-synergy/passage-sets-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ssage-sets-cli">
            <text:p>@bt-synergy/passage-sets-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tc-study/@bt-synergy/shared">
            <text:p>tc-study/@bt-synergy/shared</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shared">
            <text:p>@bt-synergy/share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study-store">
            <text:p>tc-study/@bt-synergy/study-st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study-store">
            <text:p>@bt-synergy/study-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toc-generator-cli">
            <text:p>tc-study/@bt-synergy/toc-generator-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toc-generator-cli">
            <text:p>@bt-synergy/toc-generator-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tc-study/@bt-synergy/translation-academy-loader">
            <text:p>tc-study/@bt-synergy/translation-academy-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translation-academy-loader">
            <text:p>@bt-synergy/translation-academy-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translation-notes-loader">
            <text:p>tc-study/@bt-synergy/translation-note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translation-notes-loader">
            <text:p>@bt-synergy/translation-note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translation-questions-loader">
            <text:p>tc-study/@bt-synergy/translation-question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translation-questions-loader">
            <text:p>@bt-synergy/translation-question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translation-words-links-loader">
            <text:p>tc-study/@bt-synergy/translation-words-link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translation-words-links-loader">
            <text:p>@bt-synergy/translation-words-link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translation-words-loader">
            <text:p>tc-study/@bt-synergy/translation-word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translation-words-loader">
            <text:p>@bt-synergy/translation-word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ui-controls">
            <text:p>tc-study/@bt-synergy/ui-contro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ui-controls">
            <text:p>@bt-synergy/ui-contr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usfm-processor">
            <text:p>tc-study/@bt-synergy/usfm-processo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usfm-processor">
            <text:p>@bt-synergy/usfm-process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ible-web">
            <text:p>tc-study/bible-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ible-web">
            <text:p>bible-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linked-panels-spike">
            <text:p>tc-study/linked-panels-spik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linked-panels-spike">
            <text:p>linked-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tc-study">
            <text:p>tc-study/tc-stud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tc-study">
            <text:p>tc-stud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toc-generator-web">
            <text:p>tc-study/toc-generator-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toc-generator-web">
            <text:p>toc-gener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tsv-converter">
            <text:p>tc-tsv-conver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1-15T22:01:51Z">
            <text:p>2022-11-15T22:01:51Z</text:p>
          </table:table-cell>
          <table:table-cell office:value-type="string" office:string-value="2022-11-15T22:01:47Z">
            <text:p>2022-11-15T22:01: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converter">
            <text:p>tsv-conver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tsv-converter">
            <text:p>https://github.com/unfoldingWord/tc-tsv-converter</text:p>
          </table:table-cell>
          <table:table-cell office:value-type="string" office:string-value="2022-11-15T23:06:04Z">
            <text:p>2022-11-15T23:06:04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d-legacy">
            <text:p>td-legac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11-29T16:24:41Z">
            <text:p>2023-11-29T16:24:41Z</text:p>
          </table:table-cell>
          <table:table-cell office:value-type="string" office:string-value="2023-11-29T16:24:39Z">
            <text:p>2023-11-29T16:24: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d-legacy">
            <text:p>https://github.com/unfoldingWord/td-legacy</text:p>
          </table:table-cell>
          <table:table-cell office:value-type="string" office:string-value="2023-06-06T09:41:14Z">
            <text:p>2023-06-06T09:41:14Z</text:p>
          </table:table-cell>
          <table:table-cell office:value-type="string" office:string-value="No longer used candidate">
            <text:p>No longer used candidate</text:p>
          </table:table-cell>
          <table:table-cell office:value-type="string" office:string-value="Repository name suggests it may be old, legacy, deprecated, obsolete, archived, or a backup.">
            <text:p>Repository name suggests it may be old, legacy, deprecated, obsolete, archived, or a backup.</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heia-examples/browser-app">
            <text:p>theia-examples/brows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rowser-app">
            <text:p>brows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heia-examples/electron-app">
            <text:p>theia-examples/electron-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lectron-app">
            <text:p>electr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heia-examples/empty">
            <text:p>theia-examples/empty</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mpty">
            <text:p>empt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oolTemplate">
            <text:p>toolTemplat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4:11Z">
            <text:p>2019-04-15T16:34:11Z</text:p>
          </table:table-cell>
          <table:table-cell office:value-type="string" office:string-value="2019-04-15T16:34:08Z">
            <text:p>2019-04-15T16:34: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oolTemplate">
            <text:p>tool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tool">
            <text:p>tc-tool</text:p>
          </table:table-cell>
          <table:table-cell office:value-type="string" office:string-value="">
            <text:p/>
          </table:table-cell>
          <table:table-cell office:value-type="string" office:string-value="['klappy', 'da1nerd', 'ImgBotApp', 'mannycolon']">
            <text:p>['klappy', 'da1nerd', 'ImgBotApp', 'mannycolon']</text:p>
          </table:table-cell>
          <table:table-cell office:value-type="string" office:string-value="0">
            <text:p>0</text:p>
          </table:table-cell>
          <table:table-cell office:value-type="string" office:string-value="0">
            <text:p>0</text:p>
          </table:table-cell>
          <table:table-cell office:value-type="string" office:string-value="https://github.com/unfoldingWord-dev/toolTemplate">
            <text:p>https://github.com/unfoldingWord-dev/toolTemplate</text:p>
          </table:table-cell>
          <table:table-cell office:value-type="string" office:string-value="2019-10-22T19:38:20Z">
            <text:p>2019-10-22T19:38:20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q-app">
            <text:p>tq-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7-28T12:54:36Z">
            <text:p>2025-07-28T12:54:36Z</text:p>
          </table:table-cell>
          <table:table-cell office:value-type="string" office:string-value="2025-07-28T12:54:32Z">
            <text:p>2025-07-28T12:54:32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qa-app">
            <text:p>qa-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tq-app">
            <text:p>https://github.com/unfoldingWord-box3/tq-app</text:p>
          </table:table-cell>
          <table:table-cell office:value-type="string" office:string-value="2025-07-30T15:49:01Z">
            <text:p>2025-07-30T15:49:01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ranslate-markdown-poc">
            <text:p>translate-markdown-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03T17:34:50Z">
            <text:p>2019-04-03T17:34:50Z</text:p>
          </table:table-cell>
          <table:table-cell office:value-type="string" office:string-value="2019-04-03T17:22:30Z">
            <text:p>2019-04-03T17:22: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e-markdown">
            <text:p>translate-markdow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e-markdown-poc">
            <text:p>https://github.com/unfoldingWord-box3/translate-markdown-poc</text:p>
          </table:table-cell>
          <table:table-cell office:value-type="string" office:string-value="2023-05-20T15:31:34Z">
            <text:p>2023-05-20T15:31:34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ranslation-helps">
            <text:p>translation-help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5T02:36:16Z">
            <text:p>2025-06-05T02:36:16Z</text:p>
          </table:table-cell>
          <table:table-cell office:value-type="string" office:string-value="2022-11-09T09:01:02Z">
            <text:p>2022-11-09T09:01: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1">
            <text:p>1</text:p>
          </table:table-cell>
          <table:table-cell office:value-type="string" office:string-value="14">
            <text:p>14</text:p>
          </table:table-cell>
          <table:table-cell office:value-type="string" office:string-value="https://github.com/unfoldingWord-box3/translation-helps">
            <text:p>https://github.com/unfoldingWord-box3/translation-helps</text:p>
          </table:table-cell>
          <table:table-cell office:value-type="string" office:string-value="2025-10-02T14:12:21Z">
            <text:p>2025-10-02T14:12:21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ranslation-manager-poc">
            <text:p>translation-manager-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11T11:37:33Z">
            <text:p>2022-12-11T11:37:33Z</text:p>
          </table:table-cell>
          <table:table-cell office:value-type="string" office:string-value="2020-01-28T22:33:18Z">
            <text:p>2020-01-28T22:33:18Z</text:p>
          </table:table-cell>
          <table:table-cell office:value-type="string" office:string-value="">
            <text:p/>
          </table:table-cell>
          <table:table-cell office:value-type="string" office:string-value="24">
            <text:p>24</text:p>
          </table:table-cell>
          <table:table-cell office:value-type="string" office:string-value="24">
            <text:p>24</text:p>
          </table:table-cell>
          <table:table-cell office:value-type="string" office:string-value="translation-manager-react-component-library">
            <text:p>translation-manager-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manager-poc">
            <text:p>https://github.com/unfoldingWord-box3/translation-manager-poc</text:p>
          </table:table-cell>
          <table:table-cell office:value-type="string" office:string-value="2020-01-28T22:33:45Z">
            <text:p>2020-01-28T22:33:45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ranslation-process">
            <text:p>translation-proces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3-22T14:32:16Z">
            <text:p>2019-03-22T14:32:16Z</text:p>
          </table:table-cell>
          <table:table-cell office:value-type="string" office:string-value="2019-03-22T14:30:55Z">
            <text:p>2019-03-22T14:30: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process">
            <text:p>translation-proces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process">
            <text:p>https://github.com/unfoldingWord-box3/translation-process</text:p>
          </table:table-cell>
          <table:table-cell office:value-type="string" office:string-value="2019-03-22T14:32:18Z">
            <text:p>2019-03-22T14:32:1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ranslationNotes">
            <text:p>translationNote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2-10T20:28:00Z">
            <text:p>2024-12-10T20:28:00Z</text:p>
          </table:table-cell>
          <table:table-cell office:value-type="string" office:string-value="2024-12-10T20:28:00Z">
            <text:p>2024-12-10T20:28:00Z</text:p>
          </table:table-cell>
          <table:table-cell office:value-type="string" office:string-value="">
            <text:p/>
          </table:table-cell>
          <table:table-cell office:value-type="string" office:string-value="16">
            <text:p>16</text:p>
          </table:table-cell>
          <table:table-cell office:value-type="string" office:string-value="15">
            <text:p>15</text:p>
          </table:table-cell>
          <table:table-cell office:value-type="string" office:string-value="translationNotes">
            <text:p>translationNot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c-tool']">
            <text:p>['checking-tool-wrapper', 'tc-tool']</text:p>
          </table:table-cell>
          <table:table-cell office:value-type="string" office:string-value="">
            <text:p/>
          </table:table-cell>
          <table:table-cell office:value-type="string" office:string-value="['mannycolon', 'da1nerd', 'ihoegen', 'RoyalSix', 'PhotoNomad0', 'klappy', 'cdwhitfield73', 'Sterling (Jay) Scott', 'EllDoubleYew', 'dependabot[bot]', 'ImgBotApp', 'jag3773', 'richmahn']">
            <text:p>['mannycolon', 'da1nerd', 'ihoegen', 'RoyalSix', 'PhotoNomad0', 'klappy', 'cdwhitfield73', 'Sterling (Jay) Scott', 'EllDoubleYew', 'dependabot[bot]', 'ImgBotApp',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translationNotes">
            <text:p>https://github.com/unfoldingWord/translationNotes</text:p>
          </table:table-cell>
          <table:table-cell office:value-type="string" office:string-value="2024-12-10T20:28:05Z">
            <text:p>2024-12-10T20:28:05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ranslationWords">
            <text:p>translationWord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2-12T21:24:05Z">
            <text:p>2025-02-12T21:24:05Z</text:p>
          </table:table-cell>
          <table:table-cell office:value-type="string" office:string-value="2024-12-10T20:41:26Z">
            <text:p>2024-12-10T20:41:26Z</text:p>
          </table:table-cell>
          <table:table-cell office:value-type="string" office:string-value="2019-02-06T21:36:33Z">
            <text:p>2019-02-06T21:36:33Z</text:p>
          </table:table-cell>
          <table:table-cell office:value-type="string" office:string-value="17">
            <text:p>17</text:p>
          </table:table-cell>
          <table:table-cell office:value-type="string" office:string-value="16">
            <text:p>16</text:p>
          </table:table-cell>
          <table:table-cell office:value-type="string" office:string-value="translationWords">
            <text:p>translationWord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c-tool']">
            <text:p>['checking-tool-wrapper', 'tc-tool']</text:p>
          </table:table-cell>
          <table:table-cell office:value-type="string" office:string-value="">
            <text:p/>
          </table:table-cell>
          <table:table-cell office:value-type="string" office:string-value="['mannycolon', 'da1nerd', 'RoyalSix', 'PhotoNomad0', 'ihoegen', 'klappy', 'Sterling (Jay) Scott', 'cdwhitfield73', 'richmahn', 'Richard Mahn', 'dependabot-support', 'EllDoubleYew', 'dependabot[bot]', 'bspidel', 'ImgBotApp', 'jag3773']">
            <text:p>['mannycolon', 'da1nerd', 'RoyalSix', 'PhotoNomad0', 'ihoegen', 'klappy', 'Sterling (Jay) Scott', 'cdwhitfield73', 'richmahn', 'Richard Mahn', 'dependabot-support', 'EllDoubleYew', 'dependabot[bot]', 'bspidel', 'ImgBotApp', 'jag3773']</text:p>
          </table:table-cell>
          <table:table-cell office:value-type="string" office:string-value="5">
            <text:p>5</text:p>
          </table:table-cell>
          <table:table-cell office:value-type="string" office:string-value="0">
            <text:p>0</text:p>
          </table:table-cell>
          <table:table-cell office:value-type="string" office:string-value="https://github.com/unfoldingWord/translationWords">
            <text:p>https://github.com/unfoldingWord/translationWords</text:p>
          </table:table-cell>
          <table:table-cell office:value-type="string" office:string-value="2024-12-10T20:41:31Z">
            <text:p>2024-12-10T20:41:31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sv-editor">
            <text:p>tsv-edito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0T00:13:59Z">
            <text:p>2019-04-10T00:13:59Z</text:p>
          </table:table-cell>
          <table:table-cell office:value-type="string" office:string-value="2019-04-10T00:12:52Z">
            <text:p>2019-04-10T00:12: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editor">
            <text:p>tsv-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sv-editor">
            <text:p>https://github.com/unfoldingWord-box3/tsv-editor</text:p>
          </table:table-cell>
          <table:table-cell office:value-type="string" office:string-value="2019-04-10T00:14:01Z">
            <text:p>2019-04-10T00:14:01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sv-twl-creation-app">
            <text:p>tsv-twl-creation-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4-12T12:21:46Z">
            <text:p>2026-04-12T12:21:46Z</text:p>
          </table:table-cell>
          <table:table-cell office:value-type="string" office:string-value="2026-04-12T12:21:44Z">
            <text:p>2026-04-12T12:21:4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tsv-twl-creation-app">
            <text:p>tsv-twl-creati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wl-generator', 'usfm-js']">
            <text:p>['tsv-quote-converters', 'twl-generator', 'usfm-j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twl-creation-app">
            <text:p>https://github.com/unfoldingWord/tsv-twl-creation-app</text:p>
          </table:table-cell>
          <table:table-cell office:value-type="string" office:string-value="2026-04-12T12:21:52Z">
            <text:p>2026-04-12T12:21:5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sv7-tn-cleanup-app">
            <text:p>tsv7-tn-cleanup-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11T23:11:16Z">
            <text:p>2025-12-11T23:11:16Z</text:p>
          </table:table-cell>
          <table:table-cell office:value-type="string" office:string-value="2025-12-11T23:11:14Z">
            <text:p>2025-12-11T23:11:1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tsv7-tn-cleanup-app">
            <text:p>tsv7-tn-cleanup-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ext:p>tsv-quote-converter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7-tn-cleanup-app">
            <text:p>https://github.com/unfoldingWord/tsv7-tn-cleanup-app</text:p>
          </table:table-cell>
          <table:table-cell office:value-type="string" office:string-value="2025-12-11T23:11:20Z">
            <text:p>2025-12-11T23:11:20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unfoldingWord">
            <text:p>unfoldingWord</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10-16T20:09:03Z">
            <text:p>2019-10-16T20:09:03Z</text:p>
          </table:table-cell>
          <table:table-cell office:value-type="string" office:string-value="2019-10-16T20:09:02Z">
            <text:p>2019-10-16T20:09: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unfoldingWord">
            <text:p>https://github.com/unfoldingWord/unfoldingWord</text:p>
          </table:table-cell>
          <table:table-cell office:value-type="string" office:string-value="2025-10-02T14:13:18Z">
            <text:p>2025-10-02T14:13:18Z</text:p>
          </table:table-cell>
          <table:table-cell office:value-type="string" office:string-value="No longer used candidate">
            <text:p>No longer used candidate</text:p>
          </table:table-cell>
          <table:table-cell office:value-type="string" office:string-value="Repository name suggests it may be old, legacy, deprecated, obsolete, archived, or a backup.">
            <text:p>Repository name suggests it may be old, legacy, deprecated, obsolete, archived, or a backup.</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usfm-js-wrapper">
            <text:p>usfm-js-wr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5-26T18:46:35Z">
            <text:p>2020-05-26T18:46:35Z</text:p>
          </table:table-cell>
          <table:table-cell office:value-type="string" office:string-value="2020-05-26T18:45:20Z">
            <text:p>2020-05-26T18:45: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sfm-js-wrapper">
            <text:p>usfm-js-wrapp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RobH123">
            <text:p>RobH123</text:p>
          </table:table-cell>
          <table:table-cell office:value-type="string" office:string-value="0">
            <text:p>0</text:p>
          </table:table-cell>
          <table:table-cell office:value-type="string" office:string-value="0">
            <text:p>0</text:p>
          </table:table-cell>
          <table:table-cell office:value-type="string" office:string-value="https://github.com/unfoldingWord/usfm-js-wrapper">
            <text:p>https://github.com/unfoldingWord/usfm-js-wrapper</text:p>
          </table:table-cell>
          <table:table-cell office:value-type="string" office:string-value="2020-05-26T20:17:20Z">
            <text:p>2020-05-26T20:17:20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uw-metadata-react-component-library">
            <text:p>uw-metadata-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0T17:08:07Z">
            <text:p>2023-07-10T17:08:07Z</text:p>
          </table:table-cell>
          <table:table-cell office:value-type="string" office:string-value="2020-05-07T19:30:02Z">
            <text:p>2020-05-07T19:30:02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scripture-burrito-react-jsonschema-form">
            <text:p>scripture-burrito-react-jsonschema-for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uw-metadata-react-component-library">
            <text:p>https://github.com/unfoldingWord-box3/uw-metadata-react-component-library</text:p>
          </table:table-cell>
          <table:table-cell office:value-type="string" office:string-value="2020-05-07T19:30:12Z">
            <text:p>2020-05-07T19:30:1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uw-pdf-preview">
            <text:p>uw-pdf-preview</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2-22T16:08:39Z">
            <text:p>2023-02-22T16:08:39Z</text:p>
          </table:table-cell>
          <table:table-cell office:value-type="string" office:string-value="2022-11-08T16:01:20Z">
            <text:p>2022-11-08T16:01: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pdf-preview">
            <text:p>uw-pdf-previe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perdav42', 'mandolyte', 'larsgson']">
            <text:p>['superdav42', 'mandolyte', 'larsgson']</text:p>
          </table:table-cell>
          <table:table-cell office:value-type="string" office:string-value="0">
            <text:p>0</text:p>
          </table:table-cell>
          <table:table-cell office:value-type="string" office:string-value="0">
            <text:p>0</text:p>
          </table:table-cell>
          <table:table-cell office:value-type="string" office:string-value="https://github.com/unfoldingWord/uw-pdf-preview">
            <text:p>https://github.com/unfoldingWord/uw-pdf-preview</text:p>
          </table:table-cell>
          <table:table-cell office:value-type="string" office:string-value="2022-11-08T15:51:52Z">
            <text:p>2022-11-08T15:51:5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word-aligner-extension">
            <text:p>word-aligner-extens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7T18:59:55Z">
            <text:p>2024-01-17T18:59:55Z</text:p>
          </table:table-cell>
          <table:table-cell office:value-type="string" office:string-value="2024-01-17T18:59:48Z">
            <text:p>2024-01-17T18:59: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aligner-react-vite">
            <text:p>word-aligner-react-v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word-aligner-extension">
            <text:p>https://github.com/unfoldingWord-box3/word-aligner-extension</text:p>
          </table:table-cell>
          <table:table-cell office:value-type="string" office:string-value="2024-01-08T23:29:10Z">
            <text:p>2024-01-08T23:29:10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wordAlignment">
            <text:p>wordAlignme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3-24T11:04:20Z">
            <text:p>2025-03-24T11:04:20Z</text:p>
          </table:table-cell>
          <table:table-cell office:value-type="string" office:string-value="2025-03-24T11:04:20Z">
            <text:p>2025-03-24T11:04:20Z</text:p>
          </table:table-cell>
          <table:table-cell office:value-type="string" office:string-value="2019-02-06T21:37:06Z">
            <text:p>2019-02-06T21:37:06Z</text:p>
          </table:table-cell>
          <table:table-cell office:value-type="string" office:string-value="15">
            <text:p>15</text:p>
          </table:table-cell>
          <table:table-cell office:value-type="string" office:string-value="13">
            <text:p>13</text:p>
          </table:table-cell>
          <table:table-cell office:value-type="string" office:string-value="wordAlignment">
            <text:p>wordAlignm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client', 'selections', 'tc-tool', 'tc-ui-toolkit', 'usfm-js', 'word-aligner', 'wordmap', 'wordmap-lexer']">
            <text:p>['gogs-client', 'selections', 'tc-tool', 'tc-ui-toolkit', 'usfm-js', 'word-aligner', 'wordmap', 'wordmap-lexer']</text:p>
          </table:table-cell>
          <table:table-cell office:value-type="string" office:string-value="">
            <text:p/>
          </table:table-cell>
          <table:table-cell office:value-type="string" office:string-value="['da1nerd', 'mannycolon', 'PhotoNomad0', 'RoyalSix', 'richmahn', 'klappy', 'dependabot-support', 'Sterling (Jay) Scott', 'Richard Mahn', 'bspidel', 'ImgBotApp']">
            <text:p>['da1nerd', 'mannycolon', 'PhotoNomad0', 'RoyalSix', 'richmahn', 'klappy', 'dependabot-support', 'Sterling (Jay) Scott', 'Richard Mahn', 'bspidel', 'ImgBotApp']</text:p>
          </table:table-cell>
          <table:table-cell office:value-type="string" office:string-value="2">
            <text:p>2</text:p>
          </table:table-cell>
          <table:table-cell office:value-type="string" office:string-value="0">
            <text:p>0</text:p>
          </table:table-cell>
          <table:table-cell office:value-type="string" office:string-value="https://github.com/unfoldingWord/wordAlignment">
            <text:p>https://github.com/unfoldingWord/wordAlignment</text:p>
          </table:table-cell>
          <table:table-cell office:value-type="string" office:string-value="2025-03-24T11:04:25Z">
            <text:p>2025-03-24T11:04:25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wordMAP-mt">
            <text:p>wordMAP-m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11-03T19:05:27Z">
            <text:p>2025-11-03T19:05:27Z</text:p>
          </table:table-cell>
          <table:table-cell office:value-type="string" office:string-value="2025-11-03T19:05:27Z">
            <text:p>2025-11-03T19:05: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map-mt">
            <text:p>wordmap-m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 'wordmap-lexer']">
            <text:p>['wordmap', 'wordmap-lexer']</text:p>
          </table:table-cell>
          <table:table-cell office:value-type="string" office:string-value="">
            <text:p/>
          </table:table-cell>
          <table:table-cell office:value-type="string" office:string-value="['da1nerd', 'yakob-aleksandrovich']">
            <text:p>['da1nerd',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wordMAP-mt">
            <text:p>https://github.com/unfoldingWord-box3/wordMAP-mt</text:p>
          </table:table-cell>
          <table:table-cell office:value-type="string" office:string-value="2025-11-03T19:05:31Z">
            <text:p>2025-11-03T19:05:31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wordMAP-usfm">
            <text:p>wordMAP-usfm</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19-03-05T21:01:50Z">
            <text:p>2019-03-05T21:01:50Z</text:p>
          </table:table-cell>
          <table:table-cell office:value-type="string" office:string-value="2019-03-05T21:01:16Z">
            <text:p>2019-03-05T21:01: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map-usfm">
            <text:p>wordmap-usf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wordmap-lexer']">
            <text:p>['usfm-js', 'wordmap-lexer']</text:p>
          </table:table-cell>
          <table:table-cell office:value-type="string" office:string-value="">
            <text:p/>
          </table:table-cell>
          <table:table-cell office:value-type="string" office:string-value="['da1nerd', 'klappy', 'mannycolon', 'dependabot-support', 'bspidel']">
            <text:p>['da1nerd', 'klappy', 'mannycolon', 'dependabot-support', 'bspidel']</text:p>
          </table:table-cell>
          <table:table-cell office:value-type="string" office:string-value="0">
            <text:p>0</text:p>
          </table:table-cell>
          <table:table-cell office:value-type="string" office:string-value="0">
            <text:p>0</text:p>
          </table:table-cell>
          <table:table-cell office:value-type="string" office:string-value="https://github.com/unfoldingWord/wordMAP-usfm">
            <text:p>https://github.com/unfoldingWord/wordMAP-usfm</text:p>
          </table:table-cell>
          <table:table-cell office:value-type="string" office:string-value="2022-11-13T22:45:42Z">
            <text:p>2022-11-13T22:45:4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dmin-app-old">
            <text:p>admin-app-old</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1-03-10T14:23:06Z">
            <text:p>2021-03-10T14:23:06Z</text:p>
          </table:table-cell>
          <table:table-cell office:value-type="string" office:string-value="2021-03-09T18:47:30Z">
            <text:p>2021-03-09T18:47: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reate-app">
            <text:p>create-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gitea-react-toolkit', 'markdown-translatable', 'resource-workspace-rcl', 'scripture-resources-rcl', 'single-scripture-rcl', 'translation-helps-rcl']">
            <text:p>['bible-reference-rcl', 'gitea-react-toolkit', 'markdown-translatable', 'resource-workspace-rcl', 'scripture-resources-rcl', 'single-scripture-rcl', 'translation-helps-rcl']</text:p>
          </table:table-cell>
          <table:table-cell office:value-type="string" office:string-value="unfoldingWord/gateway-edit">
            <text:p>unfoldingWord/gateway-edit</text:p>
          </table:table-cell>
          <table:table-cell office:value-type="string" office:string-value="['mannycolon', 'PhotoNomad0', 'mandolyte']">
            <text:p>['mannycolon', 'PhotoNomad0',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admin-app-old">
            <text:p>https://github.com/unfoldingWord-box3/admin-app-old</text:p>
          </table:table-cell>
          <table:table-cell office:value-type="string" office:string-value="2021-03-10T14:25:09Z">
            <text:p>2021-03-10T14:25:09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alignment-ml">
            <text:p>alignment-ml</text:p>
          </table:table-cell>
          <table:table-cell office:value-type="string" office:string-value="unfoldingWord-box3">
            <text:p>unfoldingWord-box3</text:p>
          </table:table-cell>
          <table:table-cell office:value-type="string" office:string-value="Jupyter Notebook">
            <text:p>Jupyter Notebook</text:p>
          </table:table-cell>
          <table:table-cell office:value-type="string" office:string-value="False">
            <text:p>False</text:p>
          </table:table-cell>
          <table:table-cell office:value-type="string" office:string-value="True">
            <text:p>True</text:p>
          </table:table-cell>
          <table:table-cell office:value-type="string" office:string-value="2021-01-08T22:57:49Z">
            <text:p>2021-01-08T22:57:49Z</text:p>
          </table:table-cell>
          <table:table-cell office:value-type="string" office:string-value="2021-01-08T22:57:38Z">
            <text:p>2021-01-08T22:57: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alignment-ml">
            <text:p>PhotoNomad0/alignment-m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ml">
            <text:p>https://github.com/unfoldingWord-box3/alignment-ml</text:p>
          </table:table-cell>
          <table:table-cell office:value-type="string" office:string-value="2021-01-08T22:57:52Z">
            <text:p>2021-01-08T22:57:52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alignment-playground">
            <text:p>alignment-playground</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0T18:39:36Z">
            <text:p>2023-02-10T18:39:36Z</text:p>
          </table:table-cell>
          <table:table-cell office:value-type="string" office:string-value="2023-01-30T14:47:20Z">
            <text:p>2023-01-30T14:47: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lignment-playground">
            <text:p>alignment-playgroun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tc-ui-toolkit', 'usfm-js', 'word-aligner', 'wordmap-lexer']">
            <text:p>['bible-reference-range', 'tc-ui-toolkit', 'usfm-js', 'word-aligner', 'wordmap-lexer']</text:p>
          </table:table-cell>
          <table:table-cell office:value-type="string" office:string-value="PhotoNomad0/alignment-playground">
            <text:p>PhotoNomad0/alignment-playground</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playground">
            <text:p>https://github.com/unfoldingWord-box3/alignment-playground</text:p>
          </table:table-cell>
          <table:table-cell office:value-type="string" office:string-value="2023-01-30T13:00:02Z">
            <text:p>2023-01-30T13:00:02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alignment-transferer">
            <text:p>alignment-transferer</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https://github.com/unfoldingWord-dev/alignment-transferer">
            <text:p>https://github.com/unfoldingWord-dev/alignment-transferer</text:p>
          </table:table-cell>
          <table:table-cell office:value-type="string" office:string-value="2025-06-17T18:57:53Z">
            <text:p>2025-06-17T18:57:53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bible-ref-pk-demo">
            <text:p>bible-ref-pk-demo</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11-10T17:40:23Z">
            <text:p>2022-11-10T17:40:23Z</text:p>
          </table:table-cell>
          <table:table-cell office:value-type="string" office:string-value="2022-11-10T17:40:19Z">
            <text:p>2022-11-10T17:40: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bible-ref-pk-demo">
            <text:p>mandolyte/bible-ref-pk-demo</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bible-ref-pk-demo">
            <text:p>https://github.com/unfoldingWord-box3/bible-ref-pk-demo</text:p>
          </table:table-cell>
          <table:table-cell office:value-type="string" office:string-value="2022-04-09T14:05:23Z">
            <text:p>2022-04-09T14:05:23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Bootstrap43">
            <text:p>Bootstrap43</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2-22T18:31:57Z">
            <text:p>2012-02-22T18:31:57Z</text:p>
          </table:table-cell>
          <table:table-cell office:value-type="string" office:string-value="2012-02-22T18:31:53Z">
            <text:p>2012-02-22T18:31: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aronpk/Bootstrap-Skin">
            <text:p>aaronpk/Bootstrap-Skin</text:p>
          </table:table-cell>
          <table:table-cell office:value-type="string" office:string-value="['aaronpk', 'reidab']">
            <text:p>['aaronpk', 'reidab']</text:p>
          </table:table-cell>
          <table:table-cell office:value-type="string" office:string-value="0">
            <text:p>0</text:p>
          </table:table-cell>
          <table:table-cell office:value-type="string" office:string-value="0">
            <text:p>0</text:p>
          </table:table-cell>
          <table:table-cell office:value-type="string" office:string-value="https://github.com/unfoldingWord-dev/Bootstrap43">
            <text:p>https://github.com/unfoldingWord-dev/Bootstrap43</text:p>
          </table:table-cell>
          <table:table-cell office:value-type="string" office:string-value="2023-01-28T16:19:06Z">
            <text:p>2023-01-28T16:19:0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bt-servant-telegram-gateway">
            <text:p>bt-servant-telegram-gatewa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5-14T16:23:20Z">
            <text:p>2026-05-14T16:23:20Z</text:p>
          </table:table-cell>
          <table:table-cell office:value-type="string" office:string-value="2026-05-14T16:23:18Z">
            <text:p>2026-05-14T16:23:18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bt-servant-telegram-gateway">
            <text:p>bt-servant-telegram-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nisArger/bt-servant-telegram-gateway">
            <text:p>DenisArger/bt-servant-telegram-gateway</text:p>
          </table:table-cell>
          <table:table-cell office:value-type="string" office:string-value="['DenisArger', 'IanLindsley', 'claude']">
            <text:p>['DenisArger', 'Ian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bt-servant-telegram-gateway">
            <text:p>https://github.com/unfoldingWord/bt-servant-telegram-gateway</text:p>
          </table:table-cell>
          <table:table-cell office:value-type="string" office:string-value="2026-05-14T16:23:27Z">
            <text:p>2026-05-14T16:23:27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checking-extension">
            <text:p>checking-extension</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5-10-16T15:12:47Z">
            <text:p>2025-10-16T15:12:47Z</text:p>
          </table:table-cell>
          <table:table-cell office:value-type="string" office:string-value="2025-10-16T15:12:47Z">
            <text:p>2025-10-16T15:12:47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checking-extension">
            <text:p>checking-extens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string-punctuation-tokenizer', 'tc-source-content-updater', 'tsv-groupdata-parser', 'usfm-js', 'uw-tsv-parser']">
            <text:p>['bible-reference-range', 'string-punctuation-tokenizer', 'tc-source-content-updater', 'tsv-groupdata-parser', 'usfm-js', 'uw-tsv-parser']</text:p>
          </table:table-cell>
          <table:table-cell office:value-type="string" office:string-value="kintsoogi/translation-notes-extension">
            <text:p>kintsoogi/translation-notes-extension</text:p>
          </table:table-cell>
          <table:table-cell office:value-type="string" office:string-value="['PhotoNomad0', 'kintsoogi']">
            <text:p>['PhotoNomad0', 'kintsoogi']</text:p>
          </table:table-cell>
          <table:table-cell office:value-type="string" office:string-value="4">
            <text:p>4</text:p>
          </table:table-cell>
          <table:table-cell office:value-type="string" office:string-value="65">
            <text:p>65</text:p>
          </table:table-cell>
          <table:table-cell office:value-type="string" office:string-value="https://github.com/unfoldingWord-box3/checking-extension">
            <text:p>https://github.com/unfoldingWord-box3/checking-extension</text:p>
          </table:table-cell>
          <table:table-cell office:value-type="string" office:string-value="2025-10-16T15:12:53Z">
            <text:p>2025-10-16T15:12:53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checking-tool-rcl">
            <text:p>checking-tool-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5-10-30T11:33:32Z">
            <text:p>2025-10-30T11:33:32Z</text:p>
          </table:table-cell>
          <table:table-cell office:value-type="string" office:string-value="2025-10-20T15:57:27Z">
            <text:p>2025-10-20T15:57:27Z</text:p>
          </table:table-cell>
          <table:table-cell office:value-type="string" office:string-value="">
            <text:p/>
          </table:table-cell>
          <table:table-cell office:value-type="string" office:string-value="15">
            <text:p>15</text:p>
          </table:table-cell>
          <table:table-cell office:value-type="string" office:string-value="4">
            <text:p>4</text:p>
          </table:table-cell>
          <table:table-cell office:value-type="string" office:string-value="checking-tool-rcl">
            <text:p>checking-tool-rcl</text:p>
          </table:table-cell>
          <table:table-cell office:value-type="string" office:string-value="False">
            <text:p>False</text:p>
          </table:table-cell>
          <table:table-cell office:value-type="string" office:string-value="5632">
            <text:p>5632</text:p>
          </table:table-cell>
          <table:table-cell office:value-type="string" office:string-value="2025-10-20T15:58:23.259Z">
            <text:p>2025-10-20T15:58:23.259Z</text:p>
          </table:table-cell>
          <table:table-cell office:value-type="string" office:string-value="">
            <text:p/>
          </table:table-cell>
          <table:table-cell office:value-type="string" office:string-value="['bible-reference-range', 'string-punctuation-tokenizer', 'tc-strings', 'usfm-js', 'uw-tsv-parser', 'word-aligner', 'word-aligner-lib', 'wordmap-lexer', 'tc-source-content-updater', 'tsv-groupdata-parser']">
            <text:p>['bible-reference-range', 'string-punctuation-tokenizer', 'tc-strings', 'usfm-js', 'uw-tsv-parser', 'word-aligner', 'word-aligner-lib', 'wordmap-lexer', 'tc-source-content-updater', 'tsv-groupdata-parser']</text:p>
          </table:table-cell>
          <table:table-cell office:value-type="string" office:string-value="unfoldingWord/word-aligner-rcl">
            <text:p>unfoldingWord/word-aligner-rcl</text:p>
          </table:table-cell>
          <table:table-cell office:value-type="string" office:string-value="['PhotoNomad0', 'jincypjose']">
            <text:p>['PhotoNomad0', 'jincypjose']</text:p>
          </table:table-cell>
          <table:table-cell office:value-type="string" office:string-value="0">
            <text:p>0</text:p>
          </table:table-cell>
          <table:table-cell office:value-type="string" office:string-value="0">
            <text:p>0</text:p>
          </table:table-cell>
          <table:table-cell office:value-type="string" office:string-value="https://github.com/unfoldingWord/checking-tool-rcl">
            <text:p>https://github.com/unfoldingWord/checking-tool-rcl</text:p>
          </table:table-cell>
          <table:table-cell office:value-type="string" office:string-value="2025-10-20T15:57:32Z">
            <text:p>2025-10-20T15:57:32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5632 downloads).">
            <text:p>Repository has GitHub dependents or at least 1,000 npm downloads in the last year (563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632 downloads in the last year).">
            <text:p>Package has detected local usage, GitHub dependents, or significant npm downloads (5632 downloads in the last year).</text:p>
          </table:table-cell>
        </table:table-row>
        <table:table-row>
          <table:table-cell office:value-type="string" office:string-value="concourse-pipeline">
            <text:p>concourse-pipeline</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3-08-12T13:51:37Z">
            <text:p>2023-08-12T13:51:37Z</text:p>
          </table:table-cell>
          <table:table-cell office:value-type="string" office:string-value="2023-08-12T13:51:37Z">
            <text:p>2023-08-12T13:51: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concourse-tasks">
            <text:p>da1nerd/concourse-tasks</text:p>
          </table:table-cell>
          <table:table-cell office:value-type="string" office:string-value="['da1nerd', 'PhotoNomad0', 'mannycolon', 'jag3773']">
            <text:p>['da1nerd', 'PhotoNomad0', 'mannycolon', 'jag3773']</text:p>
          </table:table-cell>
          <table:table-cell office:value-type="string" office:string-value="0">
            <text:p>0</text:p>
          </table:table-cell>
          <table:table-cell office:value-type="string" office:string-value="0">
            <text:p>0</text:p>
          </table:table-cell>
          <table:table-cell office:value-type="string" office:string-value="https://github.com/unfoldingWord-dev/concourse-pipeline">
            <text:p>https://github.com/unfoldingWord-dev/concourse-pipeline</text:p>
          </table:table-cell>
          <table:table-cell office:value-type="string" office:string-value="2023-08-12T13:51:42Z">
            <text:p>2023-08-12T13:51:42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cs-migrate-org-repos">
            <text:p>dcs-migrate-org-repo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1-05-02T18:04:55Z">
            <text:p>2021-05-02T18:04:55Z</text:p>
          </table:table-cell>
          <table:table-cell office:value-type="string" office:string-value="2021-01-11T22:27:35Z">
            <text:p>2021-01-11T22:27: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edle/mirror-to-gitea">
            <text:p>jaedle/mirror-to-gitea</text:p>
          </table:table-cell>
          <table:table-cell office:value-type="string" office:string-value="['jaedle', 'Dennis Jekubczyk', 'derhuerst', 'nilp0inter', 'dependabot[bot]']">
            <text:p>['jaedle', 'Dennis Jekubczyk', 'derhuerst', 'nilp0inter',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dev/dcs-migrate-org-repos">
            <text:p>https://github.com/unfoldingWord-dev/dcs-migrate-org-repos</text:p>
          </table:table-cell>
          <table:table-cell office:value-type="string" office:string-value="2021-05-10T13:39:48Z">
            <text:p>2021-05-10T13:39:48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cs-react-hooks">
            <text:p>dcs-react-hook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4T00:19:28Z">
            <text:p>2022-06-24T00:19:28Z</text:p>
          </table:table-cell>
          <table:table-cell office:value-type="string" office:string-value="2022-06-23T20:16:40Z">
            <text:p>2022-06-23T20:16:40Z</text:p>
          </table:table-cell>
          <table:table-cell office:value-type="string" office:string-value="">
            <text:p/>
          </table:table-cell>
          <table:table-cell office:value-type="string" office:string-value="5">
            <text:p>5</text:p>
          </table:table-cell>
          <table:table-cell office:value-type="string" office:string-value="1">
            <text:p>1</text:p>
          </table:table-cell>
          <table:table-cell office:value-type="string" office:string-value="dcs-react-hooks">
            <text:p>dcs-react-hooks</text:p>
          </table:table-cell>
          <table:table-cell office:value-type="string" office:string-value="False">
            <text:p>False</text:p>
          </table:table-cell>
          <table:table-cell office:value-type="string" office:string-value="148">
            <text:p>148</text:p>
          </table:table-cell>
          <table:table-cell office:value-type="string" office:string-value="2022-08-19T12:33:49.976Z">
            <text:p>2022-08-19T12:33:49.976Z</text:p>
          </table:table-cell>
          <table:table-cell office:value-type="string" office:string-value="">
            <text:p/>
          </table:table-cell>
          <table:table-cell office:value-type="string" office:string-value="['dcs-js', 'uw-languages-rcl', '@unfoldingword/eslint-config']">
            <text:p>['dcs-js', 'uw-languages-rcl', '@unfoldingword/eslint-config']</text:p>
          </table:table-cell>
          <table:table-cell office:value-type="string" office:string-value="['nishantshah-me/docusaurus', 'unfoldingWord/gateway-translate']">
            <text:p>['nishantshah-me/docusaurus', 'unfoldingWord/gateway-translate']</text:p>
          </table:table-cell>
          <table:table-cell office:value-type="string" office:string-value="['abelpz', 'mandolyte']">
            <text:p>['abelpz', 'mandolyte']</text:p>
          </table:table-cell>
          <table:table-cell office:value-type="string" office:string-value="0">
            <text:p>0</text:p>
          </table:table-cell>
          <table:table-cell office:value-type="string" office:string-value="0">
            <text:p>0</text:p>
          </table:table-cell>
          <table:table-cell office:value-type="string" office:string-value="https://github.com/unfoldingWord/dcs-react-hooks">
            <text:p>https://github.com/unfoldingWord/dcs-react-hooks</text:p>
          </table:table-cell>
          <table:table-cell office:value-type="string" office:string-value="2022-06-17T15:48:50Z">
            <text:p>2022-06-17T15:48:50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148 downloads).">
            <text:p>Repository has GitHub dependents or at least 1,000 npm downloads in the last year (14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48 downloads in the last year).">
            <text:p>Package has detected local usage, GitHub dependents, or significant npm downloads (148 downloads in the last year).</text:p>
          </table:table-cell>
        </table:table-row>
        <table:table-row>
          <table:table-cell office:value-type="string" office:string-value="desktop-app-template">
            <text:p>desktop-app-template</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5-10-29T20:07:04Z">
            <text:p>2025-10-29T20:07:04Z</text:p>
          </table:table-cell>
          <table:table-cell office:value-type="string" office:string-value="2025-07-20T10:57:14Z">
            <text:p>2025-07-20T10:57: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desktop-app-template">
            <text:p>pankosmia/desktop-app-template</text:p>
          </table:table-cell>
          <table:table-cell office:value-type="string" office:string-value="['RUN-Projects', 'PhotoNomad0', 'mcleanb', 'mvahowe']">
            <text:p>['RUN-Projects', 'PhotoNomad0', 'mcleanb', 'mvahowe']</text:p>
          </table:table-cell>
          <table:table-cell office:value-type="string" office:string-value="0">
            <text:p>0</text:p>
          </table:table-cell>
          <table:table-cell office:value-type="string" office:string-value="0">
            <text:p>0</text:p>
          </table:table-cell>
          <table:table-cell office:value-type="string" office:string-value="https://github.com/unfoldingWord-box3/desktop-app-template">
            <text:p>https://github.com/unfoldingWord-box3/desktop-app-template</text:p>
          </table:table-cell>
          <table:table-cell office:value-type="string" office:string-value="2025-07-20T10:57:23Z">
            <text:p>2025-07-20T10:57:23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okuwiki-plugin-translation">
            <text:p>dokuwiki-plugin-translation</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16T20:44:56Z">
            <text:p>2015-06-16T20:44:56Z</text:p>
          </table:table-cell>
          <table:table-cell office:value-type="string" office:string-value="2015-06-16T20:44:54Z">
            <text:p>2015-06-16T20:44: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plitbrain/dokuwiki-plugin-translation">
            <text:p>splitbrain/dokuwiki-plugin-translation</text:p>
          </table:table-cell>
          <table:table-cell office:value-type="string" office:string-value="['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translation">
            <text:p>https://github.com/unfoldingWord-dev/dokuwiki-plugin-translation</text:p>
          </table:table-cell>
          <table:table-cell office:value-type="string" office:string-value="2015-06-23T19:08:59Z">
            <text:p>2015-06-23T19:08:59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okuwiki-USFMTag">
            <text:p>Dokuwiki-USFMTag</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6-01-28T15:18:48Z">
            <text:p>2016-01-28T15:18:48Z</text:p>
          </table:table-cell>
          <table:table-cell office:value-type="string" office:string-value="2016-01-28T15:18:47Z">
            <text:p>2016-01-28T15:1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MediaWiki-USFMTag">
            <text:p>unfoldingWord/MediaWiki-USFMTag</text:p>
          </table:table-cell>
          <table:table-cell office:value-type="string" office:string-value="['yvonnel098', 'Distant Shores Media', 'jag3773', 'root', 'Door43', 'Phil Hopper', 'phillip-hopper', 'Richard Mahn', 'richmahn']">
            <text:p>['yvonnel098', 'Distant Shores Media', 'jag3773', 'root', 'Door43', 'Phil Hopper', 'phillip-hopper', 'Richard Mahn',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okuwiki-USFMTag">
            <text:p>https://github.com/unfoldingWord-dev/Dokuwiki-USFMTag</text:p>
          </table:table-cell>
          <table:table-cell office:value-type="string" office:string-value="2022-07-27T07:42:16Z">
            <text:p>2022-07-27T07:42:1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oor43-enqueue-job">
            <text:p>door43-enqueue-jo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4-02-29T18:40:06Z">
            <text:p>2024-02-29T18:40:06Z</text:p>
          </table:table-cell>
          <table:table-cell office:value-type="string" office:string-value="2024-02-29T18:39:45Z">
            <text:p>2024-02-29T18:39:45Z</text:p>
          </table:table-cell>
          <table:table-cell office:value-type="string" office:string-value="2024-01-25T16:50:06Z">
            <text:p>2024-01-25T16:50:06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scsoft/webhook-queue">
            <text:p>lscsoft/webhook-queue</text:p>
          </table:table-cell>
          <table:table-cell office:value-type="string" office:string-value="['richmahn', 'RobH123', 'Robert Hunt', 'jag3773', 'tpdownes']">
            <text:p>['richmahn', 'RobH123', 'Robert Hunt', 'jag3773', 'tpdownes']</text:p>
          </table:table-cell>
          <table:table-cell office:value-type="string" office:string-value="24">
            <text:p>24</text:p>
          </table:table-cell>
          <table:table-cell office:value-type="string" office:string-value="0">
            <text:p>0</text:p>
          </table:table-cell>
          <table:table-cell office:value-type="string" office:string-value="https://github.com/unfoldingWord/door43-enqueue-job">
            <text:p>https://github.com/unfoldingWord/door43-enqueue-job</text:p>
          </table:table-cell>
          <table:table-cell office:value-type="string" office:string-value="2022-10-04T15:44:46Z">
            <text:p>2022-10-04T15:44:4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oor43-enqueue-job-test">
            <text:p>door43-enqueue-job-tes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3-04-19T13:50:56Z">
            <text:p>2023-04-19T13:50:56Z</text:p>
          </table:table-cell>
          <table:table-cell office:value-type="string" office:string-value="2023-04-19T13:50:56Z">
            <text:p>2023-04-19T13:50: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oor43-enqueue-job">
            <text:p>unfoldingWord/door43-enqueue-job</text:p>
          </table:table-cell>
          <table:table-cell office:value-type="string" office:string-value="['RobH123', 'richmahn', 'Robert Hunt', 'jag3773', 'tpdownes', 'yakob-aleksandrovich']">
            <text:p>['RobH123', 'richmahn', 'Robert Hunt', 'jag3773', 'tpdownes',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oor43-enqueue-job-test">
            <text:p>https://github.com/unfoldingWord/door43-enqueue-job-test</text:p>
          </table:table-cell>
          <table:table-cell office:value-type="string" office:string-value="2023-04-19T13:51:02Z">
            <text:p>2023-04-19T13:51:02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oor43-library">
            <text:p>door43-librar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True">
            <text:p>True</text:p>
          </table:table-cell>
          <table:table-cell office:value-type="string" office:string-value="2023-01-09T22:40:47Z">
            <text:p>2023-01-09T22:40:47Z</text:p>
          </table:table-cell>
          <table:table-cell office:value-type="string" office:string-value="2023-01-09T22:40:39Z">
            <text:p>2023-01-09T22:40: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web">
            <text:p>unfoldingWord/obs-web</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door43-library">
            <text:p>https://github.com/unfoldingWord/door43-library</text:p>
          </table:table-cell>
          <table:table-cell office:value-type="string" office:string-value="2023-08-08T13:52:06Z">
            <text:p>2023-08-08T13:52:0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oor43-preview-server">
            <text:p>door43-preview-serv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4-05-23T13:53:24Z">
            <text:p>2024-05-23T13:53:24Z</text:p>
          </table:table-cell>
          <table:table-cell office:value-type="string" office:string-value="2024-05-23T13:53:22Z">
            <text:p>2024-05-23T13:53:22Z</text:p>
          </table:table-cell>
          <table:table-cell office:value-type="string" office:string-value="2024-05-22T20:17:13Z">
            <text:p>2024-05-22T20:17:13Z</text:p>
          </table:table-cell>
          <table:table-cell office:value-type="string" office:string-value="0">
            <text:p>0</text:p>
          </table:table-cell>
          <table:table-cell office:value-type="string" office:string-value="0">
            <text:p>0</text:p>
          </table:table-cell>
          <table:table-cell office:value-type="string" office:string-value="door43-preview-server">
            <text:p>door43-preview-serv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jmne/puppeteer-html2pdf">
            <text:p>ccjmne/puppeteer-html2pdf</text:p>
          </table:table-cell>
          <table:table-cell office:value-type="string" office:string-value="['ccjmne', 'richmahn', 'bmestanov', 'redbaron-gt']">
            <text:p>['ccjmne', 'richmahn', 'bmestanov', 'redbaron-gt']</text:p>
          </table:table-cell>
          <table:table-cell office:value-type="string" office:string-value="1">
            <text:p>1</text:p>
          </table:table-cell>
          <table:table-cell office:value-type="string" office:string-value="0">
            <text:p>0</text:p>
          </table:table-cell>
          <table:table-cell office:value-type="string" office:string-value="https://github.com/unfoldingWord/door43-preview-server">
            <text:p>https://github.com/unfoldingWord/door43-preview-server</text:p>
          </table:table-cell>
          <table:table-cell office:value-type="string" office:string-value="2025-09-09T09:17:22Z">
            <text:p>2025-09-09T09:17:22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door43-project-pages">
            <text:p>door43-project-pages</text:p>
          </table:table-cell>
          <table:table-cell office:value-type="string" office:string-value="unfoldingWord-dev">
            <text:p>unfoldingWord-dev</text:p>
          </table:table-cell>
          <table:table-cell office:value-type="string" office:string-value="CSS">
            <text:p>CSS</text:p>
          </table:table-cell>
          <table:table-cell office:value-type="string" office:string-value="True">
            <text:p>True</text:p>
          </table:table-cell>
          <table:table-cell office:value-type="string" office:string-value="True">
            <text:p>True</text:p>
          </table:table-cell>
          <table:table-cell office:value-type="string" office:string-value="2016-09-26T16:42:57Z">
            <text:p>2016-09-26T16:42:57Z</text:p>
          </table:table-cell>
          <table:table-cell office:value-type="string" office:string-value="2016-09-26T16:42:54Z">
            <text:p>2016-09-26T16:42: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door43-project-pages">
            <text:p>bspidel/door43-project-pages</text:p>
          </table:table-cell>
          <table:table-cell office:value-type="string" office:string-value="['Richard Mahn', 'bspidel']">
            <text:p>['Richard Mahn', 'bspidel']</text:p>
          </table:table-cell>
          <table:table-cell office:value-type="string" office:string-value="0">
            <text:p>0</text:p>
          </table:table-cell>
          <table:table-cell office:value-type="string" office:string-value="0">
            <text:p>0</text:p>
          </table:table-cell>
          <table:table-cell office:value-type="string" office:string-value="https://github.com/unfoldingWord-dev/door43-project-pages">
            <text:p>https://github.com/unfoldingWord-dev/door43-project-pages</text:p>
          </table:table-cell>
          <table:table-cell office:value-type="string" office:string-value="2023-01-28T16:19:08Z">
            <text:p>2023-01-28T16:19:08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electron">
            <text:p>electron</text:p>
          </table:table-cell>
          <table:table-cell office:value-type="string" office:string-value="unfoldingWord-box3">
            <text:p>unfoldingWord-box3</text:p>
          </table:table-cell>
          <table:table-cell office:value-type="string" office:string-value="">
            <text:p/>
          </table:table-cell>
          <table:table-cell office:value-type="string" office:string-value="True">
            <text:p>True</text:p>
          </table:table-cell>
          <table:table-cell office:value-type="string" office:string-value="True">
            <text:p>True</text:p>
          </table:table-cell>
          <table:table-cell office:value-type="string" office:string-value="2022-04-17T01:34:51Z">
            <text:p>2022-04-17T01:34:51Z</text:p>
          </table:table-cell>
          <table:table-cell office:value-type="string" office:string-value="2022-04-12T13:43:01Z">
            <text:p>2022-04-12T13:43: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electron">
            <text:p>electron/electron</text:p>
          </table:table-cell>
          <table:table-cell office:value-type="string" office:string-value="['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arturts',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zeeker999', 'thedaniel', 'hanzhao', 'Matt Karl', 'CyberKatze', 'Rafael Guimarães', 'Ted Kim', 'tommoor', 'toonborgers', 'vhashimotoo', 'xaviergonz', 'vsemozhetbyt', 'christoth', 'szTheory', '林伟强', 'ppontes', 'Menci', 'Daniel Pereira', 'robinwassen', 'levrik', 'Chandan Rai', 'bcomnes', 'BobCochran', 'ivmirx', 'leftstick', 'zachflower', 'joaomoreno', 'bpasero', 'SeriousM', 'ragingwind', 'kstar0714', 'nekuz0r', 'jwheare', 'gioggio', 'Michael Köppl', 'rsezille', 'renatoalencar', 'him2him2', 'dittos', 'the-ress', 'simurai', 'xland', 'dale347', 'bridiver', 'bitdisaster', 'xfq', 'Wliu', 'develar', 'vially', 'thomasjo', 'stewartlord', '大和屋 貴仁', 'wujingke', 'tejaspathak', 'psh0628-eng', 'scycbx', 'samueleaton', 'kirkouimet', 'haadcode', 'webpushers', 'bnb', 'indutny', 'Dane Springmeyer', 'Spacetech', 'danburzo', 'bsclifton', 'molant', 'andersk', 'javan', 'Lucas Pugliesi', 'babanesma', 'adam-lynch', 'magicae', 'sbspk', 'orderedlist', 'sotayamashita', 'sindresorhus', 'simonecattaneo91', 'ShiningRay', 'seppestas', 'rzhao271', 'rajatsingla28', 'Nirmal4G', 'stevenjoezhang', 'MaxGraey', 'princejwesley', 'RacioN', 'RikTheunis', 'PierBover', 'petrfelzmann', 'Rus Maxham', 'sneakypete81', 'rprichard', 'Hugo Mano', 'Vehemos', 'Gaserd', 'Simon Madine', 'Raul6469', 'ZacWalk', 'ChALkeR', 'popod', 'joeydlee95', 'fscherwi', 'deed02392', 'batjko', 'adammeyer', 'orzFly', 'itsananderson', 'Vj3k0', 'Kthulu120', 'TonyWuu', 'timruffles', 'theojulienne', 'suyash', 'nekolab', 'hankbao', 'GregMefford', 'ggamel', 'fritx', 'fab1an', 'ericbrumer', 'Emmanuel Kimmerlin', 'didrocks', 'watilde', 'clavin', 'BlackHole1', 'Arif Çakıroğlu', 'ArekSredzki', 'antoinepairet', 'Ahmed Abdalla', 'avdg', 'zombieleet', 'PalmerAL', 'omern1', 'Mingling94', 'matttbe', 'matt-way', 'mattdesl', 'matiasinsaurralde', 'LuisHsu', 'Lucidogen Media', 'IonicaBizau', 'codefoster', 'jameshfisher', 'duswlsgur', 'j5a', 'jpiepkow', 'kevinhartman', 'kevinmartin', 'LasseJacobs', 'rahatarmanahmed', 'roramirez', 'SAKATA Sinji', 'SamvelRaja', 'saghul', 'Sergey Bekrin', 'sitdh', 'niedzielski', 'suryast', 'inukshuk', 'takashi', 'teiles', 'thorbenegberts', 'timfish', 'twolfson', 'htk3', '22222',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Brent Ertz', 'brunoqueiros', 'Charles Kerr', 'soh1988', 'ColinEberhardt', 'craigshoemaker', 'clebeaupin', 'quicksnap', 'Daniel Ma', 'Mossop', 'destan', 'Rokt33r', 'sdj01044', 'dorian', 'dougnukem', 'cjld', 'Sarruby', 'zephyrzoom', 'aaronang', 'Godoy', 'alanionita', 'fierroformo', 'alexwarren', 'Prinzhorn', 'alexandrubau', '97amarnathk', 'ldehai', 'Anrock', 'xxczaki', 'primalmotion', 'darwin', 'astoilkov', 'austinmoore-', 'Brad Metcalf', 'bkeepers', 'Jan Wiemers', 'jpoon', 'wearhere', 'Jerry Wu', 'jesusD', 'ArtskydJ', 'magne4000', 'keerthi16', 'kramerc', 'kristofkalocsai', 'LaurentLeVan', 'theLMGN', 'torn4dom4n', 'schneiderl', 'lgalabru', 'isnotgood', 'lukeadams', 'Marc-Aurèle DARCHE', 'MrSurly', 'Ethan-Arrowood', 'everblut', 'feross', 'Florian', 'Florian Hämmerle', 'Giacomo Furlan', 'GitHubPang', 'JamesKyburz', 'jaimecbernardo', 'apoco', 'jacobq', 'jack-teng1', 'husayn', 'Hum4n01d', 'HariJ', 'Harendra Singh', 'HR',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arturts',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zeeker999', 'thedaniel', 'hanzhao', 'Matt Karl', 'CyberKatze', 'Rafael Guimarães', 'Ted Kim', 'tommoor', 'toonborgers', 'vhashimotoo', 'xaviergonz', 'vsemozhetbyt', 'christoth', 'szTheory', '林伟强', 'ppontes', 'Menci', 'Daniel Pereira', 'robinwassen', 'levrik', 'Chandan Rai', 'bcomnes', 'BobCochran', 'ivmirx', 'leftstick', 'zachflower', 'joaomoreno', 'bpasero', 'SeriousM', 'ragingwind', 'kstar0714', 'nekuz0r', 'jwheare', 'gioggio', 'Michael Köppl', 'rsezille', 'renatoalencar', 'him2him2', 'dittos', 'the-ress', 'simurai', 'xland', 'dale347', 'bridiver', 'bitdisaster', 'xfq', 'Wliu', 'develar', 'vially', 'thomasjo', 'stewartlord', '大和屋 貴仁', 'wujingke', 'tejaspathak', 'psh0628-eng', 'scycbx', 'samueleaton', 'kirkouimet', 'haadcode', 'webpushers', 'bnb', 'indutny', 'Dane Springmeyer', 'Spacetech', 'danburzo', 'bsclifton', 'molant', 'andersk', 'javan', 'Lucas Pugliesi', 'babanesma', 'adam-lynch', 'magicae', 'sbspk', 'orderedlist', 'sotayamashita', 'sindresorhus', 'simonecattaneo91', 'ShiningRay', 'seppestas', 'rzhao271', 'rajatsingla28', 'Nirmal4G', 'stevenjoezhang', 'MaxGraey', 'princejwesley', 'RacioN', 'RikTheunis', 'PierBover', 'petrfelzmann', 'Rus Maxham', 'sneakypete81', 'rprichard', 'Hugo Mano', 'Vehemos', 'Gaserd', 'Simon Madine', 'Raul6469', 'ZacWalk', 'ChALkeR', 'popod', 'joeydlee95', 'fscherwi', 'deed02392', 'batjko', 'adammeyer', 'orzFly', 'itsananderson', 'Vj3k0', 'Kthulu120', 'TonyWuu', 'timruffles', 'theojulienne', 'suyash', 'nekolab', 'hankbao', 'GregMefford', 'ggamel', 'fritx', 'fab1an', 'ericbrumer', 'Emmanuel Kimmerlin', 'didrocks', 'watilde', 'clavin', 'BlackHole1', 'Arif Çakıroğlu', 'ArekSredzki', 'antoinepairet', 'Ahmed Abdalla', 'avdg', 'zombieleet', 'PalmerAL', 'omern1', 'Mingling94', 'matttbe', 'matt-way', 'mattdesl', 'matiasinsaurralde', 'LuisHsu', 'Lucidogen Media', 'IonicaBizau', 'codefoster', 'jameshfisher', 'duswlsgur', 'j5a', 'jpiepkow', 'kevinhartman', 'kevinmartin', 'LasseJacobs', 'rahatarmanahmed', 'roramirez', 'SAKATA Sinji', 'SamvelRaja', 'saghul', 'Sergey Bekrin', 'sitdh', 'niedzielski', 'suryast', 'inukshuk', 'takashi', 'teiles', 'thorbenegberts', 'timfish', 'twolfson', 'htk3', '22222',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Brent Ertz', 'brunoqueiros', 'Charles Kerr', 'soh1988', 'ColinEberhardt', 'craigshoemaker', 'clebeaupin', 'quicksnap', 'Daniel Ma', 'Mossop', 'destan', 'Rokt33r', 'sdj01044', 'dorian', 'dougnukem', 'cjld', 'Sarruby', 'zephyrzoom', 'aaronang', 'Godoy', 'alanionita', 'fierroformo', 'alexwarren', 'Prinzhorn', 'alexandrubau', '97amarnathk', 'ldehai', 'Anrock', 'xxczaki', 'primalmotion', 'darwin', 'astoilkov', 'austinmoore-', 'Brad Metcalf', 'bkeepers', 'Jan Wiemers', 'jpoon', 'wearhere', 'Jerry Wu', 'jesusD', 'ArtskydJ', 'magne4000', 'keerthi16', 'kramerc', 'kristofkalocsai', 'LaurentLeVan', 'theLMGN', 'torn4dom4n', 'schneiderl', 'lgalabru', 'isnotgood', 'lukeadams', 'Marc-Aurèle DARCHE', 'MrSurly', 'Ethan-Arrowood', 'everblut', 'feross', 'Florian', 'Florian Hämmerle', 'Giacomo Furlan', 'GitHubPang', 'JamesKyburz', 'jaimecbernardo', 'apoco', 'jacobq', 'jack-teng1', 'husayn', 'Hum4n01d', 'HariJ', 'Harendra Singh', 'HR',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office:string-value="0">
            <text:p>0</text:p>
          </table:table-cell>
          <table:table-cell office:value-type="string" office:string-value="0">
            <text:p>0</text:p>
          </table:table-cell>
          <table:table-cell office:value-type="string" office:string-value="https://github.com/unfoldingWord-box3/electron">
            <text:p>https://github.com/unfoldingWord-box3/electron</text:p>
          </table:table-cell>
          <table:table-cell office:value-type="string" office:string-value="2023-01-28T00:48:49Z">
            <text:p>2023-01-28T00:48:49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electronite">
            <text:p>electronite</text:p>
          </table:table-cell>
          <table:table-cell office:value-type="string" office:string-value="unfoldingWord">
            <text:p>unfoldingWord</text:p>
          </table:table-cell>
          <table:table-cell office:value-type="string" office:string-value="C++">
            <text:p>C++</text:p>
          </table:table-cell>
          <table:table-cell office:value-type="string" office:string-value="False">
            <text:p>False</text:p>
          </table:table-cell>
          <table:table-cell office:value-type="string" office:string-value="True">
            <text:p>True</text:p>
          </table:table-cell>
          <table:table-cell office:value-type="string" office:string-value="2026-01-22T20:49:18Z">
            <text:p>2026-01-22T20:49:18Z</text:p>
          </table:table-cell>
          <table:table-cell office:value-type="string" office:string-value="2022-12-08T15:12:19Z">
            <text:p>2022-12-08T15:12:19Z</text:p>
          </table:table-cell>
          <table:table-cell office:value-type="string" office:string-value="2026-01-08T18:30:11Z">
            <text:p>2026-01-08T18:30:11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electron">
            <text:p>electron/electron</text:p>
          </table:table-cell>
          <table:table-cell office:value-type="string" office:string-value="['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arturts',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vsemozhetbyt', 'toonborgers', 'vhashimotoo', 'christoth', 'xland', 'simurai', 'szTheory', '林伟强', 'robinwassen', 'Menci', 'joaomoreno', 'levrik', 'ivmirx', 'kstar0714', 'ragingwind', 'leftstick', 'bpasero', 'renatoalencar', 'rsezille', 'Michael Köppl', 'jwheare', 'him2him2', 'nekuz0r', 'dittos', 'gioggio', 'Daniel Pereira', 'Chandan Rai', 'the-ress', 'dale347', 'bridiver', 'bitdisaster', 'xfq', 'Wliu', 'thomasjo', 'bcomnes', 'BobCochran', 'SeriousM', 'develar', 'wujingke', 'tejaspathak', 'psh0628-eng', '大和屋 貴仁', 'scycbx', 'kirkouimet', 'stewartlord', 'samueleaton', 'haadcode', 'webpushers', 'itsananderson', 'bnb', 'andersk', 'javan', 'babanesma', 'Dane Springmeyer', 'Lucas Pugliesi', 'Spacetech', 'molant', 'bsclifton', 'danburzo', 'adam-lynch', 'magicae', 'MaxGraey', 'stevenjoezhang', 'Nirmal4G', 'rajatsingla28', 'seppestas', 'ShiningRay', 'simonecattaneo91', 'sindresorhus', 'sotayamashita', 'orderedlist', 'sbspk', 'rprichard', 'Vehemos', 'Gaserd', 'Simon Madine', 'nekolab', 'Rus Maxham', 'RikTheunis', 'RacioN', 'princejwesley', 'PierBover', 'petrfelzmann', 'sneakypete81', 'PalmerAL', 'ChALkeR', 't57ser', 'popod', 'marekharanczyk', 'joeydlee95', 'fscherwi', 'fengmk2', 'deed02392', 'batjko', 'adammeyer', 'zachflower', 'orzFly', 'Vj3k0', 'Kthulu120', 'TonyWuu', 'timruffles', 'theojulienne', 'suyash', 'Maeda-Naoki', 'IonicaBizau', 'Hugo Mano', 'hankbao', 'GregMefford', 'ggamel', 'fritx', 'fab1an', 'ericbrumer', 'Emmanuel Kimmerlin', 'didrocks', 'watilde', 'Arif Çakıroğlu', 'ArekSredzki', 'antoinepairet', 'avdg', 'Ahmed Abdalla', 'zombieleet', 'omern1', 'Mingling94', 'matttbe', 'matt-way', 'mattdesl', 'matiasinsaurralde', 'LuisHsu', 'Lucidogen Media', 'LasseJacobs', 'kevinmartin', 'kevinhartman', 'jpiepkow', 'j5a', 'duswlsgur', 'jameshfisher', 'codefoster', 'jaimecbernardo', 'suryast', 'niedzielski', 'sitdh', 'Sergey Bekrin', 'saghul', 'SamvelRaja', 'SAKATA Sinji', 'roramirez', 'mateussilva92', 'inukshuk', 'takashi', 'teiles', 'thorbenegberts', 'timfish', 'twolfson', 'tonyferrell', 'tristan957', 'Tse Kit Yam', 'MauricioFauth', 'ymmuse', 'maxbrunsfeld', 'kaylanm', 'mifi', 'mitchchn', 'moshfeu', 'salomvary', 'tensor5', 'OctoHuman', 'teleclimber', 'paulatbipsync', 'pavelfeldman', 'philfreo', 'p-jackson', 'prayagverma', 'rafaelstz', 'rahatarmanahmed', 'TyanNN', 'htk3', 'huangruichang', 'jaanus', 'jf_jiang', 'jinhai.wang', 'kaylie', 'liuderchi', 'longbotao', 'marcin-prochownik', 'mzajaczkowski', 'nixxquality', 'patr0nus', 'paulinaika', 'renmu123', 'robbix1206', 'stephen9357', 'wit543', 'VReality64', 'Victor', 'Vivek Patel', 'Vladimir', 'Wayne Loopy', 'Weiqiang Lin', 'Yudu Ban', 'Zac Walker', 'Zachary Flower', 'Zhuo Zhang', 'agustin.wang', 'arifcakiroglu', 'as3boyan', 'cesine', 'deenjun', 'foo bar code', 'frankenbot', '22222', 'Brent Ertz', 'brunoqueiros', 'Charles Kerr', 'soh1988', 'ColinEberhardt', 'craigshoemaker', 'clebeaupin', 'quicksnap', 'Daniel Ma', 'Mossop', 'destan', 'Rokt33r', 'sdj01044', 'dorian', 'dougnukem', 'cjld', 'Sarruby', 'zephyrzoom', 'aaronang', 'Godoy', 'alanionita', 'fierroformo', 'alexwarren', 'Prinzhorn', 'alexandrubau', '97amarnathk', 'ldehai', 'Anrock', 'xxczaki', 'primalmotion', 'darwin', 'astoilkov', 'austinmoore-', 'Brad Metcalf', 'bkeepers', 'MrSurly', 'jpoon', 'wearhere', 'Jerry Wu', 'jesusD', 'ArtskydJ', 'jsoref', 'magne4000', 'keerthi16', 'kramerc', 'kristofkalocsai', 'LaurentLeVan', 'theLMGN', 'torn4dom4n', 'schneiderl', 'lgalabru', 'isnotgood', 'lukeadams', 'Marc-Aurèle DARCHE', 'Ethan-Arrowood', 'everblut', 'feross', 'Florian', 'Florian Hämmerle', 'Giacomo Furlan', 'GitHubPang', 'HR', 'Jan Wiemers', 'JamesKyburz', 'apoco', 'jacobq', 'jack-teng1', 'husayn', 'Hum4n01d', 'twitharshil', 'HariJ', 'Harendra Singh',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arturts',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vsemozhetbyt', 'toonborgers', 'vhashimotoo', 'christoth', 'xland', 'simurai', 'szTheory', '林伟强', 'robinwassen', 'Menci', 'joaomoreno', 'levrik', 'ivmirx', 'kstar0714', 'ragingwind', 'leftstick', 'bpasero', 'renatoalencar', 'rsezille', 'Michael Köppl', 'jwheare', 'him2him2', 'nekuz0r', 'dittos', 'gioggio', 'Daniel Pereira', 'Chandan Rai', 'the-ress', 'dale347', 'bridiver', 'bitdisaster', 'xfq', 'Wliu', 'thomasjo', 'bcomnes', 'BobCochran', 'SeriousM', 'develar', 'wujingke', 'tejaspathak', 'psh0628-eng', '大和屋 貴仁', 'scycbx', 'kirkouimet', 'stewartlord', 'samueleaton', 'haadcode', 'webpushers', 'itsananderson', 'bnb', 'andersk', 'javan', 'babanesma', 'Dane Springmeyer', 'Lucas Pugliesi', 'Spacetech', 'molant', 'bsclifton', 'danburzo', 'adam-lynch', 'magicae', 'MaxGraey', 'stevenjoezhang', 'Nirmal4G', 'rajatsingla28', 'seppestas', 'ShiningRay', 'simonecattaneo91', 'sindresorhus', 'sotayamashita', 'orderedlist', 'sbspk', 'rprichard', 'Vehemos', 'Gaserd', 'Simon Madine', 'nekolab', 'Rus Maxham', 'RikTheunis', 'RacioN', 'princejwesley', 'PierBover', 'petrfelzmann', 'sneakypete81', 'PalmerAL', 'ChALkeR', 't57ser', 'popod', 'marekharanczyk', 'joeydlee95', 'fscherwi', 'fengmk2', 'deed02392', 'batjko', 'adammeyer', 'zachflower', 'orzFly', 'Vj3k0', 'Kthulu120', 'TonyWuu', 'timruffles', 'theojulienne', 'suyash', 'Maeda-Naoki', 'IonicaBizau', 'Hugo Mano', 'hankbao', 'GregMefford', 'ggamel', 'fritx', 'fab1an', 'ericbrumer', 'Emmanuel Kimmerlin', 'didrocks', 'watilde', 'Arif Çakıroğlu', 'ArekSredzki', 'antoinepairet', 'avdg', 'Ahmed Abdalla', 'zombieleet', 'omern1', 'Mingling94', 'matttbe', 'matt-way', 'mattdesl', 'matiasinsaurralde', 'LuisHsu', 'Lucidogen Media', 'LasseJacobs', 'kevinmartin', 'kevinhartman', 'jpiepkow', 'j5a', 'duswlsgur', 'jameshfisher', 'codefoster', 'jaimecbernardo', 'suryast', 'niedzielski', 'sitdh', 'Sergey Bekrin', 'saghul', 'SamvelRaja', 'SAKATA Sinji', 'roramirez', 'mateussilva92', 'inukshuk', 'takashi', 'teiles', 'thorbenegberts', 'timfish', 'twolfson', 'tonyferrell', 'tristan957', 'Tse Kit Yam', 'MauricioFauth', 'ymmuse', 'maxbrunsfeld', 'kaylanm', 'mifi', 'mitchchn', 'moshfeu', 'salomvary', 'tensor5', 'OctoHuman', 'teleclimber', 'paulatbipsync', 'pavelfeldman', 'philfreo', 'p-jackson', 'prayagverma', 'rafaelstz', 'rahatarmanahmed', 'TyanNN', 'htk3', 'huangruichang', 'jaanus', 'jf_jiang', 'jinhai.wang', 'kaylie', 'liuderchi', 'longbotao', 'marcin-prochownik', 'mzajaczkowski', 'nixxquality', 'patr0nus', 'paulinaika', 'renmu123', 'robbix1206', 'stephen9357', 'wit543', 'VReality64', 'Victor', 'Vivek Patel', 'Vladimir', 'Wayne Loopy', 'Weiqiang Lin', 'Yudu Ban', 'Zac Walker', 'Zachary Flower', 'Zhuo Zhang', 'agustin.wang', 'arifcakiroglu', 'as3boyan', 'cesine', 'deenjun', 'foo bar code', 'frankenbot', '22222', 'Brent Ertz', 'brunoqueiros', 'Charles Kerr', 'soh1988', 'ColinEberhardt', 'craigshoemaker', 'clebeaupin', 'quicksnap', 'Daniel Ma', 'Mossop', 'destan', 'Rokt33r', 'sdj01044', 'dorian', 'dougnukem', 'cjld', 'Sarruby', 'zephyrzoom', 'aaronang', 'Godoy', 'alanionita', 'fierroformo', 'alexwarren', 'Prinzhorn', 'alexandrubau', '97amarnathk', 'ldehai', 'Anrock', 'xxczaki', 'primalmotion', 'darwin', 'astoilkov', 'austinmoore-', 'Brad Metcalf', 'bkeepers', 'MrSurly', 'jpoon', 'wearhere', 'Jerry Wu', 'jesusD', 'ArtskydJ', 'jsoref', 'magne4000', 'keerthi16', 'kramerc', 'kristofkalocsai', 'LaurentLeVan', 'theLMGN', 'torn4dom4n', 'schneiderl', 'lgalabru', 'isnotgood', 'lukeadams', 'Marc-Aurèle DARCHE', 'Ethan-Arrowood', 'everblut', 'feross', 'Florian', 'Florian Hämmerle', 'Giacomo Furlan', 'GitHubPang', 'HR', 'Jan Wiemers', 'JamesKyburz', 'apoco', 'jacobq', 'jack-teng1', 'husayn', 'Hum4n01d', 'twitharshil', 'HariJ', 'Harendra Singh',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office:string-value="40">
            <text:p>40</text:p>
          </table:table-cell>
          <table:table-cell office:value-type="string" office:string-value="20121">
            <text:p>20121</text:p>
          </table:table-cell>
          <table:table-cell office:value-type="string" office:string-value="https://github.com/unfoldingWord/electronite">
            <text:p>https://github.com/unfoldingWord/electronite</text:p>
          </table:table-cell>
          <table:table-cell office:value-type="string" office:string-value="2026-02-15T19:31:44Z">
            <text:p>2026-02-15T19:31: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electronite-builder">
            <text:p>electronite-builder</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09-17T23:39:30Z">
            <text:p>2023-09-17T23:39:30Z</text:p>
          </table:table-cell>
          <table:table-cell office:value-type="string" office:string-value="2023-09-13T22:24:42Z">
            <text:p>2023-09-13T22:24: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userland/electron-builder">
            <text:p>electron-userland/electron-builder</text:p>
          </table:table-cell>
          <table:table-cell office:value-type="string" office:string-value="['develar', 'mmaietta', 'stefanjudis', 'renovate[bot]', 'github-actions[bot]', 'Stefan Judis', 'demetris-manikas', 'MariaDima', 'indutny-signal', 'lutzroeder', 'codeudan', 'Justin Chase', 'Mike Maietta', 'xseignard', 'mkaz', 'wojtkowiak', 'devinbinnie', 'ezekg', 'adam-lynch', 'Noah Andrews', 'quanglam2807', 'csett86', 'panther7', 'ffflorian', 'greenkeeperio-bot', 'gaodeng', 'Vincent Quagliaro', 'Nokel81', 't3chguy', 'jviotti', 'filfreire', 'Alex Van Camp', 'cawa-93', 'radibit', 'zhaoterryy', 'indutny', 'nicholaslee119', 'baparham', 'pronebird', 'popod', 'mastergberry',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AdrianoFerrari', 'p120ph37', 'mmckegg', 'mook-as', 'Markus Müller',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AllSeeingEye', 'seeekr', 'dlon', 'adelphes', 'danielweck', 'danielnieto', 'DanielMcAssey', 'dkarski', 'ghost1face', 'Daniel', 'danseagrave', 'feugy', 'Frugality', 'regentcid434', 'ciffelia', 'cwillisf', 'clee-ai', 'kitsune7', 'christophpre', 'c960657', 'ckotzbauer', 'christianbundy', 'Chris Ramirez', 'cjp256', 'GCKPaulYang', 'FredrikNoren', 'fredrik-lindeborg', 'fonsleenaars', 'firede', 'felipecrs', 'fangpenlin', 'Evgeny Barabanov', 'mahnunchik', 'taratatach', 'etiktin', 'EosFoundry', 'migliorinie', 'McPo', 'emily-malec-brown', 'embbnux', 'elvisvoer', 'hyldmo', 'Egorikhin', 'fyockm', 'agalwood', 'douglasduteil', 'Doccrazy', 'BusinessDuck',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kidonng', 'qevni', 'KenCorma', 'jeremco', 'jupp0r', 'Julusian', 'Julian Hille', 'oNaiPs', 'JoshRiser', 'grovesNL', 'worldjoe', 'Joon Kyoung', 'jonzlin95', 'JohnyCilohokla', 'jwr1', 'jgresham', 'johnnyopao', 'jooohhn', 'JohnTendik', 'JSzaszvari', 'John Muhl', 'joel-bentley', 'Joakim Reinert', 'jbreckmckye', 'Mgonand', '3v1n0', 'lidel', 'marceloavf', 'ml1nk', 'makinori', 'richtlu', 'erikrz', 'RoikkuTo', 'fronterior', 'Losses', 'loremattei', 'logidelic', 'faern', 'rhysd', 'lbestftr', 'Leo Arias', 'Kyle L. Huff', 'kraenhansen', 'kris7t', 'Korbs', 'Koppel-Zhou', 'KishanBagaria', 'kiruh', 'obra', 'araujoigor', 'onucsecu2', 'Ian Miller', 'IKukhta', 'judge2020', 'hueyyeng', 'lwintermelon', 'hychen', 'HppZ', 'BurningEnlightenment', 'heldr', 'nekator', 'hleitzell', 'hrueger', 'ha-D', 'Megajin', 'pergy', 'gniezen', 'karaggeorge', 'geovie', 'GaryCaldwell', 'G-Rath', 'GabrielNSD', 'gbodeen', 'jessep', 'jeremyspiegel', 'cjeonguk', 'jely2002', 'Evoks', 'jeanfbrito', 'avoidwork', 'jasonhinkle', 'jkroepke', 'janbrasna', 'JamieRuderman', 'jwheare', 'jlongster', 'JamesCullum', 'jfix', 'v4', 'Jai-JAP', 'jtbandes', 'jacobq', 'jack-arms', 'jryans', 'I-Otsuki', 'ki0ki0', 'Igor-Techsee']">
            <text:p>['develar', 'mmaietta', 'stefanjudis', 'renovate[bot]', 'github-actions[bot]', 'Stefan Judis', 'demetris-manikas', 'MariaDima', 'indutny-signal', 'lutzroeder', 'codeudan', 'Justin Chase', 'Mike Maietta', 'xseignard', 'mkaz', 'wojtkowiak', 'devinbinnie', 'ezekg', 'adam-lynch', 'Noah Andrews', 'quanglam2807', 'csett86', 'panther7', 'ffflorian', 'greenkeeperio-bot', 'gaodeng', 'Vincent Quagliaro', 'Nokel81', 't3chguy', 'jviotti', 'filfreire', 'Alex Van Camp', 'cawa-93', 'radibit', 'zhaoterryy', 'indutny', 'nicholaslee119', 'baparham', 'pronebird', 'popod', 'mastergberry',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AdrianoFerrari', 'p120ph37', 'mmckegg', 'mook-as', 'Markus Müller',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AllSeeingEye', 'seeekr', 'dlon', 'adelphes', 'danielweck', 'danielnieto', 'DanielMcAssey', 'dkarski', 'ghost1face', 'Daniel', 'danseagrave', 'feugy', 'Frugality', 'regentcid434', 'ciffelia', 'cwillisf', 'clee-ai', 'kitsune7', 'christophpre', 'c960657', 'ckotzbauer', 'christianbundy', 'Chris Ramirez', 'cjp256', 'GCKPaulYang', 'FredrikNoren', 'fredrik-lindeborg', 'fonsleenaars', 'firede', 'felipecrs', 'fangpenlin', 'Evgeny Barabanov', 'mahnunchik', 'taratatach', 'etiktin', 'EosFoundry', 'migliorinie', 'McPo', 'emily-malec-brown', 'embbnux', 'elvisvoer', 'hyldmo', 'Egorikhin', 'fyockm', 'agalwood', 'douglasduteil', 'Doccrazy', 'BusinessDuck',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kidonng', 'qevni', 'KenCorma', 'jeremco', 'jupp0r', 'Julusian', 'Julian Hille', 'oNaiPs', 'JoshRiser', 'grovesNL', 'worldjoe', 'Joon Kyoung', 'jonzlin95', 'JohnyCilohokla', 'jwr1', 'jgresham', 'johnnyopao', 'jooohhn', 'JohnTendik', 'JSzaszvari', 'John Muhl', 'joel-bentley', 'Joakim Reinert', 'jbreckmckye', 'Mgonand', '3v1n0', 'lidel', 'marceloavf', 'ml1nk', 'makinori', 'richtlu', 'erikrz', 'RoikkuTo', 'fronterior', 'Losses', 'loremattei', 'logidelic', 'faern', 'rhysd', 'lbestftr', 'Leo Arias', 'Kyle L. Huff', 'kraenhansen', 'kris7t', 'Korbs', 'Koppel-Zhou', 'KishanBagaria', 'kiruh', 'obra', 'araujoigor', 'onucsecu2', 'Ian Miller', 'IKukhta', 'judge2020', 'hueyyeng', 'lwintermelon', 'hychen', 'HppZ', 'BurningEnlightenment', 'heldr', 'nekator', 'hleitzell', 'hrueger', 'ha-D', 'Megajin', 'pergy', 'gniezen', 'karaggeorge', 'geovie', 'GaryCaldwell', 'G-Rath', 'GabrielNSD', 'gbodeen', 'jessep', 'jeremyspiegel', 'cjeonguk', 'jely2002', 'Evoks', 'jeanfbrito', 'avoidwork', 'jasonhinkle', 'jkroepke', 'janbrasna', 'JamieRuderman', 'jwheare', 'jlongster', 'JamesCullum', 'jfix', 'v4', 'Jai-JAP', 'jtbandes', 'jacobq', 'jack-arms', 'jryans', 'I-Otsuki', 'ki0ki0', 'Igor-Techsee']</text:p>
          </table:table-cell>
          <table:table-cell office:value-type="string" office:string-value="0">
            <text:p>0</text:p>
          </table:table-cell>
          <table:table-cell office:value-type="string" office:string-value="0">
            <text:p>0</text:p>
          </table:table-cell>
          <table:table-cell office:value-type="string" office:string-value="https://github.com/unfoldingWord-dev/electronite-builder">
            <text:p>https://github.com/unfoldingWord-dev/electronite-builder</text:p>
          </table:table-cell>
          <table:table-cell office:value-type="string" office:string-value="2023-09-18T17:12:15Z">
            <text:p>2023-09-18T17:12:15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electronite-forge">
            <text:p>electronite-forg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10-09T14:20:00Z">
            <text:p>2023-10-09T14:20:00Z</text:p>
          </table:table-cell>
          <table:table-cell office:value-type="string" office:string-value="2023-02-21T19:17:58Z">
            <text:p>2023-02-21T19:17: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forge">
            <text:p>electron/forge</text:p>
          </table:table-cell>
          <table:table-cell office:value-type="string" office:string-value="['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office:string-value="0">
            <text:p>0</text:p>
          </table:table-cell>
          <table:table-cell office:value-type="string" office:string-value="0">
            <text:p>0</text:p>
          </table:table-cell>
          <table:table-cell office:value-type="string" office:string-value="https://github.com/unfoldingWord/electronite-forge">
            <text:p>https://github.com/unfoldingWord/electronite-forge</text:p>
          </table:table-cell>
          <table:table-cell office:value-type="string" office:string-value="2023-02-21T17:18:35Z">
            <text:p>2023-02-21T17:18:35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electronite-packager">
            <text:p>electronite-packag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10-09T13:47:10Z">
            <text:p>2023-10-09T13:47:10Z</text:p>
          </table:table-cell>
          <table:table-cell office:value-type="string" office:string-value="2020-03-23T11:56:26Z">
            <text:p>2020-03-23T11:56:2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lectron-packager">
            <text:p>electron-pack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ckybars/atom-shell-packager', 'unfoldingWord/gateway-edit', 'Proskomma/proskomma-legacy-projects', 'gbin-org/alignment-editor-rcl-poc', 'unfoldingWord/translationCore', 'mannycolon/electronite-poc-app']">
            <text:p>['rockybars/atom-shell-packager', 'unfoldingWord/gateway-edit', 'Proskomma/proskomma-legacy-projects', 'gbin-org/alignment-editor-rcl-poc', 'unfoldingWord/translationCore', 'mannycolon/electronite-poc-app']</text:p>
          </table:table-cell>
          <table:table-cell office:value-type="string" office:string-value="['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office:string-value="0">
            <text:p>0</text:p>
          </table:table-cell>
          <table:table-cell office:value-type="string" office:string-value="0">
            <text:p>0</text:p>
          </table:table-cell>
          <table:table-cell office:value-type="string" office:string-value="https://github.com/unfoldingWord-dev/electronite-packager">
            <text:p>https://github.com/unfoldingWord-dev/electronite-packager</text:p>
          </table:table-cell>
          <table:table-cell office:value-type="string" office:string-value="2023-09-18T17:18:06Z">
            <text:p>2023-09-18T17:18:0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etherpad-lite">
            <text:p>etherpad-lit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1-09-23T18:20:05Z">
            <text:p>2011-09-23T18:20:05Z</text:p>
          </table:table-cell>
          <table:table-cell office:value-type="string" office:string-value="2011-09-02T22:45:35Z">
            <text:p>2011-09-02T22:45: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therpad-lite">
            <text:p>etherpad-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er/etherpad">
            <text:p>ether/etherpad</text:p>
          </table:table-cell>
          <table:table-cell office:value-type="string" office:string-value="['Pita', 'JohnMcLear', 'Robin Buse', 'Robin', 'hanspinckaers', 'Lukas Martini', 'adrianheine', 'garrett', 'Patrick Pfeiffer', 'Randy', 'erlendfh', 'chapel', 'Pita Poison', 'root', 'snarkyMcSnark']">
            <text:p>['Pita', 'JohnMcLear', 'Robin Buse', 'Robin', 'hanspinckaers', 'Lukas Martini', 'adrianheine', 'garrett', 'Patrick Pfeiffer', 'Randy', 'erlendfh', 'chapel', 'Pita Poison', 'root', 'snarkyMcSnark']</text:p>
          </table:table-cell>
          <table:table-cell office:value-type="string" office:string-value="0">
            <text:p>0</text:p>
          </table:table-cell>
          <table:table-cell office:value-type="string" office:string-value="0">
            <text:p>0</text:p>
          </table:table-cell>
          <table:table-cell office:value-type="string" office:string-value="https://github.com/unfoldingWord-dev/etherpad-lite">
            <text:p>https://github.com/unfoldingWord-dev/etherpad-lite</text:p>
          </table:table-cell>
          <table:table-cell office:value-type="string" office:string-value="2023-01-28T16:19:06Z">
            <text:p>2023-01-28T16:19:0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findr">
            <text:p>find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findr">
            <text:p>find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findr/@findr/mui">
            <text:p>findr/@findr/mu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findr/mui">
            <text:p>@findr/mu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findr/@findr/perf">
            <text:p>findr/@findr/perf</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findr/perf">
            <text:p>@findr/perf</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findr/@findr/react">
            <text:p>findr/@findr/reac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findr/react">
            <text:p>@findr/rea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findr/@findr/text">
            <text:p>findr/@findr/tex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findr/text">
            <text:p>@findr/tex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flask-github-webhook">
            <text:p>flask-github-webhook</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6-04-01T16:14:45Z">
            <text:p>2016-04-01T16:14:45Z</text:p>
          </table:table-cell>
          <table:table-cell office:value-type="string" office:string-value="2016-04-01T16:14:44Z">
            <text:p>2016-04-01T16:14:4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azius/github-webhook-handler">
            <text:p>razius/github-webhook-handler</text:p>
          </table:table-cell>
          <table:table-cell office:value-type="string" office:string-value="['razius', 'kcirtapw', 'root', 'Jesse A. Griffin', 'blha303', 'richmahn']">
            <text:p>['razius', 'kcirtapw', 'root', 'Jesse A. Griffin', 'blha303',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flask-github-webhook">
            <text:p>https://github.com/unfoldingWord-dev/flask-github-webhook</text:p>
          </table:table-cell>
          <table:table-cell office:value-type="string" office:string-value="2016-04-01T16:14:45Z">
            <text:p>2016-04-01T16:14:45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go-gogs-client">
            <text:p>go-gogs-client</text:p>
          </table:table-cell>
          <table:table-cell office:value-type="string" office:string-value="unfoldingWord-dev">
            <text:p>unfoldingWord-dev</text:p>
          </table:table-cell>
          <table:table-cell office:value-type="string" office:string-value="Go">
            <text:p>Go</text:p>
          </table:table-cell>
          <table:table-cell office:value-type="string" office:string-value="False">
            <text:p>False</text:p>
          </table:table-cell>
          <table:table-cell office:value-type="string" office:string-value="True">
            <text:p>True</text:p>
          </table:table-cell>
          <table:table-cell office:value-type="string" office:string-value="2016-09-22T23:17:57Z">
            <text:p>2016-09-22T23:17:57Z</text:p>
          </table:table-cell>
          <table:table-cell office:value-type="string" office:string-value="2016-08-30T18:12:39Z">
            <text:p>2016-08-30T18:12: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go-gogs-client">
            <text:p>gogs/go-gogs-client</text:p>
          </table:table-cell>
          <table:table-cell office:value-type="string" office:string-value="['unknwon', 'Richard Mahn', 'lstahlman', 'sapk', 'roblabla', 'iwanbk', 'kmadel', 'richmahn', 'rubenv', 'xmonader', 'compressed', 'Josh Frye', 'bkcsoft']">
            <text:p>['unknwon', 'Richard Mahn', 'lstahlman', 'sapk', 'roblabla', 'iwanbk', 'kmadel', 'richmahn', 'rubenv', 'xmonader', 'compressed', 'Josh Frye', 'bkcsoft']</text:p>
          </table:table-cell>
          <table:table-cell office:value-type="string" office:string-value="0">
            <text:p>0</text:p>
          </table:table-cell>
          <table:table-cell office:value-type="string" office:string-value="0">
            <text:p>0</text:p>
          </table:table-cell>
          <table:table-cell office:value-type="string" office:string-value="https://github.com/unfoldingWord-dev/go-gogs-client">
            <text:p>https://github.com/unfoldingWord-dev/go-gogs-client</text:p>
          </table:table-cell>
          <table:table-cell office:value-type="string" office:string-value="2016-04-11T22:10:33Z">
            <text:p>2016-04-11T22:10:33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go-rc2sb">
            <text:p>go-rc2sb</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4-28T20:23:11Z">
            <text:p>2026-04-28T20:23:11Z</text:p>
          </table:table-cell>
          <table:table-cell office:value-type="string" office:string-value="2026-04-28T20:21:50Z">
            <text:p>2026-04-28T20:21:50Z</text:p>
          </table:table-cell>
          <table:table-cell office:value-type="string" office:string-value="2026-04-28T20:23:11Z">
            <text:p>2026-04-28T20:23:11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
            <text:p>unfoldingWord/dcs</text:p>
          </table:table-cell>
          <table:table-cell office:value-type="string" office:string-value="richmahn">
            <text:p>richmahn</text:p>
          </table:table-cell>
          <table:table-cell office:value-type="string" office:string-value="3">
            <text:p>3</text:p>
          </table:table-cell>
          <table:table-cell office:value-type="string" office:string-value="0">
            <text:p>0</text:p>
          </table:table-cell>
          <table:table-cell office:value-type="string" office:string-value="https://github.com/unfoldingWord/go-rc2sb">
            <text:p>https://github.com/unfoldingWord/go-rc2sb</text:p>
          </table:table-cell>
          <table:table-cell office:value-type="string" office:string-value="2026-04-28T20:21:57Z">
            <text:p>2026-04-28T20:21:57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hackathon-zpp">
            <text:p>hackathon-zpp</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18-02-10T01:07:00Z">
            <text:p>2018-02-10T01:07:00Z</text:p>
          </table:table-cell>
          <table:table-cell office:value-type="string" office:string-value="2018-02-10T01:07:00Z">
            <text:p>2018-02-10T01:07: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grecojs/nextjs-blogger">
            <text:p>tgrecojs/nextjs-blogger</text:p>
          </table:table-cell>
          <table:table-cell office:value-type="string" office:string-value="['Thomas Greco', 'tgrecojs', 'zacjones93']">
            <text:p>['Thomas Greco', 'tgrecojs', 'zacjones93']</text:p>
          </table:table-cell>
          <table:table-cell office:value-type="string" office:string-value="0">
            <text:p>0</text:p>
          </table:table-cell>
          <table:table-cell office:value-type="string" office:string-value="0">
            <text:p>0</text:p>
          </table:table-cell>
          <table:table-cell office:value-type="string" office:string-value="https://github.com/unfoldingWord-dev/hackathon-zpp">
            <text:p>https://github.com/unfoldingWord-dev/hackathon-zpp</text:p>
          </table:table-cell>
          <table:table-cell office:value-type="string" office:string-value="2025-12-03T19:19:04Z">
            <text:p>2025-12-03T19:19:0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HebrewLexicon">
            <text:p>HebrewLexicon</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0-01-03T16:24:58Z">
            <text:p>2020-01-03T16:24:58Z</text:p>
          </table:table-cell>
          <table:table-cell office:value-type="string" office:string-value="2020-01-03T16:24:57Z">
            <text:p>2020-01-03T16:24: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trongs-parse">
            <text:p>strongs-pars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HebrewLexicon">
            <text:p>PhotoNomad0/HebrewLexicon</text:p>
          </table:table-cell>
          <table:table-cell office:value-type="string" office:string-value="['joeldruark', 'DavidTroidl', 'dowens76', 'PhotoNomad0', 'scruffian', 'destatez', 'sinri']">
            <text:p>['joeldruark', 'DavidTroidl', 'dowens76', 'PhotoNomad0', 'scruffian', 'destatez', 'sinri']</text:p>
          </table:table-cell>
          <table:table-cell office:value-type="string" office:string-value="0">
            <text:p>0</text:p>
          </table:table-cell>
          <table:table-cell office:value-type="string" office:string-value="0">
            <text:p>0</text:p>
          </table:table-cell>
          <table:table-cell office:value-type="string" office:string-value="https://github.com/unfoldingWord-dev/HebrewLexicon">
            <text:p>https://github.com/unfoldingWord-dev/HebrewLexicon</text:p>
          </table:table-cell>
          <table:table-cell office:value-type="string" office:string-value="2020-01-03T16:25:13Z">
            <text:p>2020-01-03T16:25:13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Mobile-JWiki">
            <text:p>Mobile-JWiki</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True">
            <text:p>True</text:p>
          </table:table-cell>
          <table:table-cell office:value-type="string" office:string-value="2011-09-19T17:33:58Z">
            <text:p>2011-09-19T17:33:58Z</text:p>
          </table:table-cell>
          <table:table-cell office:value-type="string" office:string-value="2011-09-19T17:33:58Z">
            <text:p>2011-09-19T17:33: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wadholm/Mobile-JWiki">
            <text:p>rwadholm/Mobile-JWiki</text:p>
          </table:table-cell>
          <table:table-cell office:value-type="string" office:string-value="Bob Wadholm">
            <text:p>Bob Wadholm</text:p>
          </table:table-cell>
          <table:table-cell office:value-type="string" office:string-value="0">
            <text:p>0</text:p>
          </table:table-cell>
          <table:table-cell office:value-type="string" office:string-value="0">
            <text:p>0</text:p>
          </table:table-cell>
          <table:table-cell office:value-type="string" office:string-value="https://github.com/unfoldingWord-dev/Mobile-JWiki">
            <text:p>https://github.com/unfoldingWord-dev/Mobile-JWiki</text:p>
          </table:table-cell>
          <table:table-cell office:value-type="string" office:string-value="2023-01-28T16:19:06Z">
            <text:p>2023-01-28T16:19:0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node-door43-client">
            <text:p>node-door43-client</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08T17:04:23Z">
            <text:p>2022-12-08T17:04:23Z</text:p>
          </table:table-cell>
          <table:table-cell office:value-type="string" office:string-value="2019-11-06T17:32:07Z">
            <text:p>2019-11-06T17:32:07Z</text:p>
          </table:table-cell>
          <table:table-cell office:value-type="string" office:string-value="2019-11-06T17:30:48Z">
            <text:p>2019-11-06T17:30:48Z</text:p>
          </table:table-cell>
          <table:table-cell office:value-type="string" office:string-value="13">
            <text:p>13</text:p>
          </table:table-cell>
          <table:table-cell office:value-type="string" office:string-value="13">
            <text:p>13</text:p>
          </table:table-cell>
          <table:table-cell office:value-type="string" office:string-value="door43-client">
            <text:p>door43-client</text:p>
          </table:table-cell>
          <table:table-cell office:value-type="string" office:string-value="False">
            <text:p>False</text:p>
          </table:table-cell>
          <table:table-cell office:value-type="string" office:string-value="1385">
            <text:p>1385</text:p>
          </table:table-cell>
          <table:table-cell office:value-type="string" office:string-value="2019-11-06T17:33:42.928Z">
            <text:p>2019-11-06T17:33:42.928Z</text:p>
          </table:table-cell>
          <table:table-cell office:value-type="string" office:string-value="">
            <text:p/>
          </table:table-cell>
          <table:table-cell office:value-type="string" office:string-value="resource-container">
            <text:p>resource-container</text:p>
          </table:table-cell>
          <table:table-cell office:value-type="string" office:string-value="['Bible-Translation-Tools/BTT-Writer-Desktop', 'WycliffeAssociates/BTT_Writer_Resource_Updater', 'unfoldingWord-dev/ts-desktop']">
            <text:p>['Bible-Translation-Tools/BTT-Writer-Desktop', 'WycliffeAssociates/BTT_Writer_Resource_Updater', 'unfoldingWord-dev/ts-desktop']</text:p>
          </table:table-cell>
          <table:table-cell office:value-type="string" office:string-value="da1nerd">
            <text:p>da1nerd</text:p>
          </table:table-cell>
          <table:table-cell office:value-type="string" office:string-value="1">
            <text:p>1</text:p>
          </table:table-cell>
          <table:table-cell office:value-type="string" office:string-value="0">
            <text:p>0</text:p>
          </table:table-cell>
          <table:table-cell office:value-type="string" office:string-value="https://github.com/unfoldingWord-dev/node-door43-client">
            <text:p>https://github.com/unfoldingWord-dev/node-door43-client</text:p>
          </table:table-cell>
          <table:table-cell office:value-type="string" office:string-value="2019-11-06T17:32:34Z">
            <text:p>2019-11-06T17:32:3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1385 downloads).">
            <text:p>Repository has GitHub dependents or at least 1,000 npm downloads in the last year (1385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nototools">
            <text:p>noto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7-04-15T13:09:18Z">
            <text:p>2017-04-15T13:09:18Z</text:p>
          </table:table-cell>
          <table:table-cell office:value-type="string" office:string-value="2017-04-06T20:18:34Z">
            <text:p>2017-04-06T20:18: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tofonts/nototools">
            <text:p>notofonts/nototools</text:p>
          </table:table-cell>
          <table:table-cell office:value-type="string" office:string-value="['dougfelt', 'roozbehp', 'James Godfrey-Kittle', 'jamesgk', 'behdad', 'thaths', 'zjusbo', 'jungshik', 'Kanjilearner817', 'davelab6', 'adrientetar', 'moyogo', 'marekjez86', 'iverg', 'khaledhosny', 'm4rc1e', 'Marek Jeziorek', 'n7s', 'No Author']">
            <text:p>['dougfelt', 'roozbehp', 'James Godfrey-Kittle', 'jamesgk', 'behdad', 'thaths', 'zjusbo', 'jungshik', 'Kanjilearner817', 'davelab6', 'adrientetar', 'moyogo', 'marekjez86', 'iverg', 'khaledhosny', 'm4rc1e', 'Marek Jeziorek', 'n7s', 'No Author']</text:p>
          </table:table-cell>
          <table:table-cell office:value-type="string" office:string-value="0">
            <text:p>0</text:p>
          </table:table-cell>
          <table:table-cell office:value-type="string" office:string-value="0">
            <text:p>0</text:p>
          </table:table-cell>
          <table:table-cell office:value-type="string" office:string-value="https://github.com/unfoldingWord-dev/nototools">
            <text:p>https://github.com/unfoldingWord-dev/nototools</text:p>
          </table:table-cell>
          <table:table-cell office:value-type="string" office:string-value="2019-04-16T02:34:59Z">
            <text:p>2019-04-16T02:34:59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Mobile">
            <text:p>OBS-Mobil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7-29T21:22:13Z">
            <text:p>2012-07-29T21:22:13Z</text:p>
          </table:table-cell>
          <table:table-cell office:value-type="string" office:string-value="2012-07-29T21:21:55Z">
            <text:p>2012-07-29T21:21:55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negap/phonegap-start">
            <text:p>phonegap/phonegap-start</text:p>
          </table:table-cell>
          <table:table-cell office:value-type="string" office:string-value="['Bob Wadholm', 'alunny', 'ryanbetts', 'Andrew Lunny', 'Dan Silivestru', 'Dave Johnson']">
            <text:p>['Bob Wadholm', 'alunny', 'ryanbetts', 'Andrew Lunny', 'Dan Silivestru', 'Dave Johnson']</text:p>
          </table:table-cell>
          <table:table-cell office:value-type="string" office:string-value="0">
            <text:p>0</text:p>
          </table:table-cell>
          <table:table-cell office:value-type="string" office:string-value="0">
            <text:p>0</text:p>
          </table:table-cell>
          <table:table-cell office:value-type="string" office:string-value="https://github.com/unfoldingWord-dev/OBS-Mobile">
            <text:p>https://github.com/unfoldingWord-dev/OBS-Mobile</text:p>
          </table:table-cell>
          <table:table-cell office:value-type="string" office:string-value="2023-01-28T16:19:06Z">
            <text:p>2023-01-28T16:19:0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study">
            <text:p>obs-stud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4-06-25T11:20:36Z">
            <text:p>2024-06-25T11:20:36Z</text:p>
          </table:table-cell>
          <table:table-cell office:value-type="string" office:string-value="2024-06-20T09:34:16Z">
            <text:p>2024-06-20T09:34: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diomaspuentes/obs-study">
            <text:p>idiomaspuentes/obs-study</text:p>
          </table:table-cell>
          <table:table-cell office:value-type="string" office:string-value="['abelpz', 'eliaspinero', 'ilich valbuena', 'Jordani77', 'larsgson']">
            <text:p>['abelpz', 'eliaspinero', 'ilich valbuena', 'Jordani77', '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obs-study">
            <text:p>https://github.com/unfoldingWord-box3/obs-study</text:p>
          </table:table-cell>
          <table:table-cell office:value-type="string" office:string-value="2024-06-20T09:34:41Z">
            <text:p>2024-06-20T09:34:41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idian-headless-sync-docker">
            <text:p>obsidian-headless-sync-docker</text:p>
          </table:table-cell>
          <table:table-cell office:value-type="string" office:string-value="unfoldingWord">
            <text:p>unfoldingWord</text:p>
          </table:table-cell>
          <table:table-cell office:value-type="string" office:string-value="Dockerfile">
            <text:p>Dockerfile</text:p>
          </table:table-cell>
          <table:table-cell office:value-type="string" office:string-value="False">
            <text:p>False</text:p>
          </table:table-cell>
          <table:table-cell office:value-type="string" office:string-value="True">
            <text:p>True</text:p>
          </table:table-cell>
          <table:table-cell office:value-type="string" office:string-value="2026-05-11T13:22:56Z">
            <text:p>2026-05-11T13:22:56Z</text:p>
          </table:table-cell>
          <table:table-cell office:value-type="string" office:string-value="2026-05-11T13:22:54Z">
            <text:p>2026-05-11T13:22: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elphemur/obsidian-headless-sync-docker">
            <text:p>Belphemur/obsidian-headless-sync-docker</text:p>
          </table:table-cell>
          <table:table-cell office:value-type="string" office:string-value="['Copilot', 'crosbyh', 'yakob-aleksandrovich', 'Belphemur']">
            <text:p>['Copilot', 'crosbyh', 'yakob-aleksandrovich', 'Belphemur']</text:p>
          </table:table-cell>
          <table:table-cell office:value-type="string" office:string-value="0">
            <text:p>0</text:p>
          </table:table-cell>
          <table:table-cell office:value-type="string" office:string-value="0">
            <text:p>0</text:p>
          </table:table-cell>
          <table:table-cell office:value-type="string" office:string-value="https://github.com/unfoldingWord/obsidian-headless-sync-docker">
            <text:p>https://github.com/unfoldingWord/obsidian-headless-sync-docker</text:p>
          </table:table-cell>
          <table:table-cell office:value-type="string" office:string-value="2026-05-11T13:25:14Z">
            <text:p>2026-05-11T13:25:1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t">
            <text:p>ob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3-18T18:36:38Z">
            <text:p>2026-03-18T18:36:38Z</text:p>
          </table:table-cell>
          <table:table-cell office:value-type="string" office:string-value="2026-03-18T14:39:13Z">
            <text:p>2026-03-18T14:39:13Z</text:p>
          </table:table-cell>
          <table:table-cell office:value-type="string" office:string-value="2026-03-18T14:44:36Z">
            <text:p>2026-03-18T14:44:36Z</text:p>
          </table:table-cell>
          <table:table-cell office:value-type="string" office:string-value="10">
            <text:p>10</text:p>
          </table:table-cell>
          <table:table-cell office:value-type="string" office:string-value="0">
            <text:p>0</text:p>
          </table:table-cell>
          <table:table-cell office:value-type="string" office:string-value="bsa">
            <text:p>bs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resource-workspace-rcl', 'scripture-resources-rcl', 'tc-ui-toolkit', 'translation-helps-rcl', 'word-aligner']">
            <text:p>['bible-reference-rcl', 'resource-workspace-rcl', 'scripture-resources-rcl', 'tc-ui-toolkit', 'translation-helps-rcl', 'word-aligner']</text:p>
          </table:table-cell>
          <table:table-cell office:value-type="string" office:string-value="hiscoder-com/obt">
            <text:p>hiscoder-com/obt</text:p>
          </table:table-cell>
          <table:table-cell office:value-type="string" office:string-value="['foxprogs', 'Valyukhov', 'Vorobushec', 'Pavel064', 'Birch Champeon', 'dimanya', 'abelpz', 'ancientTexts-net', 'birchamp', 'DenisArger', 'gecraft']">
            <text:p>['foxprogs', 'Valyukhov', 'Vorobushec', 'Pavel064', 'Birch Champeon', 'dimanya', 'abelpz', 'ancientTexts-net', 'birchamp', 'DenisArger', 'gecraft']</text:p>
          </table:table-cell>
          <table:table-cell office:value-type="string" office:string-value="1">
            <text:p>1</text:p>
          </table:table-cell>
          <table:table-cell office:value-type="string" office:string-value="0">
            <text:p>0</text:p>
          </table:table-cell>
          <table:table-cell office:value-type="string" office:string-value="https://github.com/unfoldingWord/obt">
            <text:p>https://github.com/unfoldingWord/obt</text:p>
          </table:table-cell>
          <table:table-cell office:value-type="string" office:string-value="2026-03-18T14:39:46Z">
            <text:p>2026-03-18T14:39:4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oce-editor-tools">
            <text:p>oce-editor-tool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
            <text:p>oce-editor-to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oce-editor-tools/@oce-editor-tools/base">
            <text:p>oce-editor-tools/@oce-editor-tools/bas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base">
            <text:p>@oce-editor-tools/base</text:p>
          </table:table-cell>
          <table:table-cell office:value-type="string" office:string-value="">
            <text:p/>
          </table:table-cell>
          <table:table-cell office:value-type="string" office:string-value="1677">
            <text:p>1677</text:p>
          </table:table-cell>
          <table:table-cell office:value-type="string" office:string-value="2024-01-10T09:41:28.021Z">
            <text:p>2024-01-10T09:41:28.021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1677 downloads).">
            <text:p>Repository has GitHub dependents or at least 1,000 npm downloads in the last year (167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77 downloads in the last year).">
            <text:p>Package has detected local usage, GitHub dependents, or significant npm downloads (1677 downloads in the last year).</text:p>
          </table:table-cell>
        </table:table-row>
        <table:table-row>
          <table:table-cell office:value-type="string" office:string-value="oce-editor-tools/@oce-editor-tools/base-core">
            <text:p>oce-editor-tools/@oce-editor-tools/base-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base-core">
            <text:p>@oce-editor-tools/base-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oce-editor-tools/@oce-editor-tools/joy-core">
            <text:p>oce-editor-tools/@oce-editor-tools/joy-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joy-core">
            <text:p>@oce-editor-tools/joy-core</text:p>
          </table:table-cell>
          <table:table-cell office:value-type="string" office:string-value="">
            <text:p/>
          </table:table-cell>
          <table:table-cell office:value-type="string" office:string-value="363">
            <text:p>363</text:p>
          </table:table-cell>
          <table:table-cell office:value-type="string" office:string-value="2024-01-10T09:45:57.004Z">
            <text:p>2024-01-10T09:45:57.004Z</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363 downloads).">
            <text:p>Repository has GitHub dependents or at least 1,000 npm downloads in the last year (36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63 downloads in the last year).">
            <text:p>Package has detected local usage, GitHub dependents, or significant npm downloads (363 downloads in the last year).</text:p>
          </table:table-cell>
        </table:table-row>
        <table:table-row>
          <table:table-cell office:value-type="string" office:string-value="oce-editor-tools/@oce-editor-tools/joy-pk">
            <text:p>oce-editor-tools/@oce-editor-tools/joy-pk</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joy-pk">
            <text:p>@oce-editor-tools/joy-pk</text:p>
          </table:table-cell>
          <table:table-cell office:value-type="string" office:string-value="">
            <text:p/>
          </table:table-cell>
          <table:table-cell office:value-type="string" office:string-value="112">
            <text:p>112</text:p>
          </table:table-cell>
          <table:table-cell office:value-type="string" office:string-value="2024-01-10T09:47:45.958Z">
            <text:p>2024-01-10T09:47:45.958Z</text:p>
          </table:table-cell>
          <table:table-cell office:value-type="string" office:string-value="">
            <text:p/>
          </table:table-cell>
          <table:table-cell office:value-type="string" office:string-value="['bible-reference-rcl', 'epitelete-html']">
            <text:p>['bible-reference-rcl', '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112 downloads).">
            <text:p>Repository has GitHub dependents or at least 1,000 npm downloads in the last year (11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12 downloads in the last year).">
            <text:p>Package has detected local usage, GitHub dependents, or significant npm downloads (112 downloads in the last year).</text:p>
          </table:table-cell>
        </table:table-row>
        <table:table-row>
          <table:table-cell office:value-type="string" office:string-value="oce-editor-tools/@oce-editor-tools/joy-verse-navigator">
            <text:p>oce-editor-tools/@oce-editor-tools/joy-verse-navig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joy-verse-navigator">
            <text:p>@oce-editor-tools/joy-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oce-editor-tools/@oce-editor-tools/mui-core">
            <text:p>oce-editor-tools/@oce-editor-tools/mui-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mui-core">
            <text:p>@oce-editor-tools/mui-core</text:p>
          </table:table-cell>
          <table:table-cell office:value-type="string" office:string-value="">
            <text:p/>
          </table:table-cell>
          <table:table-cell office:value-type="string" office:string-value="572">
            <text:p>572</text:p>
          </table:table-cell>
          <table:table-cell office:value-type="string" office:string-value="2024-01-10T09:42:28.550Z">
            <text:p>2024-01-10T09:42:28.550Z</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572 downloads).">
            <text:p>Repository has GitHub dependents or at least 1,000 npm downloads in the last year (57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72 downloads in the last year).">
            <text:p>Package has detected local usage, GitHub dependents, or significant npm downloads (572 downloads in the last year).</text:p>
          </table:table-cell>
        </table:table-row>
        <table:table-row>
          <table:table-cell office:value-type="string" office:string-value="oce-editor-tools/@oce-editor-tools/mui-pk">
            <text:p>oce-editor-tools/@oce-editor-tools/mui-pk</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mui-pk">
            <text:p>@oce-editor-tools/mui-pk</text:p>
          </table:table-cell>
          <table:table-cell office:value-type="string" office:string-value="">
            <text:p/>
          </table:table-cell>
          <table:table-cell office:value-type="string" office:string-value="281">
            <text:p>281</text:p>
          </table:table-cell>
          <table:table-cell office:value-type="string" office:string-value="2024-01-10T09:45:17.176Z">
            <text:p>2024-01-10T09:45:17.176Z</text:p>
          </table:table-cell>
          <table:table-cell office:value-type="string" office:string-value="">
            <text:p/>
          </table:table-cell>
          <table:table-cell office:value-type="string" office:string-value="['bible-reference-rcl', 'epitelete-html']">
            <text:p>['bible-reference-rcl', '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281 downloads).">
            <text:p>Repository has GitHub dependents or at least 1,000 npm downloads in the last year (28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81 downloads in the last year).">
            <text:p>Package has detected local usage, GitHub dependents, or significant npm downloads (281 downloads in the last year).</text:p>
          </table:table-cell>
        </table:table-row>
        <table:table-row>
          <table:table-cell office:value-type="string" office:string-value="oce-editor-tools/@oce-editor-tools/mui-simple">
            <text:p>oce-editor-tools/@oce-editor-tools/mui-simp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mui-simple">
            <text:p>@oce-editor-tools/mui-simple</text:p>
          </table:table-cell>
          <table:table-cell office:value-type="string" office:string-value="">
            <text:p/>
          </table:table-cell>
          <table:table-cell office:value-type="string" office:string-value="331">
            <text:p>331</text:p>
          </table:table-cell>
          <table:table-cell office:value-type="string" office:string-value="2024-01-10T09:45:39.010Z">
            <text:p>2024-01-10T09:45:39.010Z</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331 downloads).">
            <text:p>Repository has GitHub dependents or at least 1,000 npm downloads in the last year (33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31 downloads in the last year).">
            <text:p>Package has detected local usage, GitHub dependents, or significant npm downloads (331 downloads in the last year).</text:p>
          </table:table-cell>
        </table:table-row>
        <table:table-row>
          <table:table-cell office:value-type="string" office:string-value="oce-editor-tools/@oce-editor-tools/mui-verse-navigator">
            <text:p>oce-editor-tools/@oce-editor-tools/mui-verse-navig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mui-verse-navigator">
            <text:p>@oce-editor-tools/mui-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oce-editor-tools/@oce-editor-tools/pk-aligner">
            <text:p>oce-editor-tools/@oce-editor-tools/pk-align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pk-aligner">
            <text:p>@oce-editor-tools/pk-alig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string-punctuation-tokenizer', 'word-aligner-rcl']">
            <text:p>['epitelete-html', 'string-punctuation-tokenizer', 'word-aligner-rc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oce-editor-tools/@oce-editor-tools/verse-mapper">
            <text:p>oce-editor-tools/@oce-editor-tools/verse-m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verse-mapper">
            <text:p>@oce-editor-tools/verse-mapper</text:p>
          </table:table-cell>
          <table:table-cell office:value-type="string" office:string-value="">
            <text:p/>
          </table:table-cell>
          <table:table-cell office:value-type="string" office:string-value="82">
            <text:p>82</text:p>
          </table:table-cell>
          <table:table-cell office:value-type="string" office:string-value="2024-01-10T09:46:28.087Z">
            <text:p>2024-01-10T09:46:28.087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82 downloads).">
            <text:p>Repository has GitHub dependents or at least 1,000 npm downloads in the last year (8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82 downloads in the last year).">
            <text:p>Package has detected local usage, GitHub dependents, or significant npm downloads (82 downloads in the last year).</text:p>
          </table:table-cell>
        </table:table-row>
        <table:table-row>
          <table:table-cell office:value-type="string" office:string-value="open-components-hackathon-website">
            <text:p>open-components-hackathon-webs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True">
            <text:p>True</text:p>
          </table:table-cell>
          <table:table-cell office:value-type="string" office:string-value="True">
            <text:p>True</text:p>
          </table:table-cell>
          <table:table-cell office:value-type="string" office:string-value="2022-01-05T02:52:31Z">
            <text:p>2022-01-05T02:52:31Z</text:p>
          </table:table-cell>
          <table:table-cell office:value-type="string" office:string-value="2022-01-05T02:52:31Z">
            <text:p>2022-01-05T02:52:31Z</text:p>
          </table:table-cell>
          <table:table-cell office:value-type="string" office:string-value="">
            <text:p/>
          </table:table-cell>
          <table:table-cell office:value-type="string" office:string-value="4">
            <text:p>4</text:p>
          </table:table-cell>
          <table:table-cell office:value-type="string" office:string-value="0">
            <text:p>0</text:p>
          </table:table-cell>
          <table:table-cell office:value-type="string" office:string-value="virtual-event-starter-kit">
            <text:p>virtual-event-starter-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ercel/virtual-event-starter-kit">
            <text:p>vercel/virtual-event-starter-kit</text:p>
          </table:table-cell>
          <table:table-cell office:value-type="string" office:string-value="['mannycolon', 'chibicode', 'leerob', 'goncy', 'levimykel', 'fofiu', 'Deep-Codes', 'enesakar', 'erikras', 'irahopkinson', 'marionott', 'matheuss', 'richmahn', 'hugefunwoo', 'lisilinhart']">
            <text:p>['mannycolon', 'chibicode', 'leerob', 'goncy', 'levimykel', 'fofiu', 'Deep-Codes', 'enesakar', 'erikras', 'irahopkinson', 'marionott', 'matheuss', 'richmahn', 'hugefunwoo', 'lisilinhart']</text:p>
          </table:table-cell>
          <table:table-cell office:value-type="string" office:string-value="0">
            <text:p>0</text:p>
          </table:table-cell>
          <table:table-cell office:value-type="string" office:string-value="0">
            <text:p>0</text:p>
          </table:table-cell>
          <table:table-cell office:value-type="string" office:string-value="https://github.com/unfoldingWord/open-components-hackathon-website">
            <text:p>https://github.com/unfoldingWord/open-components-hackathon-website</text:p>
          </table:table-cell>
          <table:table-cell office:value-type="string" office:string-value="2024-05-22T10:11:28Z">
            <text:p>2024-05-22T10:11:28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pagequery">
            <text:p>pagequery</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22T18:41:28Z">
            <text:p>2015-06-22T18:41:28Z</text:p>
          </table:table-cell>
          <table:table-cell office:value-type="string" office:string-value="2015-06-22T18:41:23Z">
            <text:p>2015-06-22T18:41: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perdav42/pagequery">
            <text:p>superdav42/pagequery</text:p>
          </table:table-cell>
          <table:table-cell office:value-type="string" office:string-value="['MrBertie', 'superdav42', 'gamma', 'mprins', 'glensc', 'topical', 'sawachan']">
            <text:p>['MrBertie', 'superdav42', 'gamma', 'mprins', 'glensc', 'topical', 'sawachan']</text:p>
          </table:table-cell>
          <table:table-cell office:value-type="string" office:string-value="0">
            <text:p>0</text:p>
          </table:table-cell>
          <table:table-cell office:value-type="string" office:string-value="0">
            <text:p>0</text:p>
          </table:table-cell>
          <table:table-cell office:value-type="string" office:string-value="https://github.com/unfoldingWord-dev/pagequery">
            <text:p>https://github.com/unfoldingWord-dev/pagequery</text:p>
          </table:table-cell>
          <table:table-cell office:value-type="string" office:string-value="2015-12-11T18:59:22Z">
            <text:p>2015-12-11T18:59:22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pankosmia-web">
            <text:p>pankosmia-web</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5-07T12:53:06Z">
            <text:p>2025-05-07T12:53:06Z</text:p>
          </table:table-cell>
          <table:table-cell office:value-type="string" office:string-value="2025-05-04T16:46:45Z">
            <text:p>2025-05-04T16:46:4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pankosmia-web">
            <text:p>pankosmia/pankosmia-web</text:p>
          </table:table-cell>
          <table:table-cell office:value-type="string" office:string-value="['mvahowe', 'RUN-Projects', 'lmeline']">
            <text:p>['mvahowe', 'RUN-Projects', 'lmeline']</text:p>
          </table:table-cell>
          <table:table-cell office:value-type="string" office:string-value="0">
            <text:p>0</text:p>
          </table:table-cell>
          <table:table-cell office:value-type="string" office:string-value="0">
            <text:p>0</text:p>
          </table:table-cell>
          <table:table-cell office:value-type="string" office:string-value="https://github.com/unfoldingWord-box3/pankosmia-web">
            <text:p>https://github.com/unfoldingWord-box3/pankosmia-web</text:p>
          </table:table-cell>
          <table:table-cell office:value-type="string" office:string-value="2025-05-05T03:19:17Z">
            <text:p>2025-05-05T03:19:17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proskomma-react-hooks">
            <text:p>proskomma-react-hooks</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8-24T20:05:30Z">
            <text:p>2022-08-24T20:05:30Z</text:p>
          </table:table-cell>
          <table:table-cell office:value-type="string" office:string-value="2022-07-15T18:05:20Z">
            <text:p>2022-07-15T18:05:20Z</text:p>
          </table:table-cell>
          <table:table-cell office:value-type="string" office:string-value="">
            <text:p/>
          </table:table-cell>
          <table:table-cell office:value-type="string" office:string-value="10">
            <text:p>1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en-tech-foundation/scribe-extensions', 'bible-technology/scribe-scripture-editor', 'vipinpaul/autographa', 'unfoldingWord/oce-editor-tools', 'unfoldingWord/translationCore', 'friendsofagape/autographa', 'Proskomma/proskomma-legacy-projects', 'unfoldingWord/uw-editor', 'unfoldingWord/gateway-translate', 'Proskomma/perfidy']">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office:string-value="['klappy', 'mvahowe', 'PhotoNomad0', 'jincypjose', 'mandolyte']">
            <text:p>['klappy', 'mvahowe', 'PhotoNomad0', 'jincypjose', 'mandolyte']</text:p>
          </table:table-cell>
          <table:table-cell office:value-type="string" office:string-value="0">
            <text:p>0</text:p>
          </table:table-cell>
          <table:table-cell office:value-type="string" office:string-value="0">
            <text:p>0</text:p>
          </table:table-cell>
          <table:table-cell office:value-type="string" office:string-value="https://github.com/unfoldingWord/proskomma-react-hooks">
            <text:p>https://github.com/unfoldingWord/proskomma-react-hooks</text:p>
          </table:table-cell>
          <table:table-cell office:value-type="string" office:string-value="2022-06-17T15:50:39Z">
            <text:p>2022-06-17T15:50:39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proskomma-render-preview">
            <text:p>proskomma-render-preview</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03-23T16:51:37Z">
            <text:p>2022-03-23T16:51:37Z</text:p>
          </table:table-cell>
          <table:table-cell office:value-type="string" office:string-value="2021-10-19T09:03:07Z">
            <text:p>2021-10-19T09:03: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skomma/proskomma-render-pdf">
            <text:p>Proskomma/proskomma-render-pdf</text:p>
          </table:table-cell>
          <table:table-cell office:value-type="string" office:string-value="mvahowe">
            <text:p>mvahowe</text:p>
          </table:table-cell>
          <table:table-cell office:value-type="string" office:string-value="0">
            <text:p>0</text:p>
          </table:table-cell>
          <table:table-cell office:value-type="string" office:string-value="0">
            <text:p>0</text:p>
          </table:table-cell>
          <table:table-cell office:value-type="string" office:string-value="https://github.com/unfoldingWord-dev/proskomma-render-preview">
            <text:p>https://github.com/unfoldingWord-dev/proskomma-render-preview</text:p>
          </table:table-cell>
          <table:table-cell office:value-type="string" office:string-value="2022-03-22T12:58:28Z">
            <text:p>2022-03-22T12:58:28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python-dcs-api-client">
            <text:p>python-dcs-api-clien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8-23T20:41:15Z">
            <text:p>2023-08-23T20:41:15Z</text:p>
          </table:table-cell>
          <table:table-cell office:value-type="string" office:string-value="2023-08-23T20:40:19Z">
            <text:p>2023-08-23T20:40:19Z</text:p>
          </table:table-cell>
          <table:table-cell office:value-type="string" office:string-value="2023-08-23T20:41:15Z">
            <text:p>2023-08-23T20:41:15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phavector/all', 'Lyn4ever29/pipy_server', 'unfoldingWord/door43-job-handler', 'unfoldingWord/tx-job-handler']">
            <text:p>['alphavector/all', 'Lyn4ever29/pipy_server', 'unfoldingWord/door43-job-handler', 'unfoldingWord/tx-job-handler']</text:p>
          </table:table-cell>
          <table:table-cell office:value-type="string" office:string-value="['richmahn', 'RajeshHegde', 'jakobandersen']">
            <text:p>['richmahn', 'RajeshHegde', 'jakobandersen']</text:p>
          </table:table-cell>
          <table:table-cell office:value-type="string" office:string-value="9">
            <text:p>9</text:p>
          </table:table-cell>
          <table:table-cell office:value-type="string" office:string-value="0">
            <text:p>0</text:p>
          </table:table-cell>
          <table:table-cell office:value-type="string" office:string-value="https://github.com/unfoldingWord/python-dcs-api-client">
            <text:p>https://github.com/unfoldingWord/python-dcs-api-client</text:p>
          </table:table-cell>
          <table:table-cell office:value-type="string" office:string-value="2022-10-04T15:56:11Z">
            <text:p>2022-10-04T15:56:11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python-dcs-catalog-client">
            <text:p>python-dcs-catalog-clien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2-05-25T20:09:27Z">
            <text:p>2022-05-25T20:09:27Z</text:p>
          </table:table-cell>
          <table:table-cell office:value-type="string" office:string-value="2022-05-25T20:09:23Z">
            <text:p>2022-05-25T20:09:23Z</text:p>
          </table:table-cell>
          <table:table-cell office:value-type="string" office:string-value="2022-05-17T17:37:53Z">
            <text:p>2022-05-17T17:37:53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phavector/all', 'Lyn4ever29/pipy_server', 'unfoldingWord/tx-job-handler']">
            <text:p>['alphavector/all', 'Lyn4ever29/pipy_server', 'unfoldingWord/tx-job-handler']</text:p>
          </table:table-cell>
          <table:table-cell office:value-type="string" office:string-value="['RajeshHegde', 'richmahn', 'jakobandersen']">
            <text:p>['RajeshHegde', 'richmahn', 'jakobandersen']</text:p>
          </table:table-cell>
          <table:table-cell office:value-type="string" office:string-value="6">
            <text:p>6</text:p>
          </table:table-cell>
          <table:table-cell office:value-type="string" office:string-value="0">
            <text:p>0</text:p>
          </table:table-cell>
          <table:table-cell office:value-type="string" office:string-value="https://github.com/unfoldingWord/python-dcs-catalog-client">
            <text:p>https://github.com/unfoldingWord/python-dcs-catalog-client</text:p>
          </table:table-cell>
          <table:table-cell office:value-type="string" office:string-value="2022-10-04T15:55:38Z">
            <text:p>2022-10-04T15:55:38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react-library-starter">
            <text:p>react-library-starte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6T23:27:40Z">
            <text:p>2023-02-16T23:27:40Z</text:p>
          </table:table-cell>
          <table:table-cell office:value-type="string" office:string-value="2023-02-16T23:27:40Z">
            <text:p>2023-02-16T23:27: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my-lib">
            <text:p>my-li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react-library">
            <text:p>abelpz/react-library</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react-library-starter">
            <text:p>https://github.com/unfoldingWord-box3/react-library-starter</text:p>
          </table:table-cell>
          <table:table-cell office:value-type="string" office:string-value="2023-02-16T14:47:55Z">
            <text:p>2023-02-16T14:47:55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react-to-electron-action">
            <text:p>react-to-electron-act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18T19:24:40Z">
            <text:p>2022-08-18T19:24:40Z</text:p>
          </table:table-cell>
          <table:table-cell office:value-type="string" office:string-value="2020-05-06T12:37:26Z">
            <text:p>2020-05-06T12:37:2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react-to-electron-action">
            <text:p>react-to-electron-a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ok-package-app', 'mandolyte/rrouter']">
            <text:p>['unfoldingWord/book-package-app', 'mandolyte/rrouter']</text:p>
          </table:table-cell>
          <table:table-cell office:value-type="string" office:string-value="['mandolyte', 'dependabot[bot]']">
            <text:p>['mandolyte',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x3/react-to-electron-action">
            <text:p>https://github.com/unfoldingWord-box3/react-to-electron-action</text:p>
          </table:table-cell>
          <table:table-cell office:value-type="string" office:string-value="2020-05-06T12:37:30Z">
            <text:p>2020-05-06T12:37:30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ResourceChecker">
            <text:p>ResourceCheck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0-05-19T19:57:08Z">
            <text:p>2020-05-19T19:57:08Z</text:p>
          </table:table-cell>
          <table:table-cell office:value-type="string" office:string-value="2020-05-19T19:56:49Z">
            <text:p>2020-05-19T19:56: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source-checker">
            <text:p>resource-chec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gitea-react-toolkit', 'scripture-resources-rcl', 'markdown-translatable']">
            <text:p>['usfm-js', 'gitea-react-toolkit', 'scripture-resources-rcl', 'markdown-translatable']</text:p>
          </table:table-cell>
          <table:table-cell office:value-type="string" office:string-value="unfoldingWord/uw-word-count">
            <text:p>unfoldingWord/uw-word-count</text:p>
          </table:table-cell>
          <table:table-cell office:value-type="string" office:string-value="['mandolyte', 'RobH123', 'jag3773']">
            <text:p>['mandolyte', 'RobH123', 'jag3773']</text:p>
          </table:table-cell>
          <table:table-cell office:value-type="string" office:string-value="0">
            <text:p>0</text:p>
          </table:table-cell>
          <table:table-cell office:value-type="string" office:string-value="0">
            <text:p>0</text:p>
          </table:table-cell>
          <table:table-cell office:value-type="string" office:string-value="https://github.com/unfoldingWord-dev/ResourceChecker">
            <text:p>https://github.com/unfoldingWord-dev/ResourceChecker</text:p>
          </table:table-cell>
          <table:table-cell office:value-type="string" office:string-value="2023-01-28T14:29:30Z">
            <text:p>2023-01-28T14:29:30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StableTTS_Editing">
            <text:p>StableTTS_Editing</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3-07T13:20:53Z">
            <text:p>2025-03-07T13:20:53Z</text:p>
          </table:table-cell>
          <table:table-cell office:value-type="string" office:string-value="2025-03-06T13:50:35Z">
            <text:p>2025-03-06T13:50: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StableTTS_Editing">
            <text:p>JEdward7777/StableTTS_Editing</text:p>
          </table:table-cell>
          <table:table-cell office:value-type="string" office:string-value="['Joshua Lansford', 'KdaiP']">
            <text:p>['Joshua Lansford', 'KdaiP']</text:p>
          </table:table-cell>
          <table:table-cell office:value-type="string" office:string-value="0">
            <text:p>0</text:p>
          </table:table-cell>
          <table:table-cell office:value-type="string" office:string-value="0">
            <text:p>0</text:p>
          </table:table-cell>
          <table:table-cell office:value-type="string" office:string-value="https://github.com/unfoldingWord-box3/StableTTS_Editing">
            <text:p>https://github.com/unfoldingWord-box3/StableTTS_Editing</text:p>
          </table:table-cell>
          <table:table-cell office:value-type="string" office:string-value="2025-03-06T14:31:54Z">
            <text:p>2025-03-06T14:31:5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suggesting-word-aligner">
            <text:p>suggesting-word-aligner</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https://github.com/unfoldingWord-box3/suggesting-word-aligner">
            <text:p>https://github.com/unfoldingWord-box3/suggesting-word-aligner</text:p>
          </table:table-cell>
          <table:table-cell office:value-type="string" office:string-value="2025-06-19T19:45:56Z">
            <text:p>2025-06-19T19:45:5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core-submodule-updater">
            <text:p>t-core-submodule-upda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9-10-22T20:22:22Z">
            <text:p>2019-10-22T20:22:22Z</text:p>
          </table:table-cell>
          <table:table-cell office:value-type="string" office:string-value="2019-10-22T20:22:20Z">
            <text:p>2019-10-22T20:22: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submodule-manager">
            <text:p>tc-submodule-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translationCore-submodule-updater">
            <text:p>ihoegen/translationCore-submodule-updater</text:p>
          </table:table-cell>
          <table:table-cell office:value-type="string" office:string-value="['ihoegen', 'mannycolon']">
            <text:p>['ihoegen', 'mannycolon']</text:p>
          </table:table-cell>
          <table:table-cell office:value-type="string" office:string-value="0">
            <text:p>0</text:p>
          </table:table-cell>
          <table:table-cell office:value-type="string" office:string-value="0">
            <text:p>0</text:p>
          </table:table-cell>
          <table:table-cell office:value-type="string" office:string-value="https://github.com/unfoldingWord/t-core-submodule-updater">
            <text:p>https://github.com/unfoldingWord/t-core-submodule-updater</text:p>
          </table:table-cell>
          <table:table-cell office:value-type="string" office:string-value="2019-10-22T20:22:23Z">
            <text:p>2019-10-22T20:22:23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tact">
            <text:p>tac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19:01:07Z">
            <text:p>2025-11-03T19:01:07Z</text:p>
          </table:table-cell>
          <table:table-cell office:value-type="string" office:string-value="2025-11-03T19:01:07Z">
            <text:p>2025-11-03T19:01:07Z</text:p>
          </table:table-cell>
          <table:table-cell office:value-type="string" office:string-value="">
            <text:p/>
          </table:table-cell>
          <table:table-cell office:value-type="string" office:string-value="24">
            <text:p>24</text:p>
          </table:table-cell>
          <table:table-cell office:value-type="string" office:string-value="1">
            <text:p>1</text:p>
          </table:table-cell>
          <table:table-cell office:value-type="string" office:string-value="tact">
            <text:p>ta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raymoonlight/CRBank', 'magistrigusti/Dominum_DOM', 'singhyash05/BitTonica', 'jubbslineu/contract-test']">
            <text:p>['graymoonlight/CRBank', 'magistrigusti/Dominum_DOM', 'singhyash05/BitTonica', 'jubbslineu/contract-test']</text:p>
          </table:table-cell>
          <table:table-cell office:value-type="string" office:string-value="['klappy', 'yakob-aleksandrovich']">
            <text:p>['klappy',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tact">
            <text:p>https://github.com/unfoldingWord-box3/tact</text:p>
          </table:table-cell>
          <table:table-cell office:value-type="string" office:string-value="2025-11-03T19:01:10Z">
            <text:p>2025-11-03T19:01:10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tc-create-poc">
            <text:p>tc-create-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1-07-05T17:42:04Z">
            <text:p>2021-07-05T17:42:04Z</text:p>
          </table:table-cell>
          <table:table-cell office:value-type="string" office:string-value="2021-07-05T17:41:59Z">
            <text:p>2021-07-05T17:41: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create-app">
            <text:p>tc-create-app</text:p>
          </table:table-cell>
          <table:table-cell office:value-type="string" office:string-value="False">
            <text:p>False</text:p>
          </table:table-cell>
          <table:table-cell office:value-type="string" office:string-value="48">
            <text:p>48</text:p>
          </table:table-cell>
          <table:table-cell office:value-type="string" office:string-value="2022-02-22T21:12:10.659Z">
            <text:p>2022-02-22T21:12:10.659Z</text:p>
          </table:table-cell>
          <table:table-cell office:value-type="string" office:string-value="">
            <text:p/>
          </table:table-cell>
          <table:table-cell office:value-type="string" office:string-value="['datatable-translatable', 'gitea-react-toolkit', 'markdown-translatable', 'scripture-resources-rcl', 'usfm-js', 'uw-content-validation', '@unfoldingword/eslint-config']">
            <text:p>['datatable-translatable', 'gitea-react-toolkit', 'markdown-translatable', 'scripture-resources-rcl', 'usfm-js', 'uw-content-validation', '@unfoldingword/eslint-config']</text:p>
          </table:table-cell>
          <table:table-cell office:value-type="string" office:string-value="unfoldingWord/tc-create-app">
            <text:p>unfoldingWord/tc-create-app</text:p>
          </table:table-cell>
          <table:table-cell office:value-type="string" office:string-value="['ancientTexts-net', 'RoyalSix', 'klappy', 'dependabot[bot]', 'mandolyte', 'Sterling (Jay) Scott', 'actions-user', 'dependabot-preview[bot]', 'jag3773', 'PhotoNomad0', 'birchamp']">
            <text:p>['ancientTexts-net', 'RoyalSix', 'klappy', 'dependabot[bot]', 'mandolyte', 'Sterling (Jay) Scott', 'actions-user', 'dependabot-preview[bot]', 'jag3773', 'PhotoNomad0', 'birchamp']</text:p>
          </table:table-cell>
          <table:table-cell office:value-type="string" office:string-value="0">
            <text:p>0</text:p>
          </table:table-cell>
          <table:table-cell office:value-type="string" office:string-value="0">
            <text:p>0</text:p>
          </table:table-cell>
          <table:table-cell office:value-type="string" office:string-value="https://github.com/unfoldingWord-box3/tc-create-poc">
            <text:p>https://github.com/unfoldingWord-box3/tc-create-poc</text:p>
          </table:table-cell>
          <table:table-cell office:value-type="string" office:string-value="2021-12-03T15:55:03Z">
            <text:p>2021-12-03T15:55:03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48 downloads).">
            <text:p>Repository has GitHub dependents or at least 1,000 npm downloads in the last year (4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8 downloads in the last year).">
            <text:p>Package has detected local usage, GitHub dependents, or significant npm downloads (48 downloads in the last year).</text:p>
          </table:table-cell>
        </table:table-row>
        <table:table-row>
          <table:table-cell office:value-type="string" office:string-value="tc-electron-env">
            <text:p>tc-electron-env</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3-15T16:52:56Z">
            <text:p>2022-03-15T16:52:56Z</text:p>
          </table:table-cell>
          <table:table-cell office:value-type="string" office:string-value="2020-03-23T19:09:54Z">
            <text:p>2020-03-23T19:09: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oustAndrew/wordAlignment', 'mannycolon/electronite-poc-app', 'unfoldingWord/translationCore', 'unfoldingWord/wordAlignment', 'unfoldingWord/checking-tool-wrapper']">
            <text:p>['FoustAndrew/wordAlignment', 'mannycolon/electronite-poc-app', 'unfoldingWord/translationCore', 'unfoldingWord/wordAlignment', 'unfoldingWord/checking-tool-wrapper']</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electron-env">
            <text:p>https://github.com/unfoldingWord/tc-electron-env</text:p>
          </table:table-cell>
          <table:table-cell office:value-type="string" office:string-value="2020-03-23T19:09:57Z">
            <text:p>2020-03-23T19:09:57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ranslation-helps-mcp">
            <text:p>translation-helps-mc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5-05T17:01:57Z">
            <text:p>2026-05-05T17:01:57Z</text:p>
          </table:table-cell>
          <table:table-cell office:value-type="string" office:string-value="2026-05-05T16:33:43Z">
            <text:p>2026-05-05T16:33:43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translation-helps-mcp">
            <text:p>translation-helps-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translation-helps-mcp">
            <text:p>klappy/translation-helps-mcp</text:p>
          </table:table-cell>
          <table:table-cell office:value-type="string" office:string-value="['klappy', 'Automation', 'abelpz', 'cursoragent']">
            <text:p>['klappy', 'Automation', 'abelpz', 'cursoragent']</text:p>
          </table:table-cell>
          <table:table-cell office:value-type="string" office:string-value="0">
            <text:p>0</text:p>
          </table:table-cell>
          <table:table-cell office:value-type="string" office:string-value="0">
            <text:p>0</text:p>
          </table:table-cell>
          <table:table-cell office:value-type="string" office:string-value="https://github.com/unfoldingWord/translation-helps-mcp">
            <text:p>https://github.com/unfoldingWord/translation-helps-mcp</text:p>
          </table:table-cell>
          <table:table-cell office:value-type="string" office:string-value="2026-05-05T16:33:48Z">
            <text:p>2026-05-05T16:33:48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translation-notes-extension">
            <text:p>translation-notes-extension</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7T18:28:19Z">
            <text:p>2024-03-27T18:28:19Z</text:p>
          </table:table-cell>
          <table:table-cell office:value-type="string" office:string-value="2024-03-27T18:28:00Z">
            <text:p>2024-03-27T18:28: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intsoogi/translation-notes-extension">
            <text:p>kintsoogi/translation-notes-extension</text:p>
          </table:table-cell>
          <table:table-cell office:value-type="string" office:string-value="kintsoogi">
            <text:p>kintsoogi</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notes-extension">
            <text:p>https://github.com/unfoldingWord-box3/translation-notes-extension</text:p>
          </table:table-cell>
          <table:table-cell office:value-type="string" office:string-value="2024-06-10T15:18:59Z">
            <text:p>2024-06-10T15:18:59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ranslation-project">
            <text:p>translation-project</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0T17:43:25Z">
            <text:p>2024-03-20T17:43:25Z</text:p>
          </table:table-cell>
          <table:table-cell office:value-type="string" office:string-value="2024-03-20T17:43:20Z">
            <text:p>2024-03-20T17:43: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yderwishart/translation-project">
            <text:p>ryderwishart/translation-project</text:p>
          </table:table-cell>
          <table:table-cell office:value-type="string" office:string-value="ryderwishart">
            <text:p>ryderwishart</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project">
            <text:p>https://github.com/unfoldingWord-box3/translation-project</text:p>
          </table:table-cell>
          <table:table-cell office:value-type="string" office:string-value="2024-06-10T15:22:27Z">
            <text:p>2024-06-10T15:22:27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USFM-Tools">
            <text:p>USFM-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9-11-19T01:34:28Z">
            <text:p>2019-11-19T01:34:28Z</text:p>
          </table:table-cell>
          <table:table-cell office:value-type="string" office:string-value="2019-11-19T01:34:27Z">
            <text:p>2019-11-19T01:34:27Z</text:p>
          </table:table-cell>
          <table:table-cell office:value-type="string" office:string-value="2017-08-24T19:20:35Z">
            <text:p>2017-08-24T19:20:35Z</text:p>
          </table:table-cell>
          <table:table-cell office:value-type="string" office:string-value="3">
            <text:p>3</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penenglishbible/USFM-Tools">
            <text:p>openenglishbible/USFM-Tools</text:p>
          </table:table-cell>
          <table:table-cell office:value-type="string" office:string-value="['Richard Mahn', 'kbuildsyourdotcom', 'Jesse A. Griffin', 'openenglishbible', 'da1nerd', 'richmahn', 'phillip-hopper', 'Phil Hopper', 'jag3773', 'rbnswartz', 'PhotoNomad0']">
            <text:p>['Richard Mahn', 'kbuildsyourdotcom', 'Jesse A. Griffin', 'openenglishbible', 'da1nerd', 'richmahn', 'phillip-hopper', 'Phil Hopper', 'jag3773', 'rbnswartz', 'PhotoNomad0']</text:p>
          </table:table-cell>
          <table:table-cell office:value-type="string" office:string-value="2">
            <text:p>2</text:p>
          </table:table-cell>
          <table:table-cell office:value-type="string" office:string-value="0">
            <text:p>0</text:p>
          </table:table-cell>
          <table:table-cell office:value-type="string" office:string-value="https://github.com/unfoldingWord-dev/USFM-Tools">
            <text:p>https://github.com/unfoldingWord-dev/USFM-Tools</text:p>
          </table:table-cell>
          <table:table-cell office:value-type="string" office:string-value="2025-12-05T16:07:19Z">
            <text:p>2025-12-05T16:07:19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uw-codex-editor">
            <text:p>uw-codex-editor</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6T20:54:08Z">
            <text:p>2024-03-26T20:54:08Z</text:p>
          </table:table-cell>
          <table:table-cell office:value-type="string" office:string-value="2024-03-26T20:53:58Z">
            <text:p>2024-03-26T20:53: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enesis-ai-dev/codex-editor">
            <text:p>genesis-ai-dev/codex-editor</text:p>
          </table:table-cell>
          <table:table-cell office:value-type="string" office:string-value="['ryderwishart', 'BenjaminScholtens', 'Daniel Losey', 'dadukhankevin', 'brianineza01', 'kintsoogi', 'CalJosKos', 'Kalisa11', 'PhotoNomad0', 'samueljd']">
            <text:p>['ryderwishart', 'BenjaminScholtens', 'Daniel Losey', 'dadukhankevin', 'brianineza01', 'kintsoogi', 'CalJosKos', 'Kalisa11', 'PhotoNomad0', 'samueljd']</text:p>
          </table:table-cell>
          <table:table-cell office:value-type="string" office:string-value="0">
            <text:p>0</text:p>
          </table:table-cell>
          <table:table-cell office:value-type="string" office:string-value="0">
            <text:p>0</text:p>
          </table:table-cell>
          <table:table-cell office:value-type="string" office:string-value="https://github.com/unfoldingWord-box3/uw-codex-editor">
            <text:p>https://github.com/unfoldingWord-box3/uw-codex-editor</text:p>
          </table:table-cell>
          <table:table-cell office:value-type="string" office:string-value="2024-03-28T07:20:52Z">
            <text:p>2024-03-28T07:20:52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uw-editor">
            <text:p>uw-edi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9-12T15:49:20Z">
            <text:p>2023-09-12T15:49:20Z</text:p>
          </table:table-cell>
          <table:table-cell office:value-type="string" office:string-value="2023-09-12T15:49:12Z">
            <text:p>2023-09-12T15:49:12Z</text:p>
          </table:table-cell>
          <table:table-cell office:value-type="string" office:string-value="">
            <text:p/>
          </table:table-cell>
          <table:table-cell office:value-type="string" office:string-value="5">
            <text:p>5</text:p>
          </table:table-cell>
          <table:table-cell office:value-type="string" office:string-value="3">
            <text:p>3</text:p>
          </table:table-cell>
          <table:table-cell office:value-type="string" office:string-value="uw-editor">
            <text:p>uw-editor</text:p>
          </table:table-cell>
          <table:table-cell office:value-type="string" office:string-value="True">
            <text:p>True</text:p>
          </table:table-cell>
          <table:table-cell office:value-type="string" office:string-value="1081">
            <text:p>1081</text:p>
          </table:table-cell>
          <table:table-cell office:value-type="string" office:string-value="2023-03-21T14:43:38.471Z">
            <text:p>2023-03-21T14:43:38.471Z</text:p>
          </table:table-cell>
          <table:table-cell office:value-type="string" office:string-value="">
            <text:p/>
          </table:table-cell>
          <table:table-cell office:value-type="string" office:string-value="['epitelete-html', 'translation-helps-rcl']">
            <text:p>['epitelete-html', 'translation-helps-rcl']</text:p>
          </table:table-cell>
          <table:table-cell office:value-type="string" office:string-value="unfoldingWord/gateway-translate">
            <text:p>unfoldingWord/gateway-translate</text:p>
          </table:table-cell>
          <table:table-cell office:value-type="string" office:string-value="['larsgson', 'mandolyte', 'superdav42', 'abelpz', 'irahopkinson']">
            <text:p>['larsgson', 'mandolyte', 'superdav42', 'abelpz', 'irahopkinson']</text:p>
          </table:table-cell>
          <table:table-cell office:value-type="string" office:string-value="0">
            <text:p>0</text:p>
          </table:table-cell>
          <table:table-cell office:value-type="string" office:string-value="0">
            <text:p>0</text:p>
          </table:table-cell>
          <table:table-cell office:value-type="string" office:string-value="https://github.com/unfoldingWord/uw-editor">
            <text:p>https://github.com/unfoldingWord/uw-editor</text:p>
          </table:table-cell>
          <table:table-cell office:value-type="string" office:string-value="2022-10-19T03:29:50Z">
            <text:p>2022-10-19T03:29:50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1081 downloads).">
            <text:p>Repository has GitHub dependents or at least 1,000 npm downloads in the last year (1081 downloads).</text:p>
          </table:table-cell>
          <table:table-cell office:value-type="string" office:string-value="Deprecated npm package">
            <text:p>Deprecated npm package</text:p>
          </table:table-cell>
          <table:table-cell office:value-type="string" office:string-value="Npm package is already explicitly marked as deprecated.">
            <text:p>Npm package is already explicitly marked as deprecated.</text:p>
          </table:table-cell>
        </table:table-row>
        <table:table-row>
          <table:table-cell office:value-type="string" office:string-value="uw-web">
            <text:p>uw-web</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7-03-25T14:53:13Z">
            <text:p>2017-03-25T14:53:13Z</text:p>
          </table:table-cell>
          <table:table-cell office:value-type="string" office:string-value="2017-03-25T14:53:08Z">
            <text:p>2017-03-25T14:53:08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BrowserBible">
            <text:p>BrowserBib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gitalbiblesociety/browserbible-3">
            <text:p>digitalbiblesociety/browserbible-3</text:p>
          </table:table-cell>
          <table:table-cell office:value-type="string" office:string-value="['johndyer', 'codemis', 'phillip-hopper', 'alerque', 'Jesse A. Griffin', 'jag3773', 'explorigin', 'maf-jclark', 'nikaro', 'Zohma', 'rbnswartz', 'Phil Hopper', 'da1nerd', 'Jay', 'Gogs', 'anthonycrumley', 'chriskrycho', 'runlevelsix', 'Jonathan Bitgood', 'Timothy Farrell', 'joshykurian', 'pdattx']">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office:string-value="0">
            <text:p>0</text:p>
          </table:table-cell>
          <table:table-cell office:value-type="string" office:string-value="0">
            <text:p>0</text:p>
          </table:table-cell>
          <table:table-cell office:value-type="string" office:string-value="https://github.com/unfoldingWord-dev/uw-web">
            <text:p>https://github.com/unfoldingWord-dev/uw-web</text:p>
          </table:table-cell>
          <table:table-cell office:value-type="string" office:string-value="2020-09-11T14:39:54Z">
            <text:p>2020-09-11T14:39:5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VscOceUsfmEdit">
            <text:p>VscOceUsfmEdi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02T13:44:52Z">
            <text:p>2024-02-02T13:44:52Z</text:p>
          </table:table-cell>
          <table:table-cell office:value-type="string" office:string-value="2024-02-02T13:44:52Z">
            <text:p>2024-02-02T13:44: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usfm-editor">
            <text:p>oce-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VscUsfmEditAlign">
            <text:p>unfoldingWord-box3/VscUsfmEditAlign</text:p>
          </table:table-cell>
          <table:table-cell office:value-type="string" office:string-value="['Joshua Lansford', 'larsgson', 'PhotoNomad0', 'blm']">
            <text:p>['Joshua Lansford', 'larsgson', 'PhotoNomad0', 'blm']</text:p>
          </table:table-cell>
          <table:table-cell office:value-type="string" office:string-value="0">
            <text:p>0</text:p>
          </table:table-cell>
          <table:table-cell office:value-type="string" office:string-value="0">
            <text:p>0</text:p>
          </table:table-cell>
          <table:table-cell office:value-type="string" office:string-value="https://github.com/unfoldingWord-box3/VscOceUsfmEdit">
            <text:p>https://github.com/unfoldingWord-box3/VscOceUsfmEdit</text:p>
          </table:table-cell>
          <table:table-cell office:value-type="string" office:string-value="2024-02-02T13:45:00Z">
            <text:p>2024-02-02T13:45:00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vscode-speech-to-text">
            <text:p>vscode-speech-to-text</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07T15:31:48Z">
            <text:p>2024-03-07T15:31:48Z</text:p>
          </table:table-cell>
          <table:table-cell office:value-type="string" office:string-value="2022-04-04T07:52:29Z">
            <text:p>2022-04-04T07:52: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lefjaerestad/vscode-speech-to-text">
            <text:p>olefjaerestad/vscode-speech-to-text</text:p>
          </table:table-cell>
          <table:table-cell office:value-type="string" office:string-value="['olefjaerestad', 'dependabot[bot]']">
            <text:p>['olefjaerestad',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x3/vscode-speech-to-text">
            <text:p>https://github.com/unfoldingWord-box3/vscode-speech-to-text</text:p>
          </table:table-cell>
          <table:table-cell office:value-type="string" office:string-value="2024-03-07T15:14:34Z">
            <text:p>2024-03-07T15:14:3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VscUsfmEditAlign">
            <text:p>VscUsfmEditAlign</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15T14:05:55Z">
            <text:p>2024-02-15T14:05:55Z</text:p>
          </table:table-cell>
          <table:table-cell office:value-type="string" office:string-value="2024-02-13T19:43:46Z">
            <text:p>2024-02-13T19:43: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sfmeditor">
            <text:p>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VsCodeUsfmAligner">
            <text:p>JEdward7777/VsCodeUsfmAligner</text:p>
          </table:table-cell>
          <table:table-cell office:value-type="string" office:string-value="['Joshua Lansford', 'PhotoNomad0', 'blm']">
            <text:p>['Joshua Lansford', 'PhotoNomad0', 'blm']</text:p>
          </table:table-cell>
          <table:table-cell office:value-type="string" office:string-value="0">
            <text:p>0</text:p>
          </table:table-cell>
          <table:table-cell office:value-type="string" office:string-value="0">
            <text:p>0</text:p>
          </table:table-cell>
          <table:table-cell office:value-type="string" office:string-value="https://github.com/unfoldingWord-box3/VscUsfmEditAlign">
            <text:p>https://github.com/unfoldingWord-box3/VscUsfmEditAlign</text:p>
          </table:table-cell>
          <table:table-cell office:value-type="string" office:string-value="2024-02-15T14:03:06Z">
            <text:p>2024-02-15T14:03:0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webhook-relay">
            <text:p>webhook-relay</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8-01-22T23:48:40Z">
            <text:p>2018-01-22T23:48:40Z</text:p>
          </table:table-cell>
          <table:table-cell office:value-type="string" office:string-value="2018-01-22T23:48:02Z">
            <text:p>2018-01-22T23:48: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scsoft/webhook-relay">
            <text:p>lscsoft/webhook-relay</text:p>
          </table:table-cell>
          <table:table-cell office:value-type="string" office:string-value="tpdownes">
            <text:p>tpdownes</text:p>
          </table:table-cell>
          <table:table-cell office:value-type="string" office:string-value="0">
            <text:p>0</text:p>
          </table:table-cell>
          <table:table-cell office:value-type="string" office:string-value="0">
            <text:p>0</text:p>
          </table:table-cell>
          <table:table-cell office:value-type="string" office:string-value="https://github.com/unfoldingWord-dev/webhook-relay">
            <text:p>https://github.com/unfoldingWord-dev/webhook-relay</text:p>
          </table:table-cell>
          <table:table-cell office:value-type="string" office:string-value="2018-06-06T20:21:12Z">
            <text:p>2018-06-06T20:21:12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alignment-editor-rcl">
            <text:p>alignment-editor-rcl</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1-06-24T05:19:56Z">
            <text:p>2021-06-24T05:19:56Z</text:p>
          </table:table-cell>
          <table:table-cell office:value-type="string" office:string-value="2021-06-21T20:30:54Z">
            <text:p>2021-06-21T20:30: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lignment-editor-rcl">
            <text:p>alignment-edito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chor-alignment-poc">
            <text:p>anchor-alignment-poc</text:p>
          </table:table-cell>
          <table:table-cell office:value-type="string" office:string-value="">
            <text:p/>
          </table:table-cell>
          <table:table-cell office:value-type="string" office:string-value="gbin-org/alignment-editor-rcl">
            <text:p>gbin-org/alignment-editor-rcl</text:p>
          </table:table-cell>
          <table:table-cell office:value-type="string" office:string-value="['themikejr', 'ancientTexts-net']">
            <text:p>['themikejr',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editor-rcl">
            <text:p>https://github.com/unfoldingWord-box3/alignment-editor-rcl</text:p>
          </table:table-cell>
          <table:table-cell office:value-type="string" office:string-value="2022-06-14T15:15:26Z">
            <text:p>2022-06-14T15:15:26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bible-reference-range">
            <text:p>bible-reference-rang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2-07T19:15:38Z">
            <text:p>2023-12-07T19:15:38Z</text:p>
          </table:table-cell>
          <table:table-cell office:value-type="string" office:string-value="2023-12-07T18:20:14Z">
            <text:p>2023-12-07T18:20: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ible-reference-range">
            <text:p>bible-reference-range</text:p>
          </table:table-cell>
          <table:table-cell office:value-type="string" office:string-value="False">
            <text:p>False</text:p>
          </table:table-cell>
          <table:table-cell office:value-type="string" office:string-value="13895">
            <text:p>13895</text:p>
          </table:table-cell>
          <table:table-cell office:value-type="string" office:string-value="2023-12-07T19:15:35.590Z">
            <text:p>2023-12-07T19:15:35.590Z</text:p>
          </table:table-cell>
          <table:table-cell office:value-type="string" office:string-value="['checking-extension', 'alignment-playground', 'tc-create-app', 'single-scripture-rcl', 'translation-helps-rcl', 'enhanced-word-aligner-rcl', 'scripture-resources-rcl', 'word-aligner-rcl', 'uw-quote-helpers', 'translationCore', 'word-aligner-lib', 'tsv-groupdata-parser', 'checking-tool-rcl', 'bible-reference-rcl', 'scripture-tsv', 'uw-bible-parser']">
            <text:p>['checking-extension', 'alignment-playground', 'tc-create-app', 'single-scripture-rcl', 'translation-helps-rcl', 'enhanced-word-aligner-rcl', 'scripture-resources-rcl', 'word-aligner-rcl', 'uw-quote-helpers', 'translationCore', 'word-aligner-lib', 'tsv-groupdata-parser', 'checking-tool-rcl', 'bible-reference-rcl', 'scripture-tsv', 'uw-bible-parser']</text:p>
          </table:table-cell>
          <table:table-cell office:value-type="string" office:string-value="">
            <text:p/>
          </table:table-cell>
          <table:table-cell office:value-type="string" office:string-value="">
            <text:p/>
          </table:table-cell>
          <table:table-cell office:value-type="string" office:string-value="['Joel-C-Johnson', 'PhotoNomad0', 'kintsoogi', 'jincypjose']">
            <text:p>['Joel-C-Johnson', 'PhotoNomad0', 'kintsoogi',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ible-reference-range">
            <text:p>https://github.com/unfoldingWord/bible-reference-range</text:p>
          </table:table-cell>
          <table:table-cell office:value-type="string" office:string-value="2023-07-19T04:20:40Z">
            <text:p>2023-07-19T04:20:40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3895 downloads in the last year).">
            <text:p>Package has detected local usage, GitHub dependents, or significant npm downloads (13895 downloads in the last year).</text:p>
          </table:table-cell>
        </table:table-row>
        <table:table-row>
          <table:table-cell office:value-type="string" office:string-value="bible-reference-rcl">
            <text:p>bible-referenc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04T12:41:01Z">
            <text:p>2024-06-04T12:41:01Z</text:p>
          </table:table-cell>
          <table:table-cell office:value-type="string" office:string-value="2024-06-04T12:38:41Z">
            <text:p>2024-06-04T12:38:41Z</text:p>
          </table:table-cell>
          <table:table-cell office:value-type="string" office:string-value="2024-06-06T22:07:09Z">
            <text:p>2024-06-06T22:07:09Z</text:p>
          </table:table-cell>
          <table:table-cell office:value-type="string" office:string-value="6">
            <text:p>6</text:p>
          </table:table-cell>
          <table:table-cell office:value-type="string" office:string-value="0">
            <text:p>0</text:p>
          </table:table-cell>
          <table:table-cell office:value-type="string" office:string-value="bible-reference-rcl">
            <text:p>bible-reference-rcl</text:p>
          </table:table-cell>
          <table:table-cell office:value-type="string" office:string-value="False">
            <text:p>False</text:p>
          </table:table-cell>
          <table:table-cell office:value-type="string" office:string-value="4643">
            <text:p>4643</text:p>
          </table:table-cell>
          <table:table-cell office:value-type="string" office:string-value="2024-06-04T12:40:10.075Z">
            <text:p>2024-06-04T12:40:10.075Z</text:p>
          </table:table-cell>
          <table:table-cell office:value-type="string" office:string-value="['bible-preview-app', 'gateway-edit', 'anchor-alignment-poc', 'create-app', 'greek-apparatus-app', 'door43-preview-app', 'bsa', 'scripture-tsv', 'gateway-translate', '@oce-editor-tools/joy-pk', '@oce-editor-tools/mui-pk']">
            <text:p>['bible-preview-app', 'gateway-edit', 'anchor-alignment-poc', 'create-app', 'greek-apparatus-app', 'door43-preview-app', 'bsa', 'scripture-tsv', 'gateway-translate', '@oce-editor-tools/joy-pk', '@oce-editor-tools/mui-pk']</text:p>
          </table:table-cell>
          <table:table-cell office:value-type="string" office:string-value="bible-reference-range">
            <text:p>bible-reference-range</text:p>
          </table:table-cell>
          <table:table-cell office:value-type="string" office:string-value="['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office:string-value="['PhotoNomad0', 'mannycolon', 'foxprogs', 'Joel-C-Johnson', 'kintsoogi', 'richmahn']">
            <text:p>['PhotoNomad0', 'mannycolon', 'foxprogs', 'Joel-C-Johnson', 'kintsoogi', 'richmahn']</text:p>
          </table:table-cell>
          <table:table-cell office:value-type="string" office:string-value="2">
            <text:p>2</text:p>
          </table:table-cell>
          <table:table-cell office:value-type="string" office:string-value="0">
            <text:p>0</text:p>
          </table:table-cell>
          <table:table-cell office:value-type="string" office:string-value="https://github.com/unfoldingWord/bible-reference-rcl">
            <text:p>https://github.com/unfoldingWord/bible-reference-rcl</text:p>
          </table:table-cell>
          <table:table-cell office:value-type="string" office:string-value="2024-06-04T12:38:45Z">
            <text:p>2024-06-04T12:38:45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643 downloads in the last year).">
            <text:p>Package has detected local usage, GitHub dependents, or significant npm downloads (4643 downloads in the last year).</text:p>
          </table:table-cell>
        </table:table-row>
        <table:table-row>
          <table:table-cell office:value-type="string" office:string-value="book-package-rcl">
            <text:p>book-packag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2T13:43:17Z">
            <text:p>2023-01-02T13:43:17Z</text:p>
          </table:table-cell>
          <table:table-cell office:value-type="string" office:string-value="2023-01-02T13:22:57Z">
            <text:p>2023-01-02T13:22:57Z</text:p>
          </table:table-cell>
          <table:table-cell office:value-type="string" office:string-value="">
            <text:p/>
          </table:table-cell>
          <table:table-cell office:value-type="string" office:string-value="10">
            <text:p>10</text:p>
          </table:table-cell>
          <table:table-cell office:value-type="string" office:string-value="8">
            <text:p>8</text:p>
          </table:table-cell>
          <table:table-cell office:value-type="string" office:string-value="book-package-rcl">
            <text:p>book-package-rcl</text:p>
          </table:table-cell>
          <table:table-cell office:value-type="string" office:string-value="False">
            <text:p>False</text:p>
          </table:table-cell>
          <table:table-cell office:value-type="string" office:string-value="2170">
            <text:p>2170</text:p>
          </table:table-cell>
          <table:table-cell office:value-type="string" office:string-value="2023-01-02T13:16:20.145Z">
            <text:p>2023-01-02T13:16:20.145Z</text:p>
          </table:table-cell>
          <table:table-cell office:value-type="string" office:string-value="book-package-app">
            <text:p>book-package-app</text:p>
          </table:table-cell>
          <table:table-cell office:value-type="string" office:string-value="['usfm-js', 'uw-word-count']">
            <text:p>['usfm-js', 'uw-word-count']</text:p>
          </table:table-cell>
          <table:table-cell office:value-type="string" office:string-value="unfoldingWord/book-package-app">
            <text:p>unfoldingWord/book-package-app</text:p>
          </table:table-cell>
          <table:table-cell office:value-type="string" office:string-value="['mandolyte', 'abelpz', 'dependabot[bot]']">
            <text:p>['mandolyte', 'abelpz',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ok-package-rcl">
            <text:p>https://github.com/unfoldingWord/book-package-rcl</text:p>
          </table:table-cell>
          <table:table-cell office:value-type="string" office:string-value="2022-06-14T14:25:45Z">
            <text:p>2022-06-14T14:25:45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170 downloads in the last year).">
            <text:p>Package has detected local usage, GitHub dependents, or significant npm downloads (2170 downloads in the last year).</text:p>
          </table:table-cell>
        </table:table-row>
        <table:table-row>
          <table:table-cell office:value-type="string" office:string-value="checking-tool-wrapper">
            <text:p>checking-tool-wr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48:38Z">
            <text:p>2026-01-21T23:48:38Z</text:p>
          </table:table-cell>
          <table:table-cell office:value-type="string" office:string-value="2024-12-06T22:02:10Z">
            <text:p>2024-12-06T22:02:10Z</text:p>
          </table:table-cell>
          <table:table-cell office:value-type="string" office:string-value="2021-06-29T21:55:08Z">
            <text:p>2021-06-29T21:55:08Z</text:p>
          </table:table-cell>
          <table:table-cell office:value-type="string" office:string-value="18">
            <text:p>18</text:p>
          </table:table-cell>
          <table:table-cell office:value-type="string" office:string-value="18">
            <text:p>18</text:p>
          </table:table-cell>
          <table:table-cell office:value-type="string" office:string-value="checking-tool-wrapper">
            <text:p>checking-tool-wrapp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translationWords', 'translationNotes']">
            <text:p>['translationCore', 'translationWords', 'translationNotes']</text:p>
          </table:table-cell>
          <table:table-cell office:value-type="string" office:string-value="['gogs-client', 'selections', 'string-punctuation-tokenizer', 'tc-tool', 'tc-ui-toolkit', 'usfm-js', 'word-aligner']">
            <text:p>['gogs-client', 'selections', 'string-punctuation-tokenizer', 'tc-tool', 'tc-ui-toolkit', 'usfm-js', 'word-aligner']</text:p>
          </table:table-cell>
          <table:table-cell office:value-type="string" office:string-value="">
            <text:p/>
          </table:table-cell>
          <table:table-cell office:value-type="string" office:string-value="['mannycolon', 'PhotoNomad0', 'RoyalSix', 'da1nerd', 'richmahn', 'Sterling (Jay) Scott', 'dependabot[bot]']">
            <text:p>['mannycolon', 'PhotoNomad0', 'RoyalSix', 'da1nerd', 'richmahn', 'Sterling (Jay) Scott', 'dependabot[bot]']</text:p>
          </table:table-cell>
          <table:table-cell office:value-type="string" office:string-value="2">
            <text:p>2</text:p>
          </table:table-cell>
          <table:table-cell office:value-type="string" office:string-value="0">
            <text:p>0</text:p>
          </table:table-cell>
          <table:table-cell office:value-type="string" office:string-value="https://github.com/unfoldingWord/checking-tool-wrapper">
            <text:p>https://github.com/unfoldingWord/checking-tool-wrapper</text:p>
          </table:table-cell>
          <table:table-cell office:value-type="string" office:string-value="2024-12-06T22:02:15Z">
            <text:p>2024-12-06T22:02:15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datatable-translatable">
            <text:p>datatable-translatab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05T15:19:12Z">
            <text:p>2026-03-05T15:19:12Z</text:p>
          </table:table-cell>
          <table:table-cell office:value-type="string" office:string-value="2026-03-04T13:44:54Z">
            <text:p>2026-03-04T13:44:54Z</text:p>
          </table:table-cell>
          <table:table-cell office:value-type="string" office:string-value="">
            <text:p/>
          </table:table-cell>
          <table:table-cell office:value-type="string" office:string-value="10">
            <text:p>10</text:p>
          </table:table-cell>
          <table:table-cell office:value-type="string" office:string-value="9">
            <text:p>9</text:p>
          </table:table-cell>
          <table:table-cell office:value-type="string" office:string-value="datatable-translatable">
            <text:p>datatable-translatable</text:p>
          </table:table-cell>
          <table:table-cell office:value-type="string" office:string-value="False">
            <text:p>False</text:p>
          </table:table-cell>
          <table:table-cell office:value-type="string" office:string-value="3165">
            <text:p>3165</text:p>
          </table:table-cell>
          <table:table-cell office:value-type="string" office:string-value="2026-02-02T16:12:05.648Z">
            <text:p>2026-02-02T16:12:05.648Z</text:p>
          </table:table-cell>
          <table:table-cell office:value-type="string" office:string-value="['tc-create-app', 'greek-apparatus-app']">
            <text:p>['tc-create-app', 'greek-apparatus-app']</text:p>
          </table:table-cell>
          <table:table-cell office:value-type="string" office:string-value="['markdown-translatable', '@unfoldingword/eslint-config']">
            <text:p>['markdown-translatable', '@unfoldingword/eslint-config']</text:p>
          </table:table-cell>
          <table:table-cell office:value-type="string" office:string-value="['Bridgeconn/tc-create-offline', 'RevantCI/uw-lab', 'unfoldingWord-box3/greek-apparatus-app', 'unfoldingWord/tc-create-app']">
            <text:p>['Bridgeconn/tc-create-offline', 'RevantCI/uw-lab', 'unfoldingWord-box3/greek-apparatus-app', 'unfoldingWord/tc-create-app']</text:p>
          </table:table-cell>
          <table:table-cell office:value-type="string" office:string-value="['ancientTexts-net', 'mandolyte', 'Joel-C-Johnson', 'klappy', 'RoyalSix', 'superdav42', 'jincypjose', 'abelpz', 'Sterling (Jay) Scott', 'dependabot[bot]', 'Dave', 'eliaspinero']">
            <text:p>['ancientTexts-net', 'mandolyte', 'Joel-C-Johnson', 'klappy', 'RoyalSix', 'superdav42', 'jincypjose', 'abelpz', 'Sterling (Jay) Scott', 'dependabot[bot]', 'Dave', 'eliaspinero']</text:p>
          </table:table-cell>
          <table:table-cell office:value-type="string" office:string-value="0">
            <text:p>0</text:p>
          </table:table-cell>
          <table:table-cell office:value-type="string" office:string-value="0">
            <text:p>0</text:p>
          </table:table-cell>
          <table:table-cell office:value-type="string" office:string-value="https://github.com/unfoldingWord/datatable-translatable">
            <text:p>https://github.com/unfoldingWord/datatable-translatable</text:p>
          </table:table-cell>
          <table:table-cell office:value-type="string" office:string-value="2026-03-04T13:45:00Z">
            <text:p>2026-03-04T13:45:00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165 downloads in the last year).">
            <text:p>Package has detected local usage, GitHub dependents, or significant npm downloads (3165 downloads in the last year).</text:p>
          </table:table-cell>
        </table:table-row>
        <table:table-row>
          <table:table-cell office:value-type="string" office:string-value="dcs-branch-merger">
            <text:p>dcs-branch-merg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8T01:12:51Z">
            <text:p>2026-03-28T01:12:51Z</text:p>
          </table:table-cell>
          <table:table-cell office:value-type="string" office:string-value="2026-03-27T21:56:40Z">
            <text:p>2026-03-27T21:56:40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dcs-branch-merger">
            <text:p>dcs-branch-merger</text:p>
          </table:table-cell>
          <table:table-cell office:value-type="string" office:string-value="False">
            <text:p>False</text:p>
          </table:table-cell>
          <table:table-cell office:value-type="string" office:string-value="3244">
            <text:p>3244</text:p>
          </table:table-cell>
          <table:table-cell office:value-type="string" office:string-value="2026-03-27T21:57:39.012Z">
            <text:p>2026-03-27T21:57:39.012Z</text:p>
          </table:table-cell>
          <table:table-cell office:value-type="string" office:string-value="['tc-create-app', 'translation-helps-rcl', 'gateway-admin']">
            <text:p>['tc-create-app', 'translation-helps-rcl', 'gateway-admin']</text:p>
          </table:table-cell>
          <table:table-cell office:value-type="string" office:string-value="dcs-js">
            <text:p>dcs-js</text:p>
          </table:table-cell>
          <table:table-cell office:value-type="string" office:string-value="['unfoldingWord/single-scripture-rcl', 'unfoldingWord/translation-helps-rcl', 'unfoldingWord/gateway-edit', 'bible-technology/scribe-scripture-editor', 'unfoldingWord/tc-create-app', 'unfoldingWord/gateway-translate', 'friendsofagape/autographa', 'vipinpaul/autographa', 'unfoldingWord/gateway-admin']">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office:string-value="['mandolyte', 'richmahn', 'theNerd247', 'PhotoNomad0']">
            <text:p>['mandolyte', 'richmahn', 'theNerd247',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cs-branch-merger">
            <text:p>https://github.com/unfoldingWord/dcs-branch-merger</text:p>
          </table:table-cell>
          <table:table-cell office:value-type="string" office:string-value="2026-03-27T21:56:46Z">
            <text:p>2026-03-27T21:56:46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244 downloads in the last year).">
            <text:p>Package has detected local usage, GitHub dependents, or significant npm downloads (3244 downloads in the last year).</text:p>
          </table:table-cell>
        </table:table-row>
        <table:table-row>
          <table:table-cell office:value-type="string" office:string-value="dcs-js">
            <text:p>dcs-j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1T04:09:41Z">
            <text:p>2023-01-01T04:09:41Z</text:p>
          </table:table-cell>
          <table:table-cell office:value-type="string" office:string-value="2022-11-02T13:14:23Z">
            <text:p>2022-11-02T13:14:23Z</text:p>
          </table:table-cell>
          <table:table-cell office:value-type="string" office:string-value="2022-10-29T20:10:49Z">
            <text:p>2022-10-29T20:10:49Z</text:p>
          </table:table-cell>
          <table:table-cell office:value-type="string" office:string-value="0">
            <text:p>0</text:p>
          </table:table-cell>
          <table:table-cell office:value-type="string" office:string-value="0">
            <text:p>0</text:p>
          </table:table-cell>
          <table:table-cell office:value-type="string" office:string-value="dcs-js">
            <text:p>dcs-js</text:p>
          </table:table-cell>
          <table:table-cell office:value-type="string" office:string-value="False">
            <text:p>False</text:p>
          </table:table-cell>
          <table:table-cell office:value-type="string" office:string-value="512">
            <text:p>512</text:p>
          </table:table-cell>
          <table:table-cell office:value-type="string" office:string-value="2022-11-02T13:18:25.384Z">
            <text:p>2022-11-02T13:18:25.384Z</text:p>
          </table:table-cell>
          <table:table-cell office:value-type="string" office:string-value="['bible-preview-app', 'dcs-login', 'dcs-branch-merger', 'gateway-translate', 'dcs-react-hooks', 'dcs-js-example']">
            <text:p>['bible-preview-app', 'dcs-login', 'dcs-branch-merger', 'gateway-translate', 'dcs-react-hooks', 'dcs-js-example']</text:p>
          </table:table-cell>
          <table:table-cell office:value-type="string" office:string-value="">
            <text:p/>
          </table:table-cell>
          <table:table-cell office:value-type="string" office:string-value="['nishantshah-me/docusaurus', 'unfoldingWord/dcs-branch-merger', 'unfoldingWord-box3/bible-preview-app', 'unfoldingWord/gateway-translate']">
            <text:p>['nishantshah-me/docusaurus', 'unfoldingWord/dcs-branch-merger', 'unfoldingWord-box3/bible-preview-app', 'unfoldingWord/gateway-translate']</text:p>
          </table:table-cell>
          <table:table-cell office:value-type="string" office:string-value="['abelpz', 'richmahn']">
            <text:p>['abelpz', 'richmahn']</text:p>
          </table:table-cell>
          <table:table-cell office:value-type="string" office:string-value="3">
            <text:p>3</text:p>
          </table:table-cell>
          <table:table-cell office:value-type="string" office:string-value="0">
            <text:p>0</text:p>
          </table:table-cell>
          <table:table-cell office:value-type="string" office:string-value="https://github.com/unfoldingWord/dcs-js">
            <text:p>https://github.com/unfoldingWord/dcs-js</text:p>
          </table:table-cell>
          <table:table-cell office:value-type="string" office:string-value="2022-10-29T01:30:37Z">
            <text:p>2022-10-29T01:30:37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12 downloads in the last year).">
            <text:p>Package has detected local usage, GitHub dependents, or significant npm downloads (512 downloads in the last year).</text:p>
          </table:table-cell>
        </table:table-row>
        <table:table-row>
          <table:table-cell office:value-type="string" office:string-value="electronite-cli">
            <text:p>electronite-cli</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2T20:59:24Z">
            <text:p>2026-01-22T20:59:24Z</text:p>
          </table:table-cell>
          <table:table-cell office:value-type="string" office:string-value="2022-05-15T19:25:29Z">
            <text:p>2022-05-15T19:25:29Z</text:p>
          </table:table-cell>
          <table:table-cell office:value-type="string" office:string-value="2026-01-08T18:38:22Z">
            <text:p>2026-01-08T18:38:22Z</text:p>
          </table:table-cell>
          <table:table-cell office:value-type="string" office:string-value="0">
            <text:p>0</text:p>
          </table:table-cell>
          <table:table-cell office:value-type="string" office:string-value="0">
            <text:p>0</text:p>
          </table:table-cell>
          <table:table-cell office:value-type="string" office:string-value="electronite">
            <text:p>electronite</text:p>
          </table:table-cell>
          <table:table-cell office:value-type="string" office:string-value="False">
            <text:p>False</text:p>
          </table:table-cell>
          <table:table-cell office:value-type="string" office:string-value="2488">
            <text:p>2488</text:p>
          </table:table-cell>
          <table:table-cell office:value-type="string" office:string-value="2026-01-22T21:05:02.866Z">
            <text:p>2026-01-22T21:05:02.866Z</text:p>
          </table:table-cell>
          <table:table-cell office:value-type="string" office:string-value="translationCore">
            <text:p>translationCore</text:p>
          </table:table-cell>
          <table:table-cell office:value-type="string" office:string-value="">
            <text:p/>
          </table:table-cell>
          <table:table-cell office:value-type="string" office:string-value="['unfoldingWord/gateway-edit', 'Bridgeconn/tc-create-offline', 'Proskomma/proskomma-legacy-projects', 'friendsofagape/autographa', 'gbin-org/alignment-editor-rcl-poc', 'unfoldingWord/translationCore', 'mannycolon/electronite-poc-app']">
            <text:p>['unfoldingWord/gateway-edit', 'Bridgeconn/tc-create-offline', 'Proskomma/proskomma-legacy-projects', 'friendsofagape/autographa', 'gbin-org/alignment-editor-rcl-poc', 'unfoldingWord/translationCore', 'mannycolon/electronite-poc-app']</text:p>
          </table:table-cell>
          <table:table-cell office:value-type="string" office:string-value="['da1nerd', 'PhotoNomad0']">
            <text:p>['da1nerd', 'PhotoNomad0']</text:p>
          </table:table-cell>
          <table:table-cell office:value-type="string" office:string-value="32">
            <text:p>32</text:p>
          </table:table-cell>
          <table:table-cell office:value-type="string" office:string-value="0">
            <text:p>0</text:p>
          </table:table-cell>
          <table:table-cell office:value-type="string" office:string-value="https://github.com/unfoldingWord-dev/electronite-cli">
            <text:p>https://github.com/unfoldingWord-dev/electronite-cli</text:p>
          </table:table-cell>
          <table:table-cell office:value-type="string" office:string-value="2023-09-04T12:03:41Z">
            <text:p>2023-09-04T12:03:41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enhanced-word-aligner-rcl">
            <text:p>enhanced-word-aligner-rc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3-24T14:39:17Z">
            <text:p>2026-03-24T14:39:17Z</text:p>
          </table:table-cell>
          <table:table-cell office:value-type="string" office:string-value="2026-03-24T14:39:14Z">
            <text:p>2026-03-24T14:39:14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enhanced-word-aligner-rcl">
            <text:p>enhanced-word-aligner-rcl</text:p>
          </table:table-cell>
          <table:table-cell office:value-type="string" office:string-value="False">
            <text:p>False</text:p>
          </table:table-cell>
          <table:table-cell office:value-type="string" office:string-value="23444">
            <text:p>23444</text:p>
          </table:table-cell>
          <table:table-cell office:value-type="string" office:string-value="2026-03-24T14:38:54.315Z">
            <text:p>2026-03-24T14:38:54.315Z</text:p>
          </table:table-cell>
          <table:table-cell office:value-type="string" office:string-value="gateway-edit">
            <text:p>gateway-edit</text:p>
          </table:table-cell>
          <table:table-cell office:value-type="string" office:string-value="['bible-reference-range', 'uw-wordmapbooster', '@unfoldingword/eslint-config', 'usfm-js', 'word-aligner-rcl']">
            <text:p>['bible-reference-range', 'uw-wordmapbooster', '@unfoldingword/eslint-config', 'usfm-js', 'word-aligner-rcl']</text:p>
          </table:table-cell>
          <table:table-cell office:value-type="string" office:string-value="unfoldingWord/gateway-edit">
            <text:p>unfoldingWord/gateway-edit</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enhanced-word-aligner-rcl">
            <text:p>https://github.com/unfoldingWord/enhanced-word-aligner-rcl</text:p>
          </table:table-cell>
          <table:table-cell office:value-type="string" office:string-value="2026-03-24T14:39:30Z">
            <text:p>2026-03-24T14:39:30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3444 downloads in the last year).">
            <text:p>Package has detected local usage, GitHub dependents, or significant npm downloads (23444 downloads in the last year).</text:p>
          </table:table-cell>
        </table:table-row>
        <table:table-row>
          <table:table-cell office:value-type="string" office:string-value="epitelete-html">
            <text:p>epitelete-htm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4-18T13:52:37Z">
            <text:p>2024-04-18T13:52:37Z</text:p>
          </table:table-cell>
          <table:table-cell office:value-type="string" office:string-value="2023-02-03T17:24:52Z">
            <text:p>2023-02-03T17:24:52Z</text:p>
          </table:table-cell>
          <table:table-cell office:value-type="string" office:string-value="">
            <text:p/>
          </table:table-cell>
          <table:table-cell office:value-type="string" office:string-value="4">
            <text:p>4</text:p>
          </table:table-cell>
          <table:table-cell office:value-type="string" office:string-value="3">
            <text:p>3</text:p>
          </table:table-cell>
          <table:table-cell office:value-type="string" office:string-value="epitelete-html">
            <text:p>epitelete-html</text:p>
          </table:table-cell>
          <table:table-cell office:value-type="string" office:string-value="False">
            <text:p>False</text:p>
          </table:table-cell>
          <table:table-cell office:value-type="string" office:string-value="7454">
            <text:p>7454</text:p>
          </table:table-cell>
          <table:table-cell office:value-type="string" office:string-value="2023-07-16T00:28:17.570Z">
            <text:p>2023-07-16T00:28:17.570Z</text:p>
          </table:table-cell>
          <table:table-cell office:value-type="string" office:string-value="['beta-bibel-wiki', 'OCE Oak Edit', 'oce-oak-render', 'uw-editor', '@oce-editor-tools/base-core', '@oce-editor-tools/joy-core', '@oce-editor-tools/joy-pk', '@oce-editor-tools/mui-core', '@oce-editor-tools/mui-pk', '@oce-editor-tools/mui-simple', '@oce-editor-tools/pk-aligner']">
            <text:p>['beta-bibel-wiki', 'OCE Oak Edit', 'oce-oak-render', 'uw-editor', '@oce-editor-tools/base-core', '@oce-editor-tools/joy-core', '@oce-editor-tools/joy-pk', '@oce-editor-tools/mui-core', '@oce-editor-tools/mui-pk', '@oce-editor-tools/mui-simple', '@oce-editor-tools/pk-aligner']</text:p>
          </table:table-cell>
          <table:table-cell office:value-type="string" office:string-value="uw-proskomma">
            <text:p>uw-proskomma</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office:string-value="['abelpz', 'mvahowe', 'mandolyte', 'samueljd', 'klappy']">
            <text:p>['abelpz', 'mvahowe', 'mandolyte', 'samueljd', 'klappy']</text:p>
          </table:table-cell>
          <table:table-cell office:value-type="string" office:string-value="0">
            <text:p>0</text:p>
          </table:table-cell>
          <table:table-cell office:value-type="string" office:string-value="0">
            <text:p>0</text:p>
          </table:table-cell>
          <table:table-cell office:value-type="string" office:string-value="https://github.com/unfoldingWord/epitelete-html">
            <text:p>https://github.com/unfoldingWord/epitelete-html</text:p>
          </table:table-cell>
          <table:table-cell office:value-type="string" office:string-value="2023-02-02T13:14:15Z">
            <text:p>2023-02-02T13:14:15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454 downloads in the last year).">
            <text:p>Package has detected local usage, GitHub dependents, or significant npm downloads (7454 downloads in the last year).</text:p>
          </table:table-cell>
        </table:table-row>
        <table:table-row>
          <table:table-cell office:value-type="string" office:string-value="eslint-config">
            <text:p>eslint-config</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7T20:47:13Z">
            <text:p>2023-01-07T20:47:13Z</text:p>
          </table:table-cell>
          <table:table-cell office:value-type="string" office:string-value="2020-12-15T23:29:03Z">
            <text:p>2020-12-15T23:29:03Z</text:p>
          </table:table-cell>
          <table:table-cell office:value-type="string" office:string-value="">
            <text:p/>
          </table:table-cell>
          <table:table-cell office:value-type="string" office:string-value="7">
            <text:p>7</text:p>
          </table:table-cell>
          <table:table-cell office:value-type="string" office:string-value="6">
            <text:p>6</text:p>
          </table:table-cell>
          <table:table-cell office:value-type="string" office:string-value="@unfoldingword/eslint-config">
            <text:p>@unfoldingword/eslint-confi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e-text-editor-rcl', 'tc-create-app', 'gitea-offline-poc', 'gitea-react-toolkit', 'single-scripture-rcl', 'enhanced-word-aligner-rcl', 'scripture-resources-rcl', 'datatable-translatable', 'markdown-translatable', 'dcs-react-hooks', 'resource-workspace-rcl']">
            <text:p>['simple-text-editor-rcl', 'tc-create-app', 'gitea-offline-poc', 'gitea-react-toolkit', 'single-scripture-rcl', 'enhanced-word-aligner-rcl', 'scripture-resources-rcl', 'datatable-translatable', 'markdown-translatable', 'dcs-react-hooks', 'resource-workspace-rcl']</text:p>
          </table:table-cell>
          <table:table-cell office:value-type="string" office:string-value="">
            <text:p/>
          </table:table-cell>
          <table:table-cell office:value-type="string" office:string-value="">
            <text:p/>
          </table:table-cell>
          <table:table-cell office:value-type="string" office:string-value="['RoyalSix', 'Sterling (Jay) Scott']">
            <text:p>['RoyalSix',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eslint-config">
            <text:p>https://github.com/unfoldingWord/eslint-config</text:p>
          </table:table-cell>
          <table:table-cell office:value-type="string" office:string-value="2020-12-15T23:29:10Z">
            <text:p>2020-12-15T23:29:10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gitea-react-toolkit">
            <text:p>gitea-react-toolk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2T13:12:04Z">
            <text:p>2026-05-12T13:12:04Z</text:p>
          </table:table-cell>
          <table:table-cell office:value-type="string" office:string-value="2026-05-12T13:12:04Z">
            <text:p>2026-05-12T13:12:04Z</text:p>
          </table:table-cell>
          <table:table-cell office:value-type="string" office:string-value="2020-04-23T14:49:23Z">
            <text:p>2020-04-23T14:49:23Z</text:p>
          </table:table-cell>
          <table:table-cell office:value-type="string" office:string-value="27">
            <text:p>27</text:p>
          </table:table-cell>
          <table:table-cell office:value-type="string" office:string-value="21">
            <text:p>21</text:p>
          </table:table-cell>
          <table:table-cell office:value-type="string" office:string-value="gitea-react-toolkit">
            <text:p>gitea-react-toolkit</text:p>
          </table:table-cell>
          <table:table-cell office:value-type="string" office:string-value="False">
            <text:p>False</text:p>
          </table:table-cell>
          <table:table-cell office:value-type="string" office:string-value="15978">
            <text:p>15978</text:p>
          </table:table-cell>
          <table:table-cell office:value-type="string" office:string-value="2026-05-12T13:15:42.563Z">
            <text:p>2026-05-12T13:15:42.563Z</text:p>
          </table:table-cell>
          <table:table-cell office:value-type="string" office:string-value="['next-js-template', 'resource-container-rcl', 'pdf-generator-rcl', 'hello-dcs-react-component-library', 'md-tsv-converter-app', 'tc-create-app', 'gateway-edit', 'anchor-alignment-poc', 'admin-app', 'create-app', 'greek-apparatus-app', 'book-package-viewer-poc', 'gitea-offline-poc', 'scripture-burrito-react-jsonschema-form', 'single-scripture-rcl', 'translation-helps-rcl', 'scripture-resources-rcl', 'gateway-admin', 'resource-workspace-rcl', 'resource-checker']">
            <text:p>['next-js-template', 'resource-container-rcl', 'pdf-generator-rcl', 'hello-dcs-react-component-library', 'md-tsv-converter-app', 'tc-create-app', 'gateway-edit', 'anchor-alignment-poc', 'admin-app', 'create-app', 'greek-apparatus-app', 'book-package-viewer-poc', 'gitea-offline-poc', 'scripture-burrito-react-jsonschema-form', 'single-scripture-rcl', 'translation-helps-rcl', 'scripture-resources-rcl', 'gateway-admin', 'resource-workspace-rcl', 'resource-checker']</text:p>
          </table:table-cell>
          <table:table-cell office:value-type="string" office:string-value="['markdown-translatable', '@unfoldingword/eslint-config']">
            <text:p>['markdown-translatable', '@unfoldingword/eslint-config']</text:p>
          </table:table-cell>
          <table:table-cell office:value-type="string" office:string-value="['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office:string-value="['klappy', 'RoyalSix', 'ancientTexts-net', 'mannycolon', 'actions-user', 'PhotoNomad0', 'mandolyte', 'Sterling (Jay) Scott', 'superdav42', 'Joel-C-Johnson', 'jincypjose', 'kintsoogi', 'richmahn', 'rady-ben']">
            <text:p>['klappy', 'RoyalSix', 'ancientTexts-net', 'mannycolon', 'actions-user', 'PhotoNomad0', 'mandolyte', 'Sterling (Jay) Scott', 'superdav42', 'Joel-C-Johnson', 'jincypjose', 'kintsoogi', 'richmahn', 'rady-ben']</text:p>
          </table:table-cell>
          <table:table-cell office:value-type="string" office:string-value="2">
            <text:p>2</text:p>
          </table:table-cell>
          <table:table-cell office:value-type="string" office:string-value="0">
            <text:p>0</text:p>
          </table:table-cell>
          <table:table-cell office:value-type="string" office:string-value="https://github.com/unfoldingWord/gitea-react-toolkit">
            <text:p>https://github.com/unfoldingWord/gitea-react-toolkit</text:p>
          </table:table-cell>
          <table:table-cell office:value-type="string" office:string-value="2026-05-12T13:17:57Z">
            <text:p>2026-05-12T13:17:57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5978 downloads in the last year).">
            <text:p>Package has detected local usage, GitHub dependents, or significant npm downloads (15978 downloads in the last year).</text:p>
          </table:table-cell>
        </table:table-row>
        <table:table-row>
          <table:table-cell office:value-type="string" office:string-value="markdown-translatable">
            <text:p>markdown-translatab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4-04T20:57:49Z">
            <text:p>2025-04-04T20:57:49Z</text:p>
          </table:table-cell>
          <table:table-cell office:value-type="string" office:string-value="2023-03-08T14:57:07Z">
            <text:p>2023-03-08T14:57:07Z</text:p>
          </table:table-cell>
          <table:table-cell office:value-type="string" office:string-value="">
            <text:p/>
          </table:table-cell>
          <table:table-cell office:value-type="string" office:string-value="20">
            <text:p>20</text:p>
          </table:table-cell>
          <table:table-cell office:value-type="string" office:string-value="20">
            <text:p>20</text:p>
          </table:table-cell>
          <table:table-cell office:value-type="string" office:string-value="markdown-translatable">
            <text:p>markdown-translatable</text:p>
          </table:table-cell>
          <table:table-cell office:value-type="string" office:string-value="False">
            <text:p>False</text:p>
          </table:table-cell>
          <table:table-cell office:value-type="string" office:string-value="16361">
            <text:p>16361</text:p>
          </table:table-cell>
          <table:table-cell office:value-type="string" office:string-value="2023-03-07T15:00:29.476Z">
            <text:p>2023-03-07T15:00:29.476Z</text:p>
          </table:table-cell>
          <table:table-cell office:value-type="string" office:string-value="['next-js-template', 'resource-container-rcl', 'pdf-generator-rcl', 'hello-dcs-react-component-library', 'obs-pdf-poc', 'md-tsv-converter-app', 'tc-create-app', 'gateway-edit', 'create-app', 'book-package-viewer-poc', 'gitea-offline-poc', 'scripture-burrito-react-jsonschema-form', 'tsv-editor', 'gitea-react-toolkit', 'translation-helps-rcl', 'scripture-resources-rcl', 'datatable-translatable', 'gateway-admin', 'resource-workspace-rcl', 'resource-checker']">
            <text:p>['next-js-template', 'resource-container-rcl', 'pdf-generator-rcl', 'hello-dcs-react-component-library', 'obs-pdf-poc', 'md-tsv-converter-app', 'tc-create-app', 'gateway-edit', 'create-app', 'book-package-viewer-poc', 'gitea-offline-poc', 'scripture-burrito-react-jsonschema-form', 'tsv-editor', 'gitea-react-toolkit', 'translation-helps-rcl', 'scripture-resources-rcl', 'datatable-translatable', 'gateway-admin', 'resource-workspace-rcl', 'resource-checker']</text:p>
          </table:table-cell>
          <table:table-cell office:value-type="string" office:string-value="@unfoldingword/eslint-config">
            <text:p>@unfoldingword/eslint-config</text:p>
          </table:table-cell>
          <table:table-cell office:value-type="string" office:string-value="['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office:string-value="['klappy', 'ancientTexts-net', 'RoyalSix', 'mannycolon', 'mandolyte', 'superdav42', 'Joel-C-Johnson', 'Sterling (Jay) Scott', 'jincypjose', 'dependabot[bot]', 'PhotoNomad0', 'larsgson']">
            <text:p>['klappy', 'ancientTexts-net', 'RoyalSix', 'mannycolon', 'mandolyte', 'superdav42', 'Joel-C-Johnson', 'Sterling (Jay) Scott', 'jincypjose', 'dependabot[bot]', 'PhotoNomad0', 'larsgson']</text:p>
          </table:table-cell>
          <table:table-cell office:value-type="string" office:string-value="0">
            <text:p>0</text:p>
          </table:table-cell>
          <table:table-cell office:value-type="string" office:string-value="0">
            <text:p>0</text:p>
          </table:table-cell>
          <table:table-cell office:value-type="string" office:string-value="https://github.com/unfoldingWord/markdown-translatable">
            <text:p>https://github.com/unfoldingWord/markdown-translatable</text:p>
          </table:table-cell>
          <table:table-cell office:value-type="string" office:string-value="2025-04-03T14:40:01Z">
            <text:p>2025-04-03T14:40:01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361 downloads in the last year).">
            <text:p>Package has detected local usage, GitHub dependents, or significant npm downloads (16361 downloads in the last year).</text:p>
          </table:table-cell>
        </table:table-row>
        <table:table-row>
          <table:table-cell office:value-type="string" office:string-value="node-gogs-client">
            <text:p>node-gogs-client</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19T16:22:58Z">
            <text:p>2021-04-19T16:22:58Z</text:p>
          </table:table-cell>
          <table:table-cell office:value-type="string" office:string-value="2018-09-12T17:40:36Z">
            <text:p>2018-09-12T17:40:36Z</text:p>
          </table:table-cell>
          <table:table-cell office:value-type="string" office:string-value="2018-06-05T18:06:48Z">
            <text:p>2018-06-05T18:06:48Z</text:p>
          </table:table-cell>
          <table:table-cell office:value-type="string" office:string-value="1">
            <text:p>1</text:p>
          </table:table-cell>
          <table:table-cell office:value-type="string" office:string-value="1">
            <text:p>1</text:p>
          </table:table-cell>
          <table:table-cell office:value-type="string" office:string-value="gogs-client">
            <text:p>gogs-client</text:p>
          </table:table-cell>
          <table:table-cell office:value-type="string" office:string-value="False">
            <text:p>False</text:p>
          </table:table-cell>
          <table:table-cell office:value-type="string" office:string-value="6531">
            <text:p>6531</text:p>
          </table:table-cell>
          <table:table-cell office:value-type="string" office:string-value="2016-07-13T00:07:45.833Z">
            <text:p>2016-07-13T00:07:45.833Z</text:p>
          </table:table-cell>
          <table:table-cell office:value-type="string" office:string-value="['translationCore', 'wordAlignment', 'checking-tool-wrapper']">
            <text:p>['translationCore', 'wordAlignment', 'checking-tool-wrapper']</text:p>
          </table:table-cell>
          <table:table-cell office:value-type="string" office:string-value="">
            <text:p/>
          </table:table-cell>
          <table:table-cell office:value-type="string" office:string-value="['FoustAndrew/wordAlignment', 'aunger/wacs-client', 'Bible-Translation-Tools/BTT-Writer-Desktop', 'unfoldingWord/wordAlignment', 'unfoldingWord/checking-tool-wrapper', 'unfoldingWord-dev/ts-desktop', 'dottgonzo/vue-starter', 'unfoldingWord/translationCore']">
            <text:p>['FoustAndrew/wordAlignment', 'aunger/wacs-client', 'Bible-Translation-Tools/BTT-Writer-Desktop', 'unfoldingWord/wordAlignment', 'unfoldingWord/checking-tool-wrapper', 'unfoldingWord-dev/ts-desktop', 'dottgonzo/vue-starter', 'unfoldingWord/translationCore']</text:p>
          </table:table-cell>
          <table:table-cell office:value-type="string" office:string-value="['da1nerd', 'Thomas Klemz', 'jonasof']">
            <text:p>['da1nerd', 'Thomas Klemz', 'jonasof']</text:p>
          </table:table-cell>
          <table:table-cell office:value-type="string" office:string-value="1">
            <text:p>1</text:p>
          </table:table-cell>
          <table:table-cell office:value-type="string" office:string-value="0">
            <text:p>0</text:p>
          </table:table-cell>
          <table:table-cell office:value-type="string" office:string-value="https://github.com/unfoldingWord-dev/node-gogs-client">
            <text:p>https://github.com/unfoldingWord-dev/node-gogs-client</text:p>
          </table:table-cell>
          <table:table-cell office:value-type="string" office:string-value="2024-06-21T17:58:57Z">
            <text:p>2024-06-21T17:58:57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node-resource-container">
            <text:p>node-resource-contain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5-08T20:11:54Z">
            <text:p>2017-05-08T20:11:54Z</text:p>
          </table:table-cell>
          <table:table-cell office:value-type="string" office:string-value="2017-01-04T01:13:31Z">
            <text:p>2017-01-04T01:13:31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resource-container">
            <text:p>resource-container</text:p>
          </table:table-cell>
          <table:table-cell office:value-type="string" office:string-value="False">
            <text:p>False</text:p>
          </table:table-cell>
          <table:table-cell office:value-type="string" office:string-value="2800">
            <text:p>2800</text:p>
          </table:table-cell>
          <table:table-cell office:value-type="string" office:string-value="2017-02-28T01:01:07.451Z">
            <text:p>2017-02-28T01:01:07.451Z</text:p>
          </table:table-cell>
          <table:table-cell office:value-type="string" office:string-value="door43-client">
            <text:p>door43-client</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node-resource-container">
            <text:p>https://github.com/unfoldingWord-dev/node-resource-container</text:p>
          </table:table-cell>
          <table:table-cell office:value-type="string" office:string-value="2017-03-07T23:45:06Z">
            <text:p>2017-03-07T23:45:06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800 downloads in the last year).">
            <text:p>Package has detected local usage, GitHub dependents, or significant npm downloads (2800 downloads in the last year).</text:p>
          </table:table-cell>
        </table:table-row>
        <table:table-row>
          <table:table-cell office:value-type="string" office:string-value="node-twl-generator">
            <text:p>node-twl-gener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4-09T20:31:39Z">
            <text:p>2026-04-09T20:31:39Z</text:p>
          </table:table-cell>
          <table:table-cell office:value-type="string" office:string-value="2026-04-09T20:31:34Z">
            <text:p>2026-04-09T20:31: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wl-generator">
            <text:p>twl-generator</text:p>
          </table:table-cell>
          <table:table-cell office:value-type="string" office:string-value="False">
            <text:p>False</text:p>
          </table:table-cell>
          <table:table-cell office:value-type="string" office:string-value="5141">
            <text:p>5141</text:p>
          </table:table-cell>
          <table:table-cell office:value-type="string" office:string-value="2026-04-09T20:31:44.832Z">
            <text:p>2026-04-09T20:31:44.832Z</text:p>
          </table:table-cell>
          <table:table-cell office:value-type="string" office:string-value="tsv-twl-creation-app">
            <text:p>tsv-twl-creation-app</text:p>
          </table:table-cell>
          <table:table-cell office:value-type="string" office:string-value="['tsv-quote-converters', 'usfm-alignment-remover']">
            <text:p>['tsv-quote-converters', 'usfm-alignment-remover']</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node-twl-generator">
            <text:p>https://github.com/unfoldingWord/node-twl-generator</text:p>
          </table:table-cell>
          <table:table-cell office:value-type="string" office:string-value="2026-04-09T20:31:43Z">
            <text:p>2026-04-09T20:31:43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141 downloads in the last year).">
            <text:p>Package has detected local usage, GitHub dependents, or significant npm downloads (5141 downloads in the last year).</text:p>
          </table:table-cell>
        </table:table-row>
        <table:table-row>
          <table:table-cell office:value-type="string" office:string-value="resource-workspace-rcl">
            <text:p>resource-workspac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6-13T13:45:24Z">
            <text:p>2023-06-13T13:45:24Z</text:p>
          </table:table-cell>
          <table:table-cell office:value-type="string" office:string-value="2023-06-13T13:45:21Z">
            <text:p>2023-06-13T13:45:21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resource-workspace-rcl">
            <text:p>resource-workspace-rcl</text:p>
          </table:table-cell>
          <table:table-cell office:value-type="string" office:string-value="False">
            <text:p>False</text:p>
          </table:table-cell>
          <table:table-cell office:value-type="string" office:string-value="2579">
            <text:p>2579</text:p>
          </table:table-cell>
          <table:table-cell office:value-type="string" office:string-value="2023-06-13T13:51:03.803Z">
            <text:p>2023-06-13T13:51:03.803Z</text:p>
          </table:table-cell>
          <table:table-cell office:value-type="string" office:string-value="['next-js-template', 'gateway-edit', 'admin-app', 'create-app', 'bsa', 'gateway-admin', 'gateway-translate']">
            <text:p>['next-js-template', 'gateway-edit', 'admin-app', 'create-app', 'bsa', 'gateway-admin', 'gateway-translate']</text:p>
          </table:table-cell>
          <table:table-cell office:value-type="string" office:string-value="['@unfoldingword/eslint-config', 'gitea-react-toolkit', 'markdown-translatable', 'scripture-resources-rcl', 'translation-helps-rcl']">
            <text:p>['@unfoldingword/eslint-config', 'gitea-react-toolkit', 'markdown-translatable', 'scripture-resources-rcl', 'translation-helps-rcl']</text:p>
          </table:table-cell>
          <table:table-cell office:value-type="string" office:string-value="['unfoldingWord/obt', 'unfoldingWord/gateway-edit', 'unfoldingWord/gateway-translate', 'unfoldingWord/gateway-admin', 'hiscoder-com/obt']">
            <text:p>['unfoldingWord/obt', 'unfoldingWord/gateway-edit', 'unfoldingWord/gateway-translate', 'unfoldingWord/gateway-admin', 'hiscoder-com/obt']</text:p>
          </table:table-cell>
          <table:table-cell office:value-type="string" office:string-value="['mannycolon', 'RoyalSix', 'PhotoNomad0', 'Sterling (Jay) Scott', 'foxprogs', 'mandolyte', 'Joel-C-Johnson']">
            <text:p>['mannycolon', 'RoyalSix', 'PhotoNomad0', 'Sterling (Jay) Scott', 'foxprogs', 'mandolyte', 'Joel-C-Johnson']</text:p>
          </table:table-cell>
          <table:table-cell office:value-type="string" office:string-value="0">
            <text:p>0</text:p>
          </table:table-cell>
          <table:table-cell office:value-type="string" office:string-value="0">
            <text:p>0</text:p>
          </table:table-cell>
          <table:table-cell office:value-type="string" office:string-value="https://github.com/unfoldingWord/resource-workspace-rcl">
            <text:p>https://github.com/unfoldingWord/resource-workspace-rcl</text:p>
          </table:table-cell>
          <table:table-cell office:value-type="string" office:string-value="2022-06-01T15:53:36Z">
            <text:p>2022-06-01T15:53:36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579 downloads in the last year).">
            <text:p>Package has detected local usage, GitHub dependents, or significant npm downloads (2579 downloads in the last year).</text:p>
          </table:table-cell>
        </table:table-row>
        <table:table-row>
          <table:table-cell office:value-type="string" office:string-value="scripture-resources-rcl">
            <text:p>scripture-resource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9T13:23:22Z">
            <text:p>2026-03-19T13:23:22Z</text:p>
          </table:table-cell>
          <table:table-cell office:value-type="string" office:string-value="2026-03-19T13:23:22Z">
            <text:p>2026-03-19T13:23:22Z</text:p>
          </table:table-cell>
          <table:table-cell office:value-type="string" office:string-value="">
            <text:p/>
          </table:table-cell>
          <table:table-cell office:value-type="string" office:string-value="14">
            <text:p>14</text:p>
          </table:table-cell>
          <table:table-cell office:value-type="string" office:string-value="6">
            <text:p>6</text:p>
          </table:table-cell>
          <table:table-cell office:value-type="string" office:string-value="scripture-resources-rcl">
            <text:p>scripture-resources-rcl</text:p>
          </table:table-cell>
          <table:table-cell office:value-type="string" office:string-value="False">
            <text:p>False</text:p>
          </table:table-cell>
          <table:table-cell office:value-type="string" office:string-value="14430">
            <text:p>14430</text:p>
          </table:table-cell>
          <table:table-cell office:value-type="string" office:string-value="2026-03-19T13:24:25.124Z">
            <text:p>2026-03-19T13:24:25.124Z</text:p>
          </table:table-cell>
          <table:table-cell office:value-type="string" office:string-value="['next-js-template', 'pdf-generator-rcl', 'tc-create-app', 'gateway-edit', 'create-app', 'greek-apparatus-app', 'book-package-viewer-poc', 'pdf-generator', 'single-scripture-rcl', 'translation-helps-rcl', 'bsa', 'gateway-admin', 'gateway-translate', 'resource-workspace-rcl', 'resource-checker']">
            <text:p>['next-js-template', 'pdf-generator-rcl', 'tc-create-app', 'gateway-edit', 'create-app', 'greek-apparatus-app', 'book-package-viewer-poc', 'pdf-generator', 'single-scripture-rcl', 'translation-helps-rcl', 'bsa', 'gateway-admin', 'gateway-translate', 'resource-workspace-rcl', 'resource-checker']</text:p>
          </table:table-cell>
          <table:table-cell office:value-type="string" office:string-value="['bible-reference-range', 'gitea-react-toolkit', 'markdown-translatable', 'string-punctuation-tokenizer', 'tc-ui-toolkit', 'usfm-js', 'uw-quote-helpers', 'word-aligner', '@unfoldingword/eslint-config']">
            <text:p>['bible-reference-range', 'gitea-react-toolkit', 'markdown-translatable', 'string-punctuation-tokenizer', 'tc-ui-toolkit', 'usfm-js', 'uw-quote-helpers', 'word-aligner', '@unfoldingword/eslint-config']</text:p>
          </table:table-cell>
          <table:table-cell office:value-type="string" office:string-value="['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office:string-value="['klappy', 'ancientTexts-net', 'PhotoNomad0', 'RoyalSix', 'mandolyte', 'mannycolon', 'larsgson', 'Joel-C-Johnson', 'abelpz', 'jincypjose', 'Sterling (Jay) Scott', 'superdav42', 'actions-user', 'dependabot[bot]', 'Christopher Klapp', 'richmahn', 'kintsoogi']">
            <text:p>['klappy', 'ancientTexts-net', 'PhotoNomad0', 'RoyalSix', 'mandolyte', 'mannycolon', 'larsgson', 'Joel-C-Johnson', 'abelpz', 'jincypjose', 'Sterling (Jay) Scott', 'superdav42', 'actions-user', 'dependabot[bot]', 'Christopher Klapp', 'richmahn', 'kintsoogi']</text:p>
          </table:table-cell>
          <table:table-cell office:value-type="string" office:string-value="0">
            <text:p>0</text:p>
          </table:table-cell>
          <table:table-cell office:value-type="string" office:string-value="0">
            <text:p>0</text:p>
          </table:table-cell>
          <table:table-cell office:value-type="string" office:string-value="https://github.com/unfoldingWord/scripture-resources-rcl">
            <text:p>https://github.com/unfoldingWord/scripture-resources-rcl</text:p>
          </table:table-cell>
          <table:table-cell office:value-type="string" office:string-value="2026-03-19T13:23:28Z">
            <text:p>2026-03-19T13:23:28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4430 downloads in the last year).">
            <text:p>Package has detected local usage, GitHub dependents, or significant npm downloads (14430 downloads in the last year).</text:p>
          </table:table-cell>
        </table:table-row>
        <table:table-row>
          <table:table-cell office:value-type="string" office:string-value="scripture-tsv">
            <text:p>scripture-tsv</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8T19:09:17Z">
            <text:p>2024-05-08T19:09:17Z</text:p>
          </table:table-cell>
          <table:table-cell office:value-type="string" office:string-value="2024-05-07T12:40:32Z">
            <text:p>2024-05-07T12:40:32Z</text:p>
          </table:table-cell>
          <table:table-cell office:value-type="string" office:string-value="2024-05-08T19:09:17Z">
            <text:p>2024-05-08T19:09:17Z</text:p>
          </table:table-cell>
          <table:table-cell office:value-type="string" office:string-value="2">
            <text:p>2</text:p>
          </table:table-cell>
          <table:table-cell office:value-type="string" office:string-value="0">
            <text:p>0</text:p>
          </table:table-cell>
          <table:table-cell office:value-type="string" office:string-value="scripture-tsv">
            <text:p>scripture-tsv</text:p>
          </table:table-cell>
          <table:table-cell office:value-type="string" office:string-value="False">
            <text:p>False</text:p>
          </table:table-cell>
          <table:table-cell office:value-type="string" office:string-value="2445">
            <text:p>2445</text:p>
          </table:table-cell>
          <table:table-cell office:value-type="string" office:string-value="2024-05-02T21:03:03.412Z">
            <text:p>2024-05-02T21:03:03.412Z</text:p>
          </table:table-cell>
          <table:table-cell office:value-type="string" office:string-value="gateway-edit">
            <text:p>gateway-edit</text:p>
          </table:table-cell>
          <table:table-cell office:value-type="string" office:string-value="['bible-reference-range', 'bible-reference-rcl']">
            <text:p>['bible-reference-range', 'bible-reference-rcl']</text:p>
          </table:table-cell>
          <table:table-cell office:value-type="string" office:string-value="['unfoldingWord/gateway-edit', 'kintsoogi/translation-notes-extension']">
            <text:p>['unfoldingWord/gateway-edit', 'kintsoogi/translation-notes-extension']</text:p>
          </table:table-cell>
          <table:table-cell office:value-type="string" office:string-value="['kintsoogi', 'PhotoNomad0']">
            <text:p>['kintsoogi', 'PhotoNomad0']</text:p>
          </table:table-cell>
          <table:table-cell office:value-type="string" office:string-value="2">
            <text:p>2</text:p>
          </table:table-cell>
          <table:table-cell office:value-type="string" office:string-value="0">
            <text:p>0</text:p>
          </table:table-cell>
          <table:table-cell office:value-type="string" office:string-value="https://github.com/unfoldingWord/scripture-tsv">
            <text:p>https://github.com/unfoldingWord/scripture-tsv</text:p>
          </table:table-cell>
          <table:table-cell office:value-type="string" office:string-value="2024-05-07T12:40:37Z">
            <text:p>2024-05-07T12:40:37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445 downloads in the last year).">
            <text:p>Package has detected local usage, GitHub dependents, or significant npm downloads (2445 downloads in the last year).</text:p>
          </table:table-cell>
        </table:table-row>
        <table:table-row>
          <table:table-cell office:value-type="string" office:string-value="selections">
            <text:p>selection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3:33Z">
            <text:p>2018-05-03T21:23:33Z</text:p>
          </table:table-cell>
          <table:table-cell office:value-type="string" office:string-value="2018-05-03T21:23:29Z">
            <text:p>2018-05-03T21:23: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elections">
            <text:p>selection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wordAlignment', 'checking-tool-wrapper', 'VerseCheck']">
            <text:p>['translationCore', 'wordAlignment', 'checking-tool-wrapper', 'VerseCheck']</text:p>
          </table:table-cell>
          <table:table-cell office:value-type="string" office:string-value="tc-strings">
            <text:p>tc-strings</text:p>
          </table:table-cell>
          <table:table-cell office:value-type="string" office:string-value="['FoustAndrew/wordAlignment', 'unfoldingWord/wordAlignment', 'unfoldingWord/checking-tool-wrapper', 'unfoldingWord/translationNotes', 'unfoldingWord/translationWords', 'unfoldingWord/translationCore']">
            <text:p>['FoustAndrew/wordAlignment', 'unfoldingWord/wordAlignment', 'unfoldingWord/checking-tool-wrapper', 'unfoldingWord/translationNotes', 'unfoldingWord/translationWords', 'unfoldingWord/translationCore']</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selections">
            <text:p>https://github.com/unfoldingWord/selections</text:p>
          </table:table-cell>
          <table:table-cell office:value-type="string" office:string-value="2019-10-22T19:45:39Z">
            <text:p>2019-10-22T19:45:39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simple-text-editor-rcl">
            <text:p>simple-text-editor-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6T21:09:12Z">
            <text:p>2025-06-06T21:09:12Z</text:p>
          </table:table-cell>
          <table:table-cell office:value-type="string" office:string-value="2025-06-06T21:09:10Z">
            <text:p>2025-06-06T21:09:10Z</text:p>
          </table:table-cell>
          <table:table-cell office:value-type="string" office:string-value="">
            <text:p/>
          </table:table-cell>
          <table:table-cell office:value-type="string" office:string-value="5">
            <text:p>5</text:p>
          </table:table-cell>
          <table:table-cell office:value-type="string" office:string-value="1">
            <text:p>1</text:p>
          </table:table-cell>
          <table:table-cell office:value-type="string" office:string-value="simple-text-editor-rcl">
            <text:p>simple-text-editor-rcl</text:p>
          </table:table-cell>
          <table:table-cell office:value-type="string" office:string-value="False">
            <text:p>False</text:p>
          </table:table-cell>
          <table:table-cell office:value-type="string" office:string-value="3852">
            <text:p>3852</text:p>
          </table:table-cell>
          <table:table-cell office:value-type="string" office:string-value="2022-06-09T23:15:38.322Z">
            <text:p>2022-06-09T23:15:38.322Z</text:p>
          </table:table-cell>
          <table:table-cell office:value-type="string" office:string-value="simple-text-editor-app">
            <text:p>simple-text-editor-app</text:p>
          </table:table-cell>
          <table:table-cell office:value-type="string" office:string-value="@unfoldingword/eslint-config">
            <text:p>@unfoldingword/eslint-config</text:p>
          </table:table-cell>
          <table:table-cell office:value-type="string" office:string-value="['md-jishan-ansari/Editors', 'RUN-Collaborations/translatable', 'klappy/scripture-puzzle-game-poc']">
            <text:p>['md-jishan-ansari/Editors', 'RUN-Collaborations/translatable', 'klappy/scripture-puzzle-game-poc']</text:p>
          </table:table-cell>
          <table:table-cell office:value-type="string" office:string-value="['klappy', 'RUN-Projects']">
            <text:p>['klappy', 'RUN-Projects']</text:p>
          </table:table-cell>
          <table:table-cell office:value-type="string" office:string-value="0">
            <text:p>0</text:p>
          </table:table-cell>
          <table:table-cell office:value-type="string" office:string-value="0">
            <text:p>0</text:p>
          </table:table-cell>
          <table:table-cell office:value-type="string" office:string-value="https://github.com/unfoldingWord-box3/simple-text-editor-rcl">
            <text:p>https://github.com/unfoldingWord-box3/simple-text-editor-rcl</text:p>
          </table:table-cell>
          <table:table-cell office:value-type="string" office:string-value="2025-06-06T21:09:14Z">
            <text:p>2025-06-06T21:09:14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852 downloads in the last year).">
            <text:p>Package has detected local usage, GitHub dependents, or significant npm downloads (3852 downloads in the last year).</text:p>
          </table:table-cell>
        </table:table-row>
        <table:table-row>
          <table:table-cell office:value-type="string" office:string-value="single-scripture-rcl">
            <text:p>single-scripture-rc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16T17:24:40Z">
            <text:p>2026-04-16T17:24:40Z</text:p>
          </table:table-cell>
          <table:table-cell office:value-type="string" office:string-value="2026-04-16T17:24:40Z">
            <text:p>2026-04-16T17:24:40Z</text:p>
          </table:table-cell>
          <table:table-cell office:value-type="string" office:string-value="">
            <text:p/>
          </table:table-cell>
          <table:table-cell office:value-type="string" office:string-value="3">
            <text:p>3</text:p>
          </table:table-cell>
          <table:table-cell office:value-type="string" office:string-value="3">
            <text:p>3</text:p>
          </table:table-cell>
          <table:table-cell office:value-type="string" office:string-value="single-scripture-rcl">
            <text:p>single-scripture-rcl</text:p>
          </table:table-cell>
          <table:table-cell office:value-type="string" office:string-value="False">
            <text:p>False</text:p>
          </table:table-cell>
          <table:table-cell office:value-type="string" office:string-value="9272">
            <text:p>9272</text:p>
          </table:table-cell>
          <table:table-cell office:value-type="string" office:string-value="2026-04-16T17:29:58.529Z">
            <text:p>2026-04-16T17:29:58.529Z</text:p>
          </table:table-cell>
          <table:table-cell office:value-type="string" office:string-value="['next-js-template', 'gateway-edit', 'create-app', 'gateway-admin']">
            <text:p>['next-js-template', 'gateway-edit', 'create-app', 'gateway-admin']</text:p>
          </table:table-cell>
          <table:table-cell office:value-type="string" office:string-value="['@unfoldingword/eslint-config', 'bible-reference-range', 'gitea-react-toolkit', 'scripture-resources-rcl', 'tc-ui-toolkit', 'translation-helps-rcl', 'usfm-js', 'uw-quote-helpers', 'word-aligner', 'word-aligner-rcl']">
            <text:p>['@unfoldingword/eslint-config', 'bible-reference-range', 'gitea-react-toolkit', 'scripture-resources-rcl', 'tc-ui-toolkit', 'translation-helps-rcl', 'usfm-js', 'uw-quote-helpers', 'word-aligner', 'word-aligner-rcl']</text:p>
          </table:table-cell>
          <table:table-cell office:value-type="string" office:string-value="['unfoldingWord/gateway-edit', 'unfoldingWord/gateway-translate', 'unfoldingWord/gateway-admin']">
            <text:p>['unfoldingWord/gateway-edit', 'unfoldingWord/gateway-translate', 'unfoldingWord/gateway-admin']</text:p>
          </table:table-cell>
          <table:table-cell office:value-type="string" office:string-value="['PhotoNomad0', 'kintsoogi', 'mannycolon', 'Joel-C-Johnson', 'jincypjose', 'abelpz', 'RoyalSix', 'theNerd247', 'Sterling (Jay) Scott', 'richmahn']">
            <text:p>['PhotoNomad0', 'kintsoogi', 'mannycolon', 'Joel-C-Johnson', 'jincypjose', 'abelpz', 'RoyalSix', 'theNerd247', 'Sterling (Jay) Scott', 'richmahn']</text:p>
          </table:table-cell>
          <table:table-cell office:value-type="string" office:string-value="0">
            <text:p>0</text:p>
          </table:table-cell>
          <table:table-cell office:value-type="string" office:string-value="0">
            <text:p>0</text:p>
          </table:table-cell>
          <table:table-cell office:value-type="string" office:string-value="https://github.com/unfoldingWord/single-scripture-rcl">
            <text:p>https://github.com/unfoldingWord/single-scripture-rcl</text:p>
          </table:table-cell>
          <table:table-cell office:value-type="string" office:string-value="2026-04-16T17:24:46Z">
            <text:p>2026-04-16T17:24:46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9272 downloads in the last year).">
            <text:p>Package has detected local usage, GitHub dependents, or significant npm downloads (9272 downloads in the last year).</text:p>
          </table:table-cell>
        </table:table-row>
        <table:table-row>
          <table:table-cell office:value-type="string" office:string-value="string-punctuation-tokenizer">
            <text:p>string-punctuation-tokeniz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8-09T14:35:40Z">
            <text:p>2023-08-09T14:35:40Z</text:p>
          </table:table-cell>
          <table:table-cell office:value-type="string" office:string-value="2021-08-25T21:53:55Z">
            <text:p>2021-08-25T21:53:55Z</text:p>
          </table:table-cell>
          <table:table-cell office:value-type="string" office:string-value="2021-08-25T21:56:43Z">
            <text:p>2021-08-25T21:56:43Z</text:p>
          </table:table-cell>
          <table:table-cell office:value-type="string" office:string-value="21">
            <text:p>21</text:p>
          </table:table-cell>
          <table:table-cell office:value-type="string" office:string-value="18">
            <text:p>18</text:p>
          </table:table-cell>
          <table:table-cell office:value-type="string" office:string-value="string-punctuation-tokenizer">
            <text:p>string-punctuation-tokenizer</text:p>
          </table:table-cell>
          <table:table-cell office:value-type="string" office:string-value="False">
            <text:p>False</text:p>
          </table:table-cell>
          <table:table-cell office:value-type="string" office:string-value="89808">
            <text:p>89808</text:p>
          </table:table-cell>
          <table:table-cell office:value-type="string" office:string-value="2021-08-25T21:55:46.406Z">
            <text:p>2021-08-25T21:55:46.406Z</text:p>
          </table:table-cell>
          <table:table-cell office:value-type="string" office:string-value="['checking-extension', 'anchor-alignment-poc', 'greek-apparatus-app', 'pdf-generator', 'tsv-quote-converters', 'scripture-resources-rcl', 'word-aligner-rcl', 'uw-quote-helpers', 'translationCore', 'word-aligner-lib', 'tsv-groupdata-parser', 'tc-source-content-updater', 'checking-tool-rcl', 'word-aligner', 'tc-ui-toolkit', 'checking-tool-wrapper', 'string-punctuation-tokenizer', 'wordmap-lexer', 'ScripturePane', '@oce-editor-tools/pk-aligner']">
            <text:p>['checking-extension', 'anchor-alignment-poc', 'greek-apparatus-app', 'pdf-generator', 'tsv-quote-converters', 'scripture-resources-rcl', 'word-aligner-rcl', 'uw-quote-helpers', 'translationCore', 'word-aligner-lib', 'tsv-groupdata-parser', 'tc-source-content-updater', 'checking-tool-rcl', 'word-aligner', 'tc-ui-toolkit', 'checking-tool-wrapper', 'string-punctuation-tokenizer', 'wordmap-lexer', 'ScripturePane', '@oce-editor-tools/pk-aligner']</text:p>
          </table:table-cell>
          <table:table-cell office:value-type="string" office:string-value="['string-punctuation-tokenizer', 'wordmap-lexer']">
            <text:p>['string-punctuation-tokenizer', 'wordmap-lexer']</text:p>
          </table:table-cell>
          <table:table-cell office:value-type="string" office:string-value="['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office:string-value="['mannycolon', 'klappy', 'ancientTexts-net', 'dependabot-support', 'PhotoNomad0', 'RoyalSix', 'da1nerd', 'richmahn', 'mandolyte', 'bspidel', 'Sterling (Jay) Scott', 'birchamp']">
            <text:p>['mannycolon', 'klappy', 'ancientTexts-net', 'dependabot-support', 'PhotoNomad0', 'RoyalSix', 'da1nerd', 'richmahn', 'mandolyte', 'bspidel', 'Sterling (Jay) Scott', 'birchamp']</text:p>
          </table:table-cell>
          <table:table-cell office:value-type="string" office:string-value="3">
            <text:p>3</text:p>
          </table:table-cell>
          <table:table-cell office:value-type="string" office:string-value="0">
            <text:p>0</text:p>
          </table:table-cell>
          <table:table-cell office:value-type="string" office:string-value="https://github.com/unfoldingWord/string-punctuation-tokenizer">
            <text:p>https://github.com/unfoldingWord/string-punctuation-tokenizer</text:p>
          </table:table-cell>
          <table:table-cell office:value-type="string" office:string-value="2023-08-09T13:57:50Z">
            <text:p>2023-08-09T13:57:50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tc-source-content-updater">
            <text:p>tc-source-content-upda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0-28T18:40:43Z">
            <text:p>2025-10-28T18:40:43Z</text:p>
          </table:table-cell>
          <table:table-cell office:value-type="string" office:string-value="2025-10-28T18:14:38Z">
            <text:p>2025-10-28T18:14:38Z</text:p>
          </table:table-cell>
          <table:table-cell office:value-type="string" office:string-value="2021-08-27T21:43:21Z">
            <text:p>2021-08-27T21:43:21Z</text:p>
          </table:table-cell>
          <table:table-cell office:value-type="string" office:string-value="0">
            <text:p>0</text:p>
          </table:table-cell>
          <table:table-cell office:value-type="string" office:string-value="0">
            <text:p>0</text:p>
          </table:table-cell>
          <table:table-cell office:value-type="string" office:string-value="tc-source-content-updater">
            <text:p>tc-source-content-updater</text:p>
          </table:table-cell>
          <table:table-cell office:value-type="string" office:string-value="False">
            <text:p>False</text:p>
          </table:table-cell>
          <table:table-cell office:value-type="string" office:string-value="7659">
            <text:p>7659</text:p>
          </table:table-cell>
          <table:table-cell office:value-type="string" office:string-value="2025-10-28T18:16:22.466Z">
            <text:p>2025-10-28T18:16:22.466Z</text:p>
          </table:table-cell>
          <table:table-cell office:value-type="string" office:string-value="['checking-extension', 'pdf-generator', 'translationCore', 'checking-tool-rcl']">
            <text:p>['checking-extension', 'pdf-generator', 'translationCore', 'checking-tool-rcl']</text:p>
          </table:table-cell>
          <table:table-cell office:value-type="string" office:string-value="['string-punctuation-tokenizer', 'tsv-groupdata-parser', 'usfm-js']">
            <text:p>['string-punctuation-tokenizer', 'tsv-groupdata-parser', 'usfm-js']</text:p>
          </table:table-cell>
          <table:table-cell office:value-type="string" office:string-value="['FoustAndrew/wordAlignment', 'unfoldingWord/tx-job-handler', 'unfoldingWord/wordAlignment', 'unfoldingWord/checking-tool-wrapper', 'unfoldingWord-dev/uw-pdf-conversion-tools', 'unfoldingWord-dev/tools', 'unfoldingWord/translationCore']">
            <text:p>['FoustAndrew/wordAlignment', 'unfoldingWord/tx-job-handler', 'unfoldingWord/wordAlignment', 'unfoldingWord/checking-tool-wrapper', 'unfoldingWord-dev/uw-pdf-conversion-tools', 'unfoldingWord-dev/tools', 'unfoldingWord/translationCore']</text:p>
          </table:table-cell>
          <table:table-cell office:value-type="string" office:string-value="['PhotoNomad0', 'mannycolon', 'richmahn', 'RoyalSix', 'dependabot-support', 'Sterling (Jay) Scott', 'da1nerd', 'bspidel']">
            <text:p>['PhotoNomad0', 'mannycolon', 'richmahn', 'RoyalSix', 'dependabot-support', 'Sterling (Jay) Scott', 'da1nerd', 'bspidel']</text:p>
          </table:table-cell>
          <table:table-cell office:value-type="string" office:string-value="2">
            <text:p>2</text:p>
          </table:table-cell>
          <table:table-cell office:value-type="string" office:string-value="0">
            <text:p>0</text:p>
          </table:table-cell>
          <table:table-cell office:value-type="string" office:string-value="https://github.com/unfoldingWord/tc-source-content-updater">
            <text:p>https://github.com/unfoldingWord/tc-source-content-updater</text:p>
          </table:table-cell>
          <table:table-cell office:value-type="string" office:string-value="2025-10-28T18:14:43Z">
            <text:p>2025-10-28T18:14:43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659 downloads in the last year).">
            <text:p>Package has detected local usage, GitHub dependents, or significant npm downloads (7659 downloads in the last year).</text:p>
          </table:table-cell>
        </table:table-row>
        <table:table-row>
          <table:table-cell office:value-type="string" office:string-value="tc-strings">
            <text:p>tc-string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5:11Z">
            <text:p>2018-05-03T21:25:11Z</text:p>
          </table:table-cell>
          <table:table-cell office:value-type="string" office:string-value="2018-05-03T21:25:02Z">
            <text:p>2018-05-03T21:25: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strings">
            <text:p>tc-string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word-aligner-lib', 'checking-tool-rcl', 'selections', 'VerseCheck']">
            <text:p>['translationCore', 'word-aligner-lib', 'checking-tool-rcl', 'selections', 'VerseCheck']</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c-strings">
            <text:p>https://github.com/unfoldingWord/tc-strings</text:p>
          </table:table-cell>
          <table:table-cell office:value-type="string" office:string-value="2019-10-22T19:46:14Z">
            <text:p>2019-10-22T19:46:14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tc-tool">
            <text:p>tc-too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8-11T15:36:38Z">
            <text:p>2020-08-11T15:36:38Z</text:p>
          </table:table-cell>
          <table:table-cell office:value-type="string" office:string-value="2020-04-16T01:20:11Z">
            <text:p>2020-04-16T01:20:11Z</text:p>
          </table:table-cell>
          <table:table-cell office:value-type="string" office:string-value="2019-01-10T06:26:02Z">
            <text:p>2019-01-10T06:26:02Z</text:p>
          </table:table-cell>
          <table:table-cell office:value-type="string" office:string-value="0">
            <text:p>0</text:p>
          </table:table-cell>
          <table:table-cell office:value-type="string" office:string-value="0">
            <text:p>0</text:p>
          </table:table-cell>
          <table:table-cell office:value-type="string" office:string-value="tc-tool">
            <text:p>tc-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wordAlignment', 'translationWords', 'translationNotes', 'checking-tool-wrapper', 'VerseCheck', 'toolTemplate', 'ScripturePane']">
            <text:p>['translationCore', 'wordAlignment', 'translationWords', 'translationNotes', 'checking-tool-wrapper', 'VerseCheck', 'toolTemplate', 'ScripturePane']</text:p>
          </table:table-cell>
          <table:table-cell office:value-type="string" office:string-value="">
            <text:p/>
          </table:table-cell>
          <table:table-cell office:value-type="string" office:string-value="['FoustAndrew/wordAlignment', 'unfoldingWord/checking-tool-wrapper', 'unfoldingWord/translationNotes', 'unfoldingWord/translationWords', 'unfoldingWord/wordAlignment', 'unfoldingWord/translationCore']">
            <text:p>['FoustAndrew/wordAlignment', 'unfoldingWord/checking-tool-wrapper', 'unfoldingWord/translationNotes', 'unfoldingWord/translationWords', 'unfoldingWord/wordAlignment', 'unfoldingWord/translationCore']</text:p>
          </table:table-cell>
          <table:table-cell office:value-type="string" office:string-value="['da1nerd', 'mannycolon', 'dependabot-support', 'PhotoNomad0', 'RoyalSix', 'bspidel']">
            <text:p>['da1nerd', 'mannycolon', 'dependabot-support', 'PhotoNomad0', 'RoyalSix', 'bspidel']</text:p>
          </table:table-cell>
          <table:table-cell office:value-type="string" office:string-value="3">
            <text:p>3</text:p>
          </table:table-cell>
          <table:table-cell office:value-type="string" office:string-value="0">
            <text:p>0</text:p>
          </table:table-cell>
          <table:table-cell office:value-type="string" office:string-value="https://github.com/unfoldingWord/tc-tool">
            <text:p>https://github.com/unfoldingWord/tc-tool</text:p>
          </table:table-cell>
          <table:table-cell office:value-type="string" office:string-value="2020-04-16T01:20:15Z">
            <text:p>2020-04-16T01:20:15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tc-ui-toolkit">
            <text:p>tc-ui-toolk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2-31T18:53:36Z">
            <text:p>2024-12-31T18:53:36Z</text:p>
          </table:table-cell>
          <table:table-cell office:value-type="string" office:string-value="2024-12-31T18:52:39Z">
            <text:p>2024-12-31T18:52:39Z</text:p>
          </table:table-cell>
          <table:table-cell office:value-type="string" office:string-value="2019-02-06T21:38:09Z">
            <text:p>2019-02-06T21:38:09Z</text:p>
          </table:table-cell>
          <table:table-cell office:value-type="string" office:string-value="34">
            <text:p>34</text:p>
          </table:table-cell>
          <table:table-cell office:value-type="string" office:string-value="33">
            <text:p>33</text:p>
          </table:table-cell>
          <table:table-cell office:value-type="string" office:string-value="tc-ui-toolkit">
            <text:p>tc-ui-toolkit</text:p>
          </table:table-cell>
          <table:table-cell office:value-type="string" office:string-value="False">
            <text:p>False</text:p>
          </table:table-cell>
          <table:table-cell office:value-type="string" office:string-value="29428">
            <text:p>29428</text:p>
          </table:table-cell>
          <table:table-cell office:value-type="string" office:string-value="2024-12-31T18:53:34.752Z">
            <text:p>2024-12-31T18:53:34.752Z</text:p>
          </table:table-cell>
          <table:table-cell office:value-type="string" office:string-value="['alignment-playground', 'next-js-template', 'gateway-edit', 'tc-create-app', 'single-scripture-rcl', 'translation-helps-rcl', 'scripture-resources-rcl', 'bsa', 'translationCore', 'gateway-admin', 'wordAlignment', 'checking-tool-wrapper']">
            <text:p>['alignment-playground', 'next-js-template', 'gateway-edit', 'tc-create-app', 'single-scripture-rcl', 'translation-helps-rcl', 'scripture-resources-rcl', 'bsa', 'translationCore', 'gateway-admin', 'wordAlignment', 'checking-tool-wrapper']</text:p>
          </table:table-cell>
          <table:table-cell office:value-type="string" office:string-value="['string-punctuation-tokenizer', 'word-aligner', 'usfm-js']">
            <text:p>['string-punctuation-tokenizer', 'word-aligner', 'usfm-js']</text:p>
          </table:table-cell>
          <table:table-cell office:value-type="string" office:string-value="['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office:string-value="['mannycolon', 'PhotoNomad0', 'RoyalSix', 'da1nerd', 'richmahn', 'Sterling (Jay) Scott', 'bspidel', 'dependabot-support']">
            <text:p>['mannycolon', 'PhotoNomad0', 'RoyalSix', 'da1nerd', 'richmahn', 'Sterling (Jay) Scott', 'bspidel', 'dependabot-support']</text:p>
          </table:table-cell>
          <table:table-cell office:value-type="string" office:string-value="9">
            <text:p>9</text:p>
          </table:table-cell>
          <table:table-cell office:value-type="string" office:string-value="0">
            <text:p>0</text:p>
          </table:table-cell>
          <table:table-cell office:value-type="string" office:string-value="https://github.com/unfoldingWord/tc-ui-toolkit">
            <text:p>https://github.com/unfoldingWord/tc-ui-toolkit</text:p>
          </table:table-cell>
          <table:table-cell office:value-type="string" office:string-value="2024-12-31T18:52:44Z">
            <text:p>2024-12-31T18:52:44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9428 downloads in the last year).">
            <text:p>Package has detected local usage, GitHub dependents, or significant npm downloads (29428 downloads in the last year).</text:p>
          </table:table-cell>
        </table:table-row>
        <table:table-row>
          <table:table-cell office:value-type="string" office:string-value="translation-helps-rcl">
            <text:p>translation-help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7T22:01:48Z">
            <text:p>2026-03-27T22:01:48Z</text:p>
          </table:table-cell>
          <table:table-cell office:value-type="string" office:string-value="2026-03-27T22:00:54Z">
            <text:p>2026-03-27T22:00:54Z</text:p>
          </table:table-cell>
          <table:table-cell office:value-type="string" office:string-value="">
            <text:p/>
          </table:table-cell>
          <table:table-cell office:value-type="string" office:string-value="8">
            <text:p>8</text:p>
          </table:table-cell>
          <table:table-cell office:value-type="string" office:string-value="2">
            <text:p>2</text:p>
          </table:table-cell>
          <table:table-cell office:value-type="string" office:string-value="translation-helps-rcl">
            <text:p>translation-helps-rcl</text:p>
          </table:table-cell>
          <table:table-cell office:value-type="string" office:string-value="False">
            <text:p>False</text:p>
          </table:table-cell>
          <table:table-cell office:value-type="string" office:string-value="13747">
            <text:p>13747</text:p>
          </table:table-cell>
          <table:table-cell office:value-type="string" office:string-value="2026-03-27T22:01:47.002Z">
            <text:p>2026-03-27T22:01:47.002Z</text:p>
          </table:table-cell>
          <table:table-cell office:value-type="string" office:string-value="['next-js-template', 'gateway-edit', 'admin-app', 'create-app', 'single-scripture-rcl', 'bsa', 'gateway-admin', 'gateway-translate', 'uw-editor', 'resource-workspace-rcl']">
            <text:p>['next-js-template', 'gateway-edit', 'admin-app', 'create-app', 'single-scripture-rcl', 'bsa', 'gateway-admin', 'gateway-translate', 'uw-editor', 'resource-workspace-rcl']</text:p>
          </table:table-cell>
          <table:table-cell office:value-type="string" office:string-value="['bible-reference-range', 'dcs-branch-merger', 'gitea-react-toolkit', 'markdown-translatable', 'scripture-resources-rcl', 'tc-ui-toolkit', 'word-aligner']">
            <text:p>['bible-reference-range', 'dcs-branch-merger', 'gitea-react-toolkit', 'markdown-translatable', 'scripture-resources-rcl', 'tc-ui-toolkit', 'word-aligner']</text:p>
          </table:table-cell>
          <table:table-cell office:value-type="string" office:string-value="['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office:string-value="['mannycolon', 'PhotoNomad0', 'kintsoogi', 'superdav42', 'larsgson', 'abelpz', 'jincypjose', 'theNerd247', 'Joel-C-Johnson', 'richmahn', 'klappy', 'RoyalSix', 'mandolyte']">
            <text:p>['mannycolon', 'PhotoNomad0', 'kintsoogi', 'superdav42', 'larsgson', 'abelpz', 'jincypjose', 'theNerd247', 'Joel-C-Johnson', 'richmahn', 'klappy', 'RoyalSix', 'mandolyte']</text:p>
          </table:table-cell>
          <table:table-cell office:value-type="string" office:string-value="0">
            <text:p>0</text:p>
          </table:table-cell>
          <table:table-cell office:value-type="string" office:string-value="0">
            <text:p>0</text:p>
          </table:table-cell>
          <table:table-cell office:value-type="string" office:string-value="https://github.com/unfoldingWord/translation-helps-rcl">
            <text:p>https://github.com/unfoldingWord/translation-helps-rcl</text:p>
          </table:table-cell>
          <table:table-cell office:value-type="string" office:string-value="2026-03-27T22:00:59Z">
            <text:p>2026-03-27T22:00:59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3747 downloads in the last year).">
            <text:p>Package has detected local usage, GitHub dependents, or significant npm downloads (13747 downloads in the last year).</text:p>
          </table:table-cell>
        </table:table-row>
        <table:table-row>
          <table:table-cell office:value-type="string" office:string-value="tsv-groupdata-parser">
            <text:p>tsv-groupdata-pars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01T15:56:28Z">
            <text:p>2025-12-01T15:56:28Z</text:p>
          </table:table-cell>
          <table:table-cell office:value-type="string" office:string-value="2025-12-01T15:18:56Z">
            <text:p>2025-12-01T15:18:56Z</text:p>
          </table:table-cell>
          <table:table-cell office:value-type="string" office:string-value="2021-08-27T21:03:12Z">
            <text:p>2021-08-27T21:03:12Z</text:p>
          </table:table-cell>
          <table:table-cell office:value-type="string" office:string-value="7">
            <text:p>7</text:p>
          </table:table-cell>
          <table:table-cell office:value-type="string" office:string-value="7">
            <text:p>7</text:p>
          </table:table-cell>
          <table:table-cell office:value-type="string" office:string-value="tsv-groupdata-parser">
            <text:p>tsv-groupdata-parser</text:p>
          </table:table-cell>
          <table:table-cell office:value-type="string" office:string-value="False">
            <text:p>False</text:p>
          </table:table-cell>
          <table:table-cell office:value-type="string" office:string-value="5995">
            <text:p>5995</text:p>
          </table:table-cell>
          <table:table-cell office:value-type="string" office:string-value="2024-10-16T17:43:33.516Z">
            <text:p>2024-10-16T17:43:33.516Z</text:p>
          </table:table-cell>
          <table:table-cell office:value-type="string" office:string-value="['checking-extension', 'pdf-generator', 'uw-quote-helpers', 'translationCore', 'tc-source-content-updater', 'checking-tool-rcl']">
            <text:p>['checking-extension', 'pdf-generator', 'uw-quote-helpers', 'translationCore', 'tc-source-content-updater', 'checking-tool-rcl']</text:p>
          </table:table-cell>
          <table:table-cell office:value-type="string" office:string-value="['bible-reference-range', 'uw-tsv-parser', 'string-punctuation-tokenizer']">
            <text:p>['bible-reference-range', 'uw-tsv-parser', 'string-punctuation-tokenizer']</text:p>
          </table:table-cell>
          <table:table-cell office:value-type="string" office:string-value="['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office:string-value="['mannycolon', 'PhotoNomad0', 'da1nerd', 'richmahn', 'RoyalSix', 'mandolyte', 'Sterling (Jay) Scott', 'yakob-aleksandrovich']">
            <text:p>['mannycolon', 'PhotoNomad0', 'da1nerd', 'richmahn', 'RoyalSix', 'mandolyte', 'Sterling (Jay) Scott', 'yakob-aleksandrovich']</text:p>
          </table:table-cell>
          <table:table-cell office:value-type="string" office:string-value="1">
            <text:p>1</text:p>
          </table:table-cell>
          <table:table-cell office:value-type="string" office:string-value="0">
            <text:p>0</text:p>
          </table:table-cell>
          <table:table-cell office:value-type="string" office:string-value="https://github.com/unfoldingWord/tsv-groupdata-parser">
            <text:p>https://github.com/unfoldingWord/tsv-groupdata-parser</text:p>
          </table:table-cell>
          <table:table-cell office:value-type="string" office:string-value="2025-12-01T15:19:13Z">
            <text:p>2025-12-01T15:19:13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995 downloads in the last year).">
            <text:p>Package has detected local usage, GitHub dependents, or significant npm downloads (5995 downloads in the last year).</text:p>
          </table:table-cell>
        </table:table-row>
        <table:table-row>
          <table:table-cell office:value-type="string" office:string-value="tsv-quote-converters">
            <text:p>tsv-quote-convert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4-12T12:12:29Z">
            <text:p>2026-04-12T12:12:29Z</text:p>
          </table:table-cell>
          <table:table-cell office:value-type="string" office:string-value="2026-04-12T12:12:09Z">
            <text:p>2026-04-12T12:12: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quote-converters">
            <text:p>tsv-quote-convert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twl-creation-app', 'twl-generator', 'tsv7-tn-cleanup-app', 'add-gl-quotes-to-tsv-files']">
            <text:p>['tsv-twl-creation-app', 'twl-generator', 'tsv7-tn-cleanup-app', 'add-gl-quotes-to-tsv-files']</text:p>
          </table:table-cell>
          <table:table-cell office:value-type="string" office:string-value="string-punctuation-tokenizer">
            <text:p>string-punctuation-tokenizer</text:p>
          </table:table-cell>
          <table:table-cell office:value-type="string" office:string-value="['unfoldingWord/node-cli-add-gl-quotes-to-tsv-files', 'unfoldingWord/tsv7-tn-cleanup-app']">
            <text:p>['unfoldingWord/node-cli-add-gl-quotes-to-tsv-files', 'unfoldingWord/tsv7-tn-cleanup-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quote-converters">
            <text:p>https://github.com/unfoldingWord/tsv-quote-converters</text:p>
          </table:table-cell>
          <table:table-cell office:value-type="string" office:string-value="2026-04-12T12:12:37Z">
            <text:p>2026-04-12T12:12:37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usfm-alignment-remover-app">
            <text:p>usfm-alignment-remover-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17:08Z">
            <text:p>2026-01-21T23:17:08Z</text:p>
          </table:table-cell>
          <table:table-cell office:value-type="string" office:string-value="2026-01-21T23:17:06Z">
            <text:p>2026-01-21T23:17: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sfm-alignment-remover">
            <text:p>usfm-alignment-remov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preview-app', 'twl-generator', 'door43-preview-renderers']">
            <text:p>['door43-preview-app', 'twl-generator', 'door43-preview-renderers']</text:p>
          </table:table-cell>
          <table:table-cell office:value-type="string" office:string-value="usfm-js">
            <text:p>usfm-js</text:p>
          </table:table-cell>
          <table:table-cell office:value-type="string" office:string-value="unfoldingWord/door43-preview-app">
            <text:p>unfoldingWord/door43-preview-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usfm-alignment-remover-app">
            <text:p>https://github.com/unfoldingWord/usfm-alignment-remover-app</text:p>
          </table:table-cell>
          <table:table-cell office:value-type="string" office:string-value="2026-01-21T23:17:11Z">
            <text:p>2026-01-21T23:17:11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usfm-js">
            <text:p>usfm-j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4-08-20T23:29:59Z">
            <text:p>2024-08-20T23:29:59Z</text:p>
          </table:table-cell>
          <table:table-cell office:value-type="string" office:string-value="2024-08-20T23:29:17Z">
            <text:p>2024-08-20T23:29:17Z</text:p>
          </table:table-cell>
          <table:table-cell office:value-type="string" office:string-value="2018-11-05T12:47:58Z">
            <text:p>2018-11-05T12:47:58Z</text:p>
          </table:table-cell>
          <table:table-cell office:value-type="string" office:string-value="3">
            <text:p>3</text:p>
          </table:table-cell>
          <table:table-cell office:value-type="string" office:string-value="0">
            <text:p>0</text:p>
          </table:table-cell>
          <table:table-cell office:value-type="string" office:string-value="usfm-js">
            <text:p>usfm-j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extension', 'translation-helps', 'qa-app', 'alignment-playground', 'tc-create-app', 'greek-apparatus-app', 'pdf-generator', 'scripture-as-graph', 'door43-preview-app', 'cskillbp-prompt-over-code', 'zulip-bot', 'uw-content-validation', 'single-scripture-rcl', 'tsv-twl-creation-app', 'enhanced-word-aligner-rcl', 'scripture-resources-rcl', 'word-aligner-rcl', 'uw-quote-helpers', 'uw-wordmapbooster', 'door43-preview-renderers', 'usfm-alignment-remover', 'translationCore', 'word-aligner-lib', 'tc-source-content-updater', 'checking-tool-rcl', 'word-aligner', 'wordAlignment', 'tc-ui-toolkit', 'checking-tool-wrapper', 'uw-bible-parser', 'wordmap-usfm', 'book-package-rcl', 'uw-word-count', 'usfm-js-wrapper', 'tc_resources', 'VerseCheck', 'resource-checker', 'ScripturePane', '@bt-synergy/mobile', 'tc-study', '@bt-synergy/resource-parsers', '@bt-synergy/usfm-processor']">
            <text:p>['checking-extension', 'translation-helps', 'qa-app', 'alignment-playground', 'tc-create-app', 'greek-apparatus-app', 'pdf-generator', 'scripture-as-graph', 'door43-preview-app', 'cskillbp-prompt-over-code', 'zulip-bot', 'uw-content-validation', 'single-scripture-rcl', 'tsv-twl-creation-app', 'enhanced-word-aligner-rcl', 'scripture-resources-rcl', 'word-aligner-rcl', 'uw-quote-helpers', 'uw-wordmapbooster', 'door43-preview-renderers', 'usfm-alignment-remover', 'translationCore', 'word-aligner-lib', 'tc-source-content-updater', 'checking-tool-rcl', 'word-aligner', 'wordAlignment',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office:string-value="">
            <text:p/>
          </table:table-cell>
          <table:table-cell office:value-type="string" office:string-value="['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office:string-value="['PhotoNomad0', 'RoyalSix', 'mannycolon', 'klappy', 'Sterling (Jay) Scott', 'ihoegen', 'da1nerd', 'dependabot-support', 'richmahn', 'bspidel']">
            <text:p>['PhotoNomad0', 'RoyalSix', 'mannycolon', 'klappy', 'Sterling (Jay) Scott', 'ihoegen', 'da1nerd', 'dependabot-support', 'richmahn', 'bspidel']</text:p>
          </table:table-cell>
          <table:table-cell office:value-type="string" office:string-value="4">
            <text:p>4</text:p>
          </table:table-cell>
          <table:table-cell office:value-type="string" office:string-value="0">
            <text:p>0</text:p>
          </table:table-cell>
          <table:table-cell office:value-type="string" office:string-value="https://github.com/unfoldingWord/usfm-js">
            <text:p>https://github.com/unfoldingWord/usfm-js</text:p>
          </table:table-cell>
          <table:table-cell office:value-type="string" office:string-value="2026-01-06T16:10:55Z">
            <text:p>2026-01-06T16:10:55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uw-content-validation">
            <text:p>uw-content-validation</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3T21:31:43Z">
            <text:p>2026-05-13T21:31:43Z</text:p>
          </table:table-cell>
          <table:table-cell office:value-type="string" office:string-value="2025-12-17T18:49:57Z">
            <text:p>2025-12-17T18:49:57Z</text:p>
          </table:table-cell>
          <table:table-cell office:value-type="string" office:string-value="">
            <text:p/>
          </table:table-cell>
          <table:table-cell office:value-type="string" office:string-value="92">
            <text:p>92</text:p>
          </table:table-cell>
          <table:table-cell office:value-type="string" office:string-value="14">
            <text:p>14</text:p>
          </table:table-cell>
          <table:table-cell office:value-type="string" office:string-value="uw-content-validation">
            <text:p>uw-content-validation</text:p>
          </table:table-cell>
          <table:table-cell office:value-type="string" office:string-value="False">
            <text:p>False</text:p>
          </table:table-cell>
          <table:table-cell office:value-type="string" office:string-value="1834">
            <text:p>1834</text:p>
          </table:table-cell>
          <table:table-cell office:value-type="string" office:string-value="2023-01-11T14:47:58.316Z">
            <text:p>2023-01-11T14:47:58.316Z</text:p>
          </table:table-cell>
          <table:table-cell office:value-type="string" office:string-value="['tc-create-app', 'content-validation-app', 'gateway-admin', 'catalog-next-toolkit']">
            <text:p>['tc-create-app', 'content-validation-app', 'gateway-admin', 'catalog-next-toolkit']</text:p>
          </table:table-cell>
          <table:table-cell office:value-type="string" office:string-value="usfm-js">
            <text:p>usfm-js</text:p>
          </table:table-cell>
          <table:table-cell office:value-type="string" office:string-value="['unfoldingWord/gateway-admin', 'unfoldingWord/tc-create-app']">
            <text:p>['unfoldingWord/gateway-admin', 'unfoldingWord/tc-create-app']</text:p>
          </table:table-cell>
          <table:table-cell office:value-type="string" office:string-value="['RobH123', 'mandolyte', 'PhotoNomad0', 'richmahn', 'dependabot[bot]', 'jag3773', 'ancientTexts-net']">
            <text:p>['RobH123', 'mandolyte', 'PhotoNomad0', 'richmahn', 'dependabot[bot]', 'jag3773',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uw-content-validation">
            <text:p>https://github.com/unfoldingWord/uw-content-validation</text:p>
          </table:table-cell>
          <table:table-cell office:value-type="string" office:string-value="2026-05-12T16:11:32Z">
            <text:p>2026-05-12T16:11:32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834 downloads in the last year).">
            <text:p>Package has detected local usage, GitHub dependents, or significant npm downloads (1834 downloads in the last year).</text:p>
          </table:table-cell>
        </table:table-row>
        <table:table-row>
          <table:table-cell office:value-type="string" office:string-value="uw-languages-rcl">
            <text:p>uw-language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6-12T16:17:45Z">
            <text:p>2023-06-12T16:17:45Z</text:p>
          </table:table-cell>
          <table:table-cell office:value-type="string" office:string-value="2023-06-12T16:17:33Z">
            <text:p>2023-06-12T16:17:33Z</text:p>
          </table:table-cell>
          <table:table-cell office:value-type="string" office:string-value="">
            <text:p/>
          </table:table-cell>
          <table:table-cell office:value-type="string" office:string-value="15">
            <text:p>15</text:p>
          </table:table-cell>
          <table:table-cell office:value-type="string" office:string-value="12">
            <text:p>12</text:p>
          </table:table-cell>
          <table:table-cell office:value-type="string" office:string-value="uw-languages-rcl">
            <text:p>uw-languages-rcl</text:p>
          </table:table-cell>
          <table:table-cell office:value-type="string" office:string-value="False">
            <text:p>False</text:p>
          </table:table-cell>
          <table:table-cell office:value-type="string" office:string-value="748">
            <text:p>748</text:p>
          </table:table-cell>
          <table:table-cell office:value-type="string" office:string-value="2023-06-12T16:01:14.311Z">
            <text:p>2023-06-12T16:01:14.311Z</text:p>
          </table:table-cell>
          <table:table-cell office:value-type="string" office:string-value="['tc-create-app', 'dcs-react-hooks']">
            <text:p>['tc-create-app', 'dcs-react-hooks']</text:p>
          </table:table-cell>
          <table:table-cell office:value-type="string" office:string-value="">
            <text:p/>
          </table:table-cell>
          <table:table-cell office:value-type="string" office:string-value="['nishantshah-me/docusaurus', 'unfoldingWord/gateway-translate', 'unfoldingWord/tc-create-app']">
            <text:p>['nishantshah-me/docusaurus', 'unfoldingWord/gateway-translate', 'unfoldingWord/tc-create-app']</text:p>
          </table:table-cell>
          <table:table-cell office:value-type="string" office:string-value="['mandolyte', 'dependabot[bot]', 'abelpz']">
            <text:p>['mandolyte', 'dependabot[bot]', 'abelpz']</text:p>
          </table:table-cell>
          <table:table-cell office:value-type="string" office:string-value="0">
            <text:p>0</text:p>
          </table:table-cell>
          <table:table-cell office:value-type="string" office:string-value="0">
            <text:p>0</text:p>
          </table:table-cell>
          <table:table-cell office:value-type="string" office:string-value="https://github.com/unfoldingWord/uw-languages-rcl">
            <text:p>https://github.com/unfoldingWord/uw-languages-rcl</text:p>
          </table:table-cell>
          <table:table-cell office:value-type="string" office:string-value="2022-06-01T12:49:38Z">
            <text:p>2022-06-01T12:49:38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48 downloads in the last year).">
            <text:p>Package has detected local usage, GitHub dependents, or significant npm downloads (748 downloads in the last year).</text:p>
          </table:table-cell>
        </table:table-row>
        <table:table-row>
          <table:table-cell office:value-type="string" office:string-value="uw-proskomma">
            <text:p>uw-proskomma</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0T15:27:48Z">
            <text:p>2024-10-10T15:27:48Z</text:p>
          </table:table-cell>
          <table:table-cell office:value-type="string" office:string-value="2024-10-10T15:27:44Z">
            <text:p>2024-10-10T15:27:44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uw-proskomma">
            <text:p>uw-proskomma</text:p>
          </table:table-cell>
          <table:table-cell office:value-type="string" office:string-value="False">
            <text:p>False</text:p>
          </table:table-cell>
          <table:table-cell office:value-type="string" office:string-value="2241">
            <text:p>2241</text:p>
          </table:table-cell>
          <table:table-cell office:value-type="string" office:string-value="2022-07-13T12:06:56.761Z">
            <text:p>2022-07-13T12:06:56.761Z</text:p>
          </table:table-cell>
          <table:table-cell office:value-type="string" office:string-value="['proskomma-scripture-resources-rcl', 'epitelete-html']">
            <text:p>['proskomma-scripture-resources-rcl', 'epitelete-html']</text:p>
          </table:table-cell>
          <table:table-cell office:value-type="string" office:string-value="">
            <text:p/>
          </table:table-cell>
          <table:table-cell office:value-type="string" office:string-value="['Proskomma/proskomma-legacy-projects', 'unfoldingWord/gateway-translate', 'DanielC-N/ptxaligner', 'Proskomma/proskomma-json-tools', 'unfoldingWord/epitelete-html', 'Proskomma/epitelete', 'Proskomma/diegesis-apollo-sandbox', 'Proskomma/proskomma-render-pdf', 'Proskomma/diegesis-server']">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office:string-value="['mvahowe', 'mandolyte', 'jag3773', 'richmahn']">
            <text:p>['mvahowe', 'mandolyte',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uw-proskomma">
            <text:p>https://github.com/unfoldingWord-box3/uw-proskomma</text:p>
          </table:table-cell>
          <table:table-cell office:value-type="string" office:string-value="2024-10-10T15:27:53Z">
            <text:p>2024-10-10T15:27:53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241 downloads in the last year).">
            <text:p>Package has detected local usage, GitHub dependents, or significant npm downloads (2241 downloads in the last year).</text:p>
          </table:table-cell>
        </table:table-row>
        <table:table-row>
          <table:table-cell office:value-type="string" office:string-value="uw-quote-helpers">
            <text:p>uw-quote-help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0T00:05:49Z">
            <text:p>2026-03-10T00:05:49Z</text:p>
          </table:table-cell>
          <table:table-cell office:value-type="string" office:string-value="2026-03-10T00:05:49Z">
            <text:p>2026-03-10T00:05: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quote-helpers">
            <text:p>uw-quote-helpers</text:p>
          </table:table-cell>
          <table:table-cell office:value-type="string" office:string-value="False">
            <text:p>False</text:p>
          </table:table-cell>
          <table:table-cell office:value-type="string" office:string-value="2855">
            <text:p>2855</text:p>
          </table:table-cell>
          <table:table-cell office:value-type="string" office:string-value="2025-01-17T14:55:12.819Z">
            <text:p>2025-01-17T14:55:12.819Z</text:p>
          </table:table-cell>
          <table:table-cell office:value-type="string" office:string-value="['door43-preview-app', 'single-scripture-rcl', 'scripture-resources-rcl']">
            <text:p>['door43-preview-app', 'single-scripture-rcl', 'scripture-resources-rcl']</text:p>
          </table:table-cell>
          <table:table-cell office:value-type="string" office:string-value="['bible-reference-range', 'string-punctuation-tokenizer', 'tsv-groupdata-parser', 'usfm-js', 'uw-bible-parser']">
            <text:p>['bible-reference-range', 'string-punctuation-tokenizer', 'tsv-groupdata-parser', 'usfm-js', 'uw-bible-parser']</text:p>
          </table:table-cell>
          <table:table-cell office:value-type="string" office:string-value="['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office:string-value="['abelpz', 'PhotoNomad0', 'richmahn', 'Mookth789']">
            <text:p>['abelpz', 'PhotoNomad0', 'richmahn', 'Mookth789']</text:p>
          </table:table-cell>
          <table:table-cell office:value-type="string" office:string-value="0">
            <text:p>0</text:p>
          </table:table-cell>
          <table:table-cell office:value-type="string" office:string-value="0">
            <text:p>0</text:p>
          </table:table-cell>
          <table:table-cell office:value-type="string" office:string-value="https://github.com/unfoldingWord/uw-quote-helpers">
            <text:p>https://github.com/unfoldingWord/uw-quote-helpers</text:p>
          </table:table-cell>
          <table:table-cell office:value-type="string" office:string-value="2026-03-10T00:05:55Z">
            <text:p>2026-03-10T00:05:55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855 downloads in the last year).">
            <text:p>Package has detected local usage, GitHub dependents, or significant npm downloads (2855 downloads in the last year).</text:p>
          </table:table-cell>
        </table:table-row>
        <table:table-row>
          <table:table-cell office:value-type="string" office:string-value="uw-scripture-parser">
            <text:p>uw-scripture-pars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3-16T00:50:58Z">
            <text:p>2023-03-16T00:50:58Z</text:p>
          </table:table-cell>
          <table:table-cell office:value-type="string" office:string-value="2023-03-16T00:49:47Z">
            <text:p>2023-03-16T00:49: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bible-parser">
            <text:p>uw-bible-pars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quote-helpers">
            <text:p>uw-quote-helpers</text:p>
          </table:table-cell>
          <table:table-cell office:value-type="string" office:string-value="['bible-reference-range', 'usfm-js']">
            <text:p>['bible-reference-range', 'usfm-js']</text:p>
          </table:table-cell>
          <table:table-cell office:value-type="string" office:string-value="abelpz/oce-library-starter">
            <text:p>abelpz/oce-library-starter</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uw-scripture-parser">
            <text:p>https://github.com/unfoldingWord/uw-scripture-parser</text:p>
          </table:table-cell>
          <table:table-cell office:value-type="string" office:string-value="2023-03-15T02:11:57Z">
            <text:p>2023-03-15T02:11:57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uw-tsv-parser">
            <text:p>uw-tsv-pars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6-05T15:16:07Z">
            <text:p>2023-06-05T15:16:07Z</text:p>
          </table:table-cell>
          <table:table-cell office:value-type="string" office:string-value="2023-05-31T22:28:26Z">
            <text:p>2023-05-31T22:28:26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uw-tsv-parser">
            <text:p>uw-tsv-parser</text:p>
          </table:table-cell>
          <table:table-cell office:value-type="string" office:string-value="False">
            <text:p>False</text:p>
          </table:table-cell>
          <table:table-cell office:value-type="string" office:string-value="3908">
            <text:p>3908</text:p>
          </table:table-cell>
          <table:table-cell office:value-type="string" office:string-value="2022-02-02T14:06:17.344Z">
            <text:p>2022-02-02T14:06:17.344Z</text:p>
          </table:table-cell>
          <table:table-cell office:value-type="string" office:string-value="['checking-extension', 'tc-create-app', 'word-aligner-rcl', 'tsv-groupdata-parser', 'checking-tool-rcl', 'gateway-admin']">
            <text:p>['checking-extension', 'tc-create-app', 'word-aligner-rcl', 'tsv-groupdata-parser', 'checking-tool-rcl', 'gateway-admin']</text:p>
          </table:table-cell>
          <table:table-cell office:value-type="string" office:string-value="">
            <text:p/>
          </table:table-cell>
          <table:table-cell office:value-type="string" office:string-value="['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
            <text:p>['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office:string-value="['mandolyte', 'PhotoNomad0', 'ancientTexts-net', 'mannycolon']">
            <text:p>['mandolyte', 'PhotoNomad0', 'ancientTexts-net', 'mannycolon']</text:p>
          </table:table-cell>
          <table:table-cell office:value-type="string" office:string-value="0">
            <text:p>0</text:p>
          </table:table-cell>
          <table:table-cell office:value-type="string" office:string-value="0">
            <text:p>0</text:p>
          </table:table-cell>
          <table:table-cell office:value-type="string" office:string-value="https://github.com/unfoldingWord/uw-tsv-parser">
            <text:p>https://github.com/unfoldingWord/uw-tsv-parser</text:p>
          </table:table-cell>
          <table:table-cell office:value-type="string" office:string-value="2023-05-31T22:28:33Z">
            <text:p>2023-05-31T22:28:33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908 downloads in the last year).">
            <text:p>Package has detected local usage, GitHub dependents, or significant npm downloads (3908 downloads in the last year).</text:p>
          </table:table-cell>
        </table:table-row>
        <table:table-row>
          <table:table-cell office:value-type="string" office:string-value="uw-word-count">
            <text:p>uw-word-cou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5T03:16:29Z">
            <text:p>2023-01-05T03:16:29Z</text:p>
          </table:table-cell>
          <table:table-cell office:value-type="string" office:string-value="2020-08-11T13:41:51Z">
            <text:p>2020-08-11T13:41:51Z</text:p>
          </table:table-cell>
          <table:table-cell office:value-type="string" office:string-value="">
            <text:p/>
          </table:table-cell>
          <table:table-cell office:value-type="string" office:string-value="29">
            <text:p>29</text:p>
          </table:table-cell>
          <table:table-cell office:value-type="string" office:string-value="25">
            <text:p>25</text:p>
          </table:table-cell>
          <table:table-cell office:value-type="string" office:string-value="uw-word-count">
            <text:p>uw-word-count</text:p>
          </table:table-cell>
          <table:table-cell office:value-type="string" office:string-value="False">
            <text:p>False</text:p>
          </table:table-cell>
          <table:table-cell office:value-type="string" office:string-value="329">
            <text:p>329</text:p>
          </table:table-cell>
          <table:table-cell office:value-type="string" office:string-value="2020-07-15T14:01:25.409Z">
            <text:p>2020-07-15T14:01:25.409Z</text:p>
          </table:table-cell>
          <table:table-cell office:value-type="string" office:string-value="book-package-rcl">
            <text:p>book-package-rcl</text:p>
          </table:table-cell>
          <table:table-cell office:value-type="string" office:string-value="usfm-js">
            <text:p>usfm-js</text:p>
          </table:table-cell>
          <table:table-cell office:value-type="string" office:string-value="['unfoldingWord/book-package-app', 'unfoldingWord/book-package-rcl']">
            <text:p>['unfoldingWord/book-package-app', 'unfoldingWord/book-package-rcl']</text:p>
          </table:table-cell>
          <table:table-cell office:value-type="string" office:string-value="['mandolyte', 'dependabot[bot]', 'jag3773']">
            <text:p>['mandolyte',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uw-word-count">
            <text:p>https://github.com/unfoldingWord/uw-word-count</text:p>
          </table:table-cell>
          <table:table-cell office:value-type="string" office:string-value="2020-08-11T13:41:55Z">
            <text:p>2020-08-11T13:41:55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29 downloads in the last year).">
            <text:p>Package has detected local usage, GitHub dependents, or significant npm downloads (329 downloads in the last year).</text:p>
          </table:table-cell>
        </table:table-row>
        <table:table-row>
          <table:table-cell office:value-type="string" office:string-value="word-aligner">
            <text:p>word-align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12T21:12:20Z">
            <text:p>2024-08-12T21:12:20Z</text:p>
          </table:table-cell>
          <table:table-cell office:value-type="string" office:string-value="2024-08-12T21:11:20Z">
            <text:p>2024-08-12T21:11:20Z</text:p>
          </table:table-cell>
          <table:table-cell office:value-type="string" office:string-value="2019-02-06T21:43:28Z">
            <text:p>2019-02-06T21:43:28Z</text:p>
          </table:table-cell>
          <table:table-cell office:value-type="string" office:string-value="0">
            <text:p>0</text:p>
          </table:table-cell>
          <table:table-cell office:value-type="string" office:string-value="0">
            <text:p>0</text:p>
          </table:table-cell>
          <table:table-cell office:value-type="string" office:string-value="word-aligner">
            <text:p>word-aligner</text:p>
          </table:table-cell>
          <table:table-cell office:value-type="string" office:string-value="False">
            <text:p>False</text:p>
          </table:table-cell>
          <table:table-cell office:value-type="string" office:string-value="41410">
            <text:p>41410</text:p>
          </table:table-cell>
          <table:table-cell office:value-type="string" office:string-value="2024-08-12T21:12:18.988Z">
            <text:p>2024-08-12T21:12:18.988Z</text:p>
          </table:table-cell>
          <table:table-cell office:value-type="string" office:string-value="['alignment-playground', 'next-js-template', 'gateway-edit', 'tc-create-app', 'single-scripture-rcl', 'translation-helps-rcl', 'scripture-resources-rcl', 'word-aligner-rcl', 'bsa', 'translationCore', 'word-aligner-lib', 'checking-tool-rcl', 'gateway-admin', 'wordAlignment', 'tc-ui-toolkit', 'checking-tool-wrapper']">
            <text:p>['alignment-playground', 'next-js-template', 'gateway-edit', 'tc-create-app', 'single-scripture-rcl', 'translation-helps-rcl', 'scripture-resources-rcl', 'word-aligner-rcl', 'bsa', 'translationCore', 'word-aligner-lib', 'checking-tool-rcl', 'gateway-admin', 'wordAlignment', 'tc-ui-toolkit', 'checking-tool-wrapper']</text:p>
          </table:table-cell>
          <table:table-cell office:value-type="string" office:string-value="['string-punctuation-tokenizer', 'usfm-js']">
            <text:p>['string-punctuation-tokenizer', 'usfm-js']</text:p>
          </table:table-cell>
          <table:table-cell office:value-type="string" office:string-value="['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office:string-value="['PhotoNomad0', 'mannycolon', 'RoyalSix', 'richmahn', 'dependabot-support', 'Sterling (Jay) Scott', 'da1nerd', 'bspidel']">
            <text:p>['PhotoNomad0', 'mannycolon', 'RoyalSix', 'richmahn', 'dependabot-support', 'Sterling (Jay) Scott', 'da1nerd', 'bspidel']</text:p>
          </table:table-cell>
          <table:table-cell office:value-type="string" office:string-value="6">
            <text:p>6</text:p>
          </table:table-cell>
          <table:table-cell office:value-type="string" office:string-value="0">
            <text:p>0</text:p>
          </table:table-cell>
          <table:table-cell office:value-type="string" office:string-value="https://github.com/unfoldingWord/word-aligner">
            <text:p>https://github.com/unfoldingWord/word-aligner</text:p>
          </table:table-cell>
          <table:table-cell office:value-type="string" office:string-value="2025-09-26T11:17:46Z">
            <text:p>2025-09-26T11:17:46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1410 downloads in the last year).">
            <text:p>Package has detected local usage, GitHub dependents, or significant npm downloads (41410 downloads in the last year).</text:p>
          </table:table-cell>
        </table:table-row>
        <table:table-row>
          <table:table-cell office:value-type="string" office:string-value="word-aligner-lib">
            <text:p>word-aligner-lib</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16T18:07:09Z">
            <text:p>2025-12-16T18:07:09Z</text:p>
          </table:table-cell>
          <table:table-cell office:value-type="string" office:string-value="2025-12-16T18:01:23Z">
            <text:p>2025-12-16T18:01: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aligner-lib">
            <text:p>word-aligner-lib</text:p>
          </table:table-cell>
          <table:table-cell office:value-type="string" office:string-value="False">
            <text:p>False</text:p>
          </table:table-cell>
          <table:table-cell office:value-type="string" office:string-value="2710">
            <text:p>2710</text:p>
          </table:table-cell>
          <table:table-cell office:value-type="string" office:string-value="2025-12-16T18:07:08.306Z">
            <text:p>2025-12-16T18:07:08.306Z</text:p>
          </table:table-cell>
          <table:table-cell office:value-type="string" office:string-value="['word-aligner-rcl', 'checking-tool-rcl']">
            <text:p>['word-aligner-rcl', 'checking-tool-rcl']</text:p>
          </table:table-cell>
          <table:table-cell office:value-type="string" office:string-value="['string-punctuation-tokenizer', 'tc-strings', 'usfm-js', 'word-aligner', 'wordmap-lexer', 'bible-reference-range']">
            <text:p>['string-punctuation-tokenizer', 'tc-strings', 'usfm-js', 'word-aligner', 'wordmap-lexer', 'bible-reference-range']</text:p>
          </table:table-cell>
          <table:table-cell office:value-type="string" office:string-value="['unfoldingWord/door43-preview-app', 'unfoldingWord/gateway-edit', 'unfoldingWord/single-scripture-rcl', 'unfoldingWord/word-aligner-rcl']">
            <text:p>['unfoldingWord/door43-preview-app', 'unfoldingWord/gateway-edit', 'unfoldingWord/single-scripture-rcl', 'unfoldingWord/word-aligner-rc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word-aligner-lib">
            <text:p>https://github.com/unfoldingWord/word-aligner-lib</text:p>
          </table:table-cell>
          <table:table-cell office:value-type="string" office:string-value="2025-12-16T18:01:28Z">
            <text:p>2025-12-16T18:01:28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710 downloads in the last year).">
            <text:p>Package has detected local usage, GitHub dependents, or significant npm downloads (2710 downloads in the last year).</text:p>
          </table:table-cell>
        </table:table-row>
        <table:table-row>
          <table:table-cell office:value-type="string" office:string-value="word-aligner-rcl">
            <text:p>word-aligner-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9T13:16:19Z">
            <text:p>2026-03-19T13:16:19Z</text:p>
          </table:table-cell>
          <table:table-cell office:value-type="string" office:string-value="2026-03-19T13:15:07Z">
            <text:p>2026-03-19T13:15:07Z</text:p>
          </table:table-cell>
          <table:table-cell office:value-type="string" office:string-value="">
            <text:p/>
          </table:table-cell>
          <table:table-cell office:value-type="string" office:string-value="5">
            <text:p>5</text:p>
          </table:table-cell>
          <table:table-cell office:value-type="string" office:string-value="2">
            <text:p>2</text:p>
          </table:table-cell>
          <table:table-cell office:value-type="string" office:string-value="word-aligner-rcl">
            <text:p>word-aligner-rcl</text:p>
          </table:table-cell>
          <table:table-cell office:value-type="string" office:string-value="False">
            <text:p>False</text:p>
          </table:table-cell>
          <table:table-cell office:value-type="string" office:string-value="15143">
            <text:p>15143</text:p>
          </table:table-cell>
          <table:table-cell office:value-type="string" office:string-value="2026-03-19T13:16:17.575Z">
            <text:p>2026-03-19T13:16:17.575Z</text:p>
          </table:table-cell>
          <table:table-cell office:value-type="string" office:string-value="['door43-preview-app', 'gateway-edit', 'single-scripture-rcl', 'enhanced-word-aligner-rcl', '@oce-editor-tools/pk-aligner']">
            <text:p>['door43-preview-app', 'gateway-edit', 'single-scripture-rcl', 'enhanced-word-aligner-rcl', '@oce-editor-tools/pk-aligner']</text:p>
          </table:table-cell>
          <table:table-cell office:value-type="string" office:string-value="['bible-reference-range', 'string-punctuation-tokenizer', 'usfm-js', 'word-aligner', 'word-aligner-lib', 'wordmap', 'wordmap-lexer', 'uw-tsv-parser']">
            <text:p>['bible-reference-range', 'string-punctuation-tokenizer', 'usfm-js', 'word-aligner', 'word-aligner-lib', 'wordmap', 'wordmap-lexer', 'uw-tsv-parser']</text:p>
          </table:table-cell>
          <table:table-cell office:value-type="string" office:string-value="['unfoldingWord/single-scripture-rcl', 'unfoldingWord/gateway-edit', 'unfoldingWord/door43-preview-app', 'unfoldingWord-box3/word-aligner-extension', 'unfoldingWord/oce-editor-tools']">
            <text:p>['unfoldingWord/single-scripture-rcl', 'unfoldingWord/gateway-edit', 'unfoldingWord/door43-preview-app', 'unfoldingWord-box3/word-aligner-extension', 'unfoldingWord/oce-editor-tools']</text:p>
          </table:table-cell>
          <table:table-cell office:value-type="string" office:string-value="['PhotoNomad0', 'Joshua Lansford', 'jincypjose']">
            <text:p>['PhotoNomad0', 'Joshua Lansford', 'jincypjose']</text:p>
          </table:table-cell>
          <table:table-cell office:value-type="string" office:string-value="0">
            <text:p>0</text:p>
          </table:table-cell>
          <table:table-cell office:value-type="string" office:string-value="0">
            <text:p>0</text:p>
          </table:table-cell>
          <table:table-cell office:value-type="string" office:string-value="https://github.com/unfoldingWord/word-aligner-rcl">
            <text:p>https://github.com/unfoldingWord/word-aligner-rcl</text:p>
          </table:table-cell>
          <table:table-cell office:value-type="string" office:string-value="2026-03-19T13:15:19Z">
            <text:p>2026-03-19T13:15:19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5143 downloads in the last year).">
            <text:p>Package has detected local usage, GitHub dependents, or significant npm downloads (15143 downloads in the last year).</text:p>
          </table:table-cell>
        </table:table-row>
        <table:table-row>
          <table:table-cell office:value-type="string" office:string-value="wordMAP">
            <text:p>wordMA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2-18T15:24:32Z">
            <text:p>2026-02-18T15:24:32Z</text:p>
          </table:table-cell>
          <table:table-cell office:value-type="string" office:string-value="2020-07-20T13:09:49Z">
            <text:p>2020-07-20T13:09:49Z</text:p>
          </table:table-cell>
          <table:table-cell office:value-type="string" office:string-value="2020-01-21T15:05:54Z">
            <text:p>2020-01-21T15:05:54Z</text:p>
          </table:table-cell>
          <table:table-cell office:value-type="string" office:string-value="20">
            <text:p>20</text:p>
          </table:table-cell>
          <table:table-cell office:value-type="string" office:string-value="14">
            <text:p>14</text:p>
          </table:table-cell>
          <table:table-cell office:value-type="string" office:string-value="wordmap">
            <text:p>wordma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mt', 'wordmap-react-toolkit', 'word-aligner-rcl', 'uw-wordmapbooster', 'translationCore', 'wordAlignment']">
            <text:p>['wordmap-mt', 'wordmap-react-toolkit', 'word-aligner-rcl', 'uw-wordmapbooster', 'translationCore', 'wordAlignment']</text:p>
          </table:table-cell>
          <table:table-cell office:value-type="string" office:string-value="wordmap-lexer">
            <text:p>wordmap-lexer</text:p>
          </table:table-cell>
          <table:table-cell office:value-type="string" office:string-value="['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
            <text:p>['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office:string-value="['da1nerd', 'mannycolon', 'RoyalSix', 'dependabot-support', 'PhotoNomad0', 'klappy', 'dependabot[bot]', 'bspidel', 'jag3773', 'Sterling (Jay) Scott']">
            <text:p>['da1nerd', 'mannycolon', 'RoyalSix', 'dependabot-support', 'PhotoNomad0', 'klappy', 'dependabot[bot]', 'bspidel', 'jag3773', 'Sterling (Jay) Scott']</text:p>
          </table:table-cell>
          <table:table-cell office:value-type="string" office:string-value="10">
            <text:p>10</text:p>
          </table:table-cell>
          <table:table-cell office:value-type="string" office:string-value="0">
            <text:p>0</text:p>
          </table:table-cell>
          <table:table-cell office:value-type="string" office:string-value="https://github.com/unfoldingWord/wordMAP">
            <text:p>https://github.com/unfoldingWord/wordMAP</text:p>
          </table:table-cell>
          <table:table-cell office:value-type="string" office:string-value="2025-08-25T16:40:45Z">
            <text:p>2025-08-25T16:40:45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wordMAP-lexer">
            <text:p>wordMAP-lex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0-08-11T15:37:37Z">
            <text:p>2020-08-11T15:37:37Z</text:p>
          </table:table-cell>
          <table:table-cell office:value-type="string" office:string-value="2020-04-22T13:11:59Z">
            <text:p>2020-04-22T13:11: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map-lexer">
            <text:p>wordmap-lex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mt', 'alignment-playground', 'wordmap-react-toolkit', 'word-aligner-rcl', 'uw-wordmapbooster', 'translationCore', 'word-aligner-lib', 'checking-tool-rcl', 'wordmap', 'wordAlignment', 'string-punctuation-tokenizer', 'wordmap-usfm']">
            <text:p>['wordmap-mt', 'alignment-playground', 'wordmap-react-toolkit', 'word-aligner-rcl', 'uw-wordmapbooster', 'translationCore', 'word-aligner-lib', 'checking-tool-rcl', 'wordmap', 'wordAlignment', 'string-punctuation-tokenizer', 'wordmap-usfm']</text:p>
          </table:table-cell>
          <table:table-cell office:value-type="string" office:string-value="string-punctuation-tokenizer">
            <text:p>string-punctuation-tokenizer</text:p>
          </table:table-cell>
          <table:table-cell office:value-type="string" office:string-value="['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
            <text:p>['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office:string-value="['da1nerd', 'mannycolon', 'dependabot-support', 'RoyalSix', 'PhotoNomad0', 'Sterling (Jay) Scott', 'bspidel']">
            <text:p>['da1nerd', 'mannycolon', 'dependabot-support', 'RoyalSix', 'PhotoNomad0', 'Sterling (Jay) Scott', 'bspidel']</text:p>
          </table:table-cell>
          <table:table-cell office:value-type="string" office:string-value="0">
            <text:p>0</text:p>
          </table:table-cell>
          <table:table-cell office:value-type="string" office:string-value="0">
            <text:p>0</text:p>
          </table:table-cell>
          <table:table-cell office:value-type="string" office:string-value="https://github.com/unfoldingWord/wordMAP-lexer">
            <text:p>https://github.com/unfoldingWord/wordMAP-lexer</text:p>
          </table:table-cell>
          <table:table-cell office:value-type="string" office:string-value="2020-04-22T13:12:03Z">
            <text:p>2020-04-22T13:12:03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wordmapbooster">
            <text:p>wordmapboost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3-09T13:39:10Z">
            <text:p>2026-03-09T13:39:10Z</text:p>
          </table:table-cell>
          <table:table-cell office:value-type="string" office:string-value="2026-03-09T13:39:10Z">
            <text:p>2026-03-09T13:39: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wordmapbooster">
            <text:p>uw-wordmapboos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nhanced-word-aligner-rcl">
            <text:p>enhanced-word-aligner-rcl</text:p>
          </table:table-cell>
          <table:table-cell office:value-type="string" office:string-value="['usfm-js', 'wordmap', 'wordmap-lexer']">
            <text:p>['usfm-js', 'wordmap', 'wordmap-lexer']</text:p>
          </table:table-cell>
          <table:table-cell office:value-type="string" office:string-value="JEdward7777/wordmapbooster">
            <text:p>JEdward7777/wordmapbooster</text:p>
          </table:table-cell>
          <table:table-cell office:value-type="string" office:string-value="['Joshua Lansford', 'PhotoNomad0']">
            <text:p>['Joshua Lansford',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wordmapbooster">
            <text:p>https://github.com/unfoldingWord/wordmapbooster</text:p>
          </table:table-cell>
          <table:table-cell office:value-type="string" office:string-value="2026-03-09T13:39:14Z">
            <text:p>2026-03-09T13:39:14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android-door43-client">
            <text:p>android-door43-client</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50:09Z">
            <text:p>2017-04-05T23:50:09Z</text:p>
          </table:table-cell>
          <table:table-cell office:value-type="string" office:string-value="2017-04-05T23:50:01Z">
            <text:p>2017-04-05T23:50: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andreradroid']">
            <text:p>['da1nerd', 'andreradroid']</text:p>
          </table:table-cell>
          <table:table-cell office:value-type="string" office:string-value="0">
            <text:p>0</text:p>
          </table:table-cell>
          <table:table-cell office:value-type="string" office:string-value="0">
            <text:p>0</text:p>
          </table:table-cell>
          <table:table-cell office:value-type="string" office:string-value="https://github.com/unfoldingWord-dev/android-door43-client">
            <text:p>https://github.com/unfoldingWord-dev/android-door43-client</text:p>
          </table:table-cell>
          <table:table-cell office:value-type="string" office:string-value="2016-08-30T17:57:37Z">
            <text:p>2016-08-30T17:57:37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android-resource-container">
            <text:p>android-resource-contain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48:40Z">
            <text:p>2017-04-05T23:48:40Z</text:p>
          </table:table-cell>
          <table:table-cell office:value-type="string" office:string-value="2016-12-29T08:05:21Z">
            <text:p>2016-12-29T08:05: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resource-container">
            <text:p>https://github.com/unfoldingWord-dev/android-resource-container</text:p>
          </table:table-cell>
          <table:table-cell office:value-type="string" office:string-value="2017-03-07T23:44:50Z">
            <text:p>2017-03-07T23:44:5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aquifer-to-dcs">
            <text:p>aquifer-to-dcs</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29T15:49:00Z">
            <text:p>2025-03-29T15:49:00Z</text:p>
          </table:table-cell>
          <table:table-cell office:value-type="string" office:string-value="2025-03-29T15:48:56Z">
            <text:p>2025-03-29T15:48: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aquifer-to-dcs">
            <text:p>https://github.com/unfoldingWord-box3/aquifer-to-dcs</text:p>
          </table:table-cell>
          <table:table-cell office:value-type="string" office:string-value="2025-03-29T15:49:03Z">
            <text:p>2025-03-29T15:49:0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bt-servant-admin-portal">
            <text:p>bt-servant-admin-porta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3T19:48:47Z">
            <text:p>2026-05-13T19:48:47Z</text:p>
          </table:table-cell>
          <table:table-cell office:value-type="string" office:string-value="2026-05-13T19:48:44Z">
            <text:p>2026-05-13T19:48:44Z</text:p>
          </table:table-cell>
          <table:table-cell office:value-type="string" office:string-value="">
            <text:p/>
          </table:table-cell>
          <table:table-cell office:value-type="string" office:string-value="11">
            <text:p>11</text:p>
          </table:table-cell>
          <table:table-cell office:value-type="string" office:string-value="0">
            <text:p>0</text:p>
          </table:table-cell>
          <table:table-cell office:value-type="string" office:string-value="bt-servant-admin-portal">
            <text:p>bt-servant-admin-porta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sethstoll3', 'IanLindsley', 'ILindsley', 'deferredreward']">
            <text:p>['claude', 'sethstoll3', 'IanLindsley', 'ILindsley', 'deferredreward']</text:p>
          </table:table-cell>
          <table:table-cell office:value-type="string" office:string-value="0">
            <text:p>0</text:p>
          </table:table-cell>
          <table:table-cell office:value-type="string" office:string-value="0">
            <text:p>0</text:p>
          </table:table-cell>
          <table:table-cell office:value-type="string" office:string-value="https://github.com/unfoldingWord/bt-servant-admin-portal">
            <text:p>https://github.com/unfoldingWord/bt-servant-admin-portal</text:p>
          </table:table-cell>
          <table:table-cell office:value-type="string" office:string-value="2026-05-13T19:48:50Z">
            <text:p>2026-05-13T19:48:5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t-servant-engine">
            <text:p>bt-servant-engine</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23T20:10:31Z">
            <text:p>2026-03-23T20:10:31Z</text:p>
          </table:table-cell>
          <table:table-cell office:value-type="string" office:string-value="2026-01-16T14:04:11Z">
            <text:p>2026-01-16T14:04:11Z</text:p>
          </table:table-cell>
          <table:table-cell office:value-type="string" office:string-value="2026-04-24T14:42:44Z">
            <text:p>2026-04-24T14:42:44Z</text:p>
          </table:table-cell>
          <table:table-cell office:value-type="string" office:string-value="37">
            <text:p>3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abiatarprado', 'Claude Assistant', 'claude', 'Gemini', 'yakob-aleksandrovich', 'Ian Lindsley', 'Fly.io']">
            <text:p>['ILindsley', 'IanLindsley', 'abiatarprado', 'Claude Assistant', 'claude', 'Gemini', 'yakob-aleksandrovich', 'Ian Lindsley', 'Fly.io']</text:p>
          </table:table-cell>
          <table:table-cell office:value-type="string" office:string-value="6">
            <text:p>6</text:p>
          </table:table-cell>
          <table:table-cell office:value-type="string" office:string-value="0">
            <text:p>0</text:p>
          </table:table-cell>
          <table:table-cell office:value-type="string" office:string-value="https://github.com/unfoldingWord/bt-servant-engine">
            <text:p>https://github.com/unfoldingWord/bt-servant-engine</text:p>
          </table:table-cell>
          <table:table-cell office:value-type="string" office:string-value="2026-01-16T14:04:21Z">
            <text:p>2026-01-16T14:04:21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bt-servant-engine-data-loaders">
            <text:p>bt-servant-engine-data-loader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1-15T00:36:38Z">
            <text:p>2026-01-15T00:36:38Z</text:p>
          </table:table-cell>
          <table:table-cell office:value-type="string" office:string-value="2026-01-15T00:36:33Z">
            <text:p>2026-01-15T00:36: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engine-data-loaders">
            <text:p>https://github.com/unfoldingWord/bt-servant-engine-data-loaders</text:p>
          </table:table-cell>
          <table:table-cell office:value-type="string" office:string-value="2026-01-15T00:36:42Z">
            <text:p>2026-01-15T00:36:42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bt-servant-kb-worker">
            <text:p>bt-servant-kb-worker</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3-14T00:09:58Z">
            <text:p>2026-03-14T00:09:58Z</text:p>
          </table:table-cell>
          <table:table-cell office:value-type="string" office:string-value="2026-03-14T00:09:58Z">
            <text:p>2026-03-14T00:09: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text:p>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kb-worker">
            <text:p>https://github.com/unfoldingWord/bt-servant-kb-worker</text:p>
          </table:table-cell>
          <table:table-cell office:value-type="string" office:string-value="2026-03-14T00:10:02Z">
            <text:p>2026-03-14T00:10:02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bt-servant-log-viewer">
            <text:p>bt-servant-log-viewer</text:p>
          </table:table-cell>
          <table:table-cell office:value-type="string" office:string-value="unfoldingWord">
            <text:p>unfoldingWord</text:p>
          </table:table-cell>
          <table:table-cell office:value-type="string" office:string-value="Svelte">
            <text:p>Svelte</text:p>
          </table:table-cell>
          <table:table-cell office:value-type="string" office:string-value="False">
            <text:p>False</text:p>
          </table:table-cell>
          <table:table-cell office:value-type="string" office:string-value="False">
            <text:p>False</text:p>
          </table:table-cell>
          <table:table-cell office:value-type="string" office:string-value="2026-01-16T23:13:39Z">
            <text:p>2026-01-16T23:13:39Z</text:p>
          </table:table-cell>
          <table:table-cell office:value-type="string" office:string-value="2026-01-16T23:13:06Z">
            <text:p>2026-01-16T23:13:06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Lindsley', 'IanLindsley', 'codex', 'Codex Assistant']">
            <text:p>['claude', 'ILindsley', 'IanLindsley', 'codex', 'Codex Assistant']</text:p>
          </table:table-cell>
          <table:table-cell office:value-type="string" office:string-value="0">
            <text:p>0</text:p>
          </table:table-cell>
          <table:table-cell office:value-type="string" office:string-value="0">
            <text:p>0</text:p>
          </table:table-cell>
          <table:table-cell office:value-type="string" office:string-value="https://github.com/unfoldingWord/bt-servant-log-viewer">
            <text:p>https://github.com/unfoldingWord/bt-servant-log-viewer</text:p>
          </table:table-cell>
          <table:table-cell office:value-type="string" office:string-value="2026-01-16T23:13:43Z">
            <text:p>2026-01-16T23:13:4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bt-servant-message-broker">
            <text:p>bt-servant-message-brok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20T00:14:28Z">
            <text:p>2026-02-20T00:14:28Z</text:p>
          </table:table-cell>
          <table:table-cell office:value-type="string" office:string-value="2026-02-20T00:13:37Z">
            <text:p>2026-02-20T00:13:37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message-broker">
            <text:p>https://github.com/unfoldingWord/bt-servant-message-broker</text:p>
          </table:table-cell>
          <table:table-cell office:value-type="string" office:string-value="2026-02-20T00:14:18Z">
            <text:p>2026-02-20T00:14:1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bt-servant-report-sender">
            <text:p>bt-servant-report-send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7T16:47:37Z">
            <text:p>2025-12-17T16:47:37Z</text:p>
          </table:table-cell>
          <table:table-cell office:value-type="string" office:string-value="2025-12-17T16:47:32Z">
            <text:p>2025-12-17T16:4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ILindsley']">
            <text:p>['claude', 'IanLindsley',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report-sender">
            <text:p>https://github.com/unfoldingWord/bt-servant-report-sender</text:p>
          </table:table-cell>
          <table:table-cell office:value-type="string" office:string-value="2025-12-17T16:47:41Z">
            <text:p>2025-12-17T16:47:41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bt-servant-site">
            <text:p>bt-servant-si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6-05-05T20:51:59Z">
            <text:p>2026-05-05T20:51:59Z</text:p>
          </table:table-cell>
          <table:table-cell office:value-type="string" office:string-value="2026-05-05T20:51:57Z">
            <text:p>2026-05-05T20:51:57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ncyJ">
            <text:p>BincyJ</text:p>
          </table:table-cell>
          <table:table-cell office:value-type="string" office:string-value="1">
            <text:p>1</text:p>
          </table:table-cell>
          <table:table-cell office:value-type="string" office:string-value="0">
            <text:p>0</text:p>
          </table:table-cell>
          <table:table-cell office:value-type="string" office:string-value="https://github.com/unfoldingWord/bt-servant-site">
            <text:p>https://github.com/unfoldingWord/bt-servant-site</text:p>
          </table:table-cell>
          <table:table-cell office:value-type="string" office:string-value="2026-05-05T20:52:03Z">
            <text:p>2026-05-05T20:52:0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bt-servant-telemetry">
            <text:p>bt-servant-telemet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5T20:51:13Z">
            <text:p>2026-05-15T20:51:13Z</text:p>
          </table:table-cell>
          <table:table-cell office:value-type="string" office:string-value="2026-05-15T20:51:09Z">
            <text:p>2026-05-15T20:51:09Z</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bt-servant-telemetry">
            <text:p>bt-servant-telemet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claude', 'ILindsley']">
            <text:p>['IanLindsley', 'claude',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telemetry">
            <text:p>https://github.com/unfoldingWord/bt-servant-telemetry</text:p>
          </table:table-cell>
          <table:table-cell office:value-type="string" office:string-value="2026-05-15T20:51:14Z">
            <text:p>2026-05-15T20:51:14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t-servant-web-client">
            <text:p>bt-servant-web-clien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30T17:42:58Z">
            <text:p>2026-04-30T17:42:58Z</text:p>
          </table:table-cell>
          <table:table-cell office:value-type="string" office:string-value="2026-04-30T17:42:50Z">
            <text:p>2026-04-30T17:42:50Z</text:p>
          </table:table-cell>
          <table:table-cell office:value-type="string" office:string-value="">
            <text:p/>
          </table:table-cell>
          <table:table-cell office:value-type="string" office:string-value="6">
            <text:p>6</text:p>
          </table:table-cell>
          <table:table-cell office:value-type="string" office:string-value="2">
            <text:p>2</text:p>
          </table:table-cell>
          <table:table-cell office:value-type="string" office:string-value="bt-servant-web-client">
            <text:p>bt-servant-web-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claude']">
            <text:p>['ILindsley', 'Ian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bt-servant-web-client">
            <text:p>https://github.com/unfoldingWord/bt-servant-web-client</text:p>
          </table:table-cell>
          <table:table-cell office:value-type="string" office:string-value="2026-05-12T05:52:39Z">
            <text:p>2026-05-12T05:52:39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bt-servant-whatsapp-gateway">
            <text:p>bt-servant-whatsapp-gatewa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30T15:04:02Z">
            <text:p>2026-04-30T15:04:02Z</text:p>
          </table:table-cell>
          <table:table-cell office:value-type="string" office:string-value="2026-04-30T15:04:01Z">
            <text:p>2026-04-30T15:04:01Z</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bt-servant-whatsapp-gateway">
            <text:p>bt-servant-whatsapp-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claude']">
            <text:p>['ILindsley', 'Ian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bt-servant-whatsapp-gateway">
            <text:p>https://github.com/unfoldingWord/bt-servant-whatsapp-gateway</text:p>
          </table:table-cell>
          <table:table-cell office:value-type="string" office:string-value="2026-04-30T15:09:54Z">
            <text:p>2026-04-30T15:09:54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t-servant-worker">
            <text:p>bt-servant-work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3T20:17:49Z">
            <text:p>2026-05-13T20:17:49Z</text:p>
          </table:table-cell>
          <table:table-cell office:value-type="string" office:string-value="2026-05-13T20:17:46Z">
            <text:p>2026-05-13T20:17:46Z</text:p>
          </table:table-cell>
          <table:table-cell office:value-type="string" office:string-value="">
            <text:p/>
          </table:table-cell>
          <table:table-cell office:value-type="string" office:string-value="82">
            <text:p>82</text:p>
          </table:table-cell>
          <table:table-cell office:value-type="string" office:string-value="8">
            <text:p>8</text:p>
          </table:table-cell>
          <table:table-cell office:value-type="string" office:string-value="bt-servant-worker">
            <text:p>bt-servan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ILindsley', 'deferredreward']">
            <text:p>['claude', 'IanLindsley', 'ILindsley', 'deferredreward']</text:p>
          </table:table-cell>
          <table:table-cell office:value-type="string" office:string-value="0">
            <text:p>0</text:p>
          </table:table-cell>
          <table:table-cell office:value-type="string" office:string-value="0">
            <text:p>0</text:p>
          </table:table-cell>
          <table:table-cell office:value-type="string" office:string-value="https://github.com/unfoldingWord/bt-servant-worker">
            <text:p>https://github.com/unfoldingWord/bt-servant-worker</text:p>
          </table:table-cell>
          <table:table-cell office:value-type="string" office:string-value="2026-05-13T20:18:00Z">
            <text:p>2026-05-13T20:18:0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atalog-next-toolkit">
            <text:p>catalog-next-toolki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15T13:39:30Z">
            <text:p>2021-06-15T13:39:30Z</text:p>
          </table:table-cell>
          <table:table-cell office:value-type="string" office:string-value="2021-06-15T13:39:27Z">
            <text:p>2021-06-15T13:39:27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catalog-next-toolkit">
            <text:p>catalog-next-tool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content-validation">
            <text:p>uw-content-validation</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catalog-next-toolkit">
            <text:p>https://github.com/unfoldingWord/catalog-next-toolkit</text:p>
          </table:table-cell>
          <table:table-cell office:value-type="string" office:string-value="2021-06-15T13:39:33Z">
            <text:p>2021-06-15T13:39:3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ontent-validation-app">
            <text:p>content-validation-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29T11:54:08Z">
            <text:p>2021-03-29T11:54:08Z</text:p>
          </table:table-cell>
          <table:table-cell office:value-type="string" office:string-value="2021-03-29T11:54:05Z">
            <text:p>2021-03-29T11:54:05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content-validation-app">
            <text:p>content-validation-app</text:p>
          </table:table-cell>
          <table:table-cell office:value-type="string" office:string-value="False">
            <text:p>False</text:p>
          </table:table-cell>
          <table:table-cell office:value-type="string" office:string-value="164">
            <text:p>164</text:p>
          </table:table-cell>
          <table:table-cell office:value-type="string" office:string-value="2020-09-16T21:52:51.640Z">
            <text:p>2020-09-16T21:52:51.640Z</text:p>
          </table:table-cell>
          <table:table-cell office:value-type="string" office:string-value="">
            <text:p/>
          </table:table-cell>
          <table:table-cell office:value-type="string" office:string-value="uw-content-validation">
            <text:p>uw-content-validation</text:p>
          </table:table-cell>
          <table:table-cell office:value-type="string" office:string-value="">
            <text:p/>
          </table:table-cell>
          <table:table-cell office:value-type="string" office:string-value="['PhotoNomad0', 'mandolyte']">
            <text:p>['PhotoNomad0',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content-validation-app">
            <text:p>https://github.com/unfoldingWord-box3/content-validation-app</text:p>
          </table:table-cell>
          <table:table-cell office:value-type="string" office:string-value="2021-03-29T11:54:10Z">
            <text:p>2021-03-29T11:54:1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164 downloads in the last year) and no detected local consumers.">
            <text:p>Package has low but nonzero npm usage (164 downloads in the last year) and no detected local consumers.</text:p>
          </table:table-cell>
        </table:table-row>
        <table:table-row>
          <table:table-cell office:value-type="string" office:string-value="d43-catalog">
            <text:p>d43-catalog</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10-21T07:58:13Z">
            <text:p>2024-10-21T07:58:13Z</text:p>
          </table:table-cell>
          <table:table-cell office:value-type="string" office:string-value="2024-10-21T07:58:13Z">
            <text:p>2024-10-21T07:58:13Z</text:p>
          </table:table-cell>
          <table:table-cell office:value-type="string" office:string-value="">
            <text:p/>
          </table:table-cell>
          <table:table-cell office:value-type="string" office:string-value="25">
            <text:p>25</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homas Klemz', 'Richard Mahn', 'richmahn', 'jag3773', 'phillip-hopper', 'Phil Hopper', 'PhotoNomad0', 'RoyalSix', 'rbnswartz', 'RobH123', 'Sterling (Jay) Scott', 'yakob-aleksandrovich']">
            <text:p>['da1nerd', 'Thomas Klemz', 'Richard Mahn', 'richmahn', 'jag3773', 'phillip-hopper', 'Phil Hopper', 'PhotoNomad0', 'RoyalSix', 'rbnswartz', 'RobH123', 'Sterling (Jay) Scot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d43-catalog">
            <text:p>https://github.com/unfoldingWord-dev/d43-catalog</text:p>
          </table:table-cell>
          <table:table-cell office:value-type="string" office:string-value="2024-10-21T07:58:18Z">
            <text:p>2024-10-21T07:58:1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cs">
            <text:p>dcs</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5-10T00:54:58Z">
            <text:p>2026-05-10T00:54:58Z</text:p>
          </table:table-cell>
          <table:table-cell office:value-type="string" office:string-value="2026-04-19T02:36:29Z">
            <text:p>2026-04-19T02:36:29Z</text:p>
          </table:table-cell>
          <table:table-cell office:value-type="string" office:string-value="2026-03-26T20:11:53Z">
            <text:p>2026-03-26T20:11:53Z</text:p>
          </table:table-cell>
          <table:table-cell office:value-type="string" office:string-value="48">
            <text:p>48</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ure',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ure',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office:string-value="103">
            <text:p>103</text:p>
          </table:table-cell>
          <table:table-cell office:value-type="string" office:string-value="1035">
            <text:p>1035</text:p>
          </table:table-cell>
          <table:table-cell office:value-type="string" office:string-value="https://github.com/unfoldingWord/dcs">
            <text:p>https://github.com/unfoldingWord/dcs</text:p>
          </table:table-cell>
          <table:table-cell office:value-type="string" office:string-value="2026-04-19T02:36:49Z">
            <text:p>2026-04-19T02:36:49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cs-api-merge-poc">
            <text:p>dcs-api-merge-poc</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1-01-06T21:01:02Z">
            <text:p>2021-01-06T21:01:02Z</text:p>
          </table:table-cell>
          <table:table-cell office:value-type="string" office:string-value="2020-11-09T17:00:59Z">
            <text:p>2020-11-09T17:0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tury']">
            <text:p>['richmahn', 'ttury']</text:p>
          </table:table-cell>
          <table:table-cell office:value-type="string" office:string-value="0">
            <text:p>0</text:p>
          </table:table-cell>
          <table:table-cell office:value-type="string" office:string-value="0">
            <text:p>0</text:p>
          </table:table-cell>
          <table:table-cell office:value-type="string" office:string-value="https://github.com/unfoldingWord-dev/dcs-api-merge-poc">
            <text:p>https://github.com/unfoldingWord-dev/dcs-api-merge-poc</text:p>
          </table:table-cell>
          <table:table-cell office:value-type="string" office:string-value="2020-11-09T17:01:06Z">
            <text:p>2020-11-09T17:01:06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cs-api-resolve-conflicts-poc">
            <text:p>dcs-api-resolve-conflicts-poc</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0-11-13T22:23:24Z">
            <text:p>2020-11-13T22:23:24Z</text:p>
          </table:table-cell>
          <table:table-cell office:value-type="string" office:string-value="2020-11-13T22:23:18Z">
            <text:p>2020-11-13T22:23: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api-resolve-conflicts-poc">
            <text:p>https://github.com/unfoldingWord-dev/dcs-api-resolve-conflicts-poc</text:p>
          </table:table-cell>
          <table:table-cell office:value-type="string" office:string-value="2020-11-13T22:23:27Z">
            <text:p>2020-11-13T22:23:27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cs-catalog-accordion-rcl">
            <text:p>dcs-catalog-accordion-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6T18:37:43Z">
            <text:p>2024-10-16T18:37:43Z</text:p>
          </table:table-cell>
          <table:table-cell office:value-type="string" office:string-value="2024-10-16T17:21:08Z">
            <text:p>2024-10-16T17:21: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catalog-accordion-rcl">
            <text:p>dcs-catalog-accordion-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catalog-accordion-rcl">
            <text:p>https://github.com/unfoldingWord/dcs-catalog-accordion-rcl</text:p>
          </table:table-cell>
          <table:table-cell office:value-type="string" office:string-value="2024-10-16T18:37:47Z">
            <text:p>2024-10-16T18:37:47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cs-docker">
            <text:p>dcs-dock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5-13T21:16:12Z">
            <text:p>2021-05-13T21:16:12Z</text:p>
          </table:table-cell>
          <table:table-cell office:value-type="string" office:string-value="2021-05-13T21:16:06Z">
            <text:p>2021-05-13T21:1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docker">
            <text:p>dcs-doc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docker">
            <text:p>https://github.com/unfoldingWord-dev/dcs-docker</text:p>
          </table:table-cell>
          <table:table-cell office:value-type="string" office:string-value="2021-05-13T21:16:14Z">
            <text:p>2021-05-13T21:16:14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cs-docs">
            <text:p>dcs-doc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2-25T23:31:19Z">
            <text:p>2022-02-25T23:31:19Z</text:p>
          </table:table-cell>
          <table:table-cell office:value-type="string" office:string-value="2021-07-19T02:07:02Z">
            <text:p>2021-07-19T02:07: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office:string-value="0">
            <text:p>0</text:p>
          </table:table-cell>
          <table:table-cell office:value-type="string" office:string-value="0">
            <text:p>0</text:p>
          </table:table-cell>
          <table:table-cell office:value-type="string" office:string-value="https://github.com/unfoldingWord/dcs-docs">
            <text:p>https://github.com/unfoldingWord/dcs-docs</text:p>
          </table:table-cell>
          <table:table-cell office:value-type="string" office:string-value="2022-02-25T23:02:31Z">
            <text:p>2022-02-25T23:02:31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cs-file-version-diff-tool">
            <text:p>dcs-file-version-diff-too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22T17:56:46Z">
            <text:p>2022-08-22T17:56:46Z</text:p>
          </table:table-cell>
          <table:table-cell office:value-type="string" office:string-value="2022-08-19T21:40:58Z">
            <text:p>2022-08-19T21:40:58Z</text:p>
          </table:table-cell>
          <table:table-cell office:value-type="string" office:string-value="">
            <text:p/>
          </table:table-cell>
          <table:table-cell office:value-type="string" office:string-value="7">
            <text:p>7</text:p>
          </table:table-cell>
          <table:table-cell office:value-type="string" office:string-value="2">
            <text:p>2</text:p>
          </table:table-cell>
          <table:table-cell office:value-type="string" office:string-value="dcs-file-version-diff-tool">
            <text:p>dcs-file-version-diff-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danielklapp', 'jincypjose']">
            <text:p>['klappy', 'danielklapp',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dcs-file-version-diff-tool">
            <text:p>https://github.com/unfoldingWord-box3/dcs-file-version-diff-tool</text:p>
          </table:table-cell>
          <table:table-cell office:value-type="string" office:string-value="2022-08-20T00:16:31Z">
            <text:p>2022-08-20T00:16:31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cs-home-page-old">
            <text:p>dcs-home-page-old</text:p>
          </table:table-cell>
          <table:table-cell office:value-type="string" office:string-value="unfoldingWord">
            <text:p>unfoldingWord</text:p>
          </table:table-cell>
          <table:table-cell office:value-type="string" office:string-value="Dockerfile">
            <text:p>Dockerfile</text:p>
          </table:table-cell>
          <table:table-cell office:value-type="string" office:string-value="False">
            <text:p>False</text:p>
          </table:table-cell>
          <table:table-cell office:value-type="string" office:string-value="False">
            <text:p>False</text:p>
          </table:table-cell>
          <table:table-cell office:value-type="string" office:string-value="2023-01-13T23:56:37Z">
            <text:p>2023-01-13T23:56:37Z</text:p>
          </table:table-cell>
          <table:table-cell office:value-type="string" office:string-value="2023-01-13T23:55:56Z">
            <text:p>2023-01-13T23:55: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home-page-old">
            <text:p>https://github.com/unfoldingWord/dcs-home-page-old</text:p>
          </table:table-cell>
          <table:table-cell office:value-type="string" office:string-value="2023-01-31T23:27:02Z">
            <text:p>2023-01-31T23:27:02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cs-homepage">
            <text:p>dcs-homepage</text:p>
          </table:table-cell>
          <table:table-cell office:value-type="string" office:string-value="unfoldingWord">
            <text:p>unfoldingWord</text:p>
          </table:table-cell>
          <table:table-cell office:value-type="string" office:string-value="Dockerfile">
            <text:p>Dockerfile</text:p>
          </table:table-cell>
          <table:table-cell office:value-type="string" office:string-value="False">
            <text:p>False</text:p>
          </table:table-cell>
          <table:table-cell office:value-type="string" office:string-value="False">
            <text:p>False</text:p>
          </table:table-cell>
          <table:table-cell office:value-type="string" office:string-value="2023-01-15T14:16:04Z">
            <text:p>2023-01-15T14:16:04Z</text:p>
          </table:table-cell>
          <table:table-cell office:value-type="string" office:string-value="2023-01-15T14:15:17Z">
            <text:p>2023-01-15T14:15:1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homepage">
            <text:p>https://github.com/unfoldingWord/dcs-homepage</text:p>
          </table:table-cell>
          <table:table-cell office:value-type="string" office:string-value="2025-12-15T15:40:12Z">
            <text:p>2025-12-15T15:40:12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cs-local">
            <text:p>dcs-local</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2-01T18:06:35Z">
            <text:p>2023-12-01T18:06:35Z</text:p>
          </table:table-cell>
          <table:table-cell office:value-type="string" office:string-value="2023-12-01T18:06:32Z">
            <text:p>2023-12-01T18:06: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cs-local">
            <text:p>https://github.com/unfoldingWord/dcs-local</text:p>
          </table:table-cell>
          <table:table-cell office:value-type="string" office:string-value="2023-10-06T04:52:20Z">
            <text:p>2023-10-06T04:52:2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cs-login">
            <text:p>dcs-logi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06T18:17:54Z">
            <text:p>2023-04-06T18:17:54Z</text:p>
          </table:table-cell>
          <table:table-cell office:value-type="string" office:string-value="2023-04-06T18:17:50Z">
            <text:p>2023-04-06T18:1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login">
            <text:p>dcs-log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dcs-login">
            <text:p>https://github.com/unfoldingWord-box3/dcs-login</text:p>
          </table:table-cell>
          <table:table-cell office:value-type="string" office:string-value="2023-04-04T15:43:56Z">
            <text:p>2023-04-04T15:43:56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dcs-packages">
            <text:p>dcs-packag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packages">
            <text:p>dcs-pack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cs-packages/dcs-js">
            <text:p>dcs-packages/dcs-j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js">
            <text:p>dcs-js</text:p>
          </table:table-cell>
          <table:table-cell office:value-type="string" office:string-value="">
            <text:p/>
          </table:table-cell>
          <table:table-cell office:value-type="string" office:string-value="512">
            <text:p>512</text:p>
          </table:table-cell>
          <table:table-cell office:value-type="string" office:string-value="2022-11-02T13:18:25.384Z">
            <text:p>2022-11-02T13:18:25.384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512 downloads in the last year) and no detected local consumers.">
            <text:p>Package has low but nonzero npm usage (512 downloads in the last year) and no detected local consumers.</text:p>
          </table:table-cell>
        </table:table-row>
        <table:table-row>
          <table:table-cell office:value-type="string" office:string-value="dcs-packages/dcs-js-example">
            <text:p>dcs-packages/dcs-js-exampl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js-example">
            <text:p>dcs-js-ex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cs-packages/dcs-ts">
            <text:p>dcs-packages/dcs-t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ts">
            <text:p>dcs-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cs-packages/vite-project">
            <text:p>dcs-packages/vite-projec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vite-project">
            <text:p>vite-proje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cs-profile-blank">
            <text:p>dcs-profile-blank</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05:04Z">
            <text:p>2021-05-11T21:05:04Z</text:p>
          </table:table-cell>
          <table:table-cell office:value-type="string" office:string-value="2021-05-11T21:04:58Z">
            <text:p>2021-05-11T21:04: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blank">
            <text:p>https://github.com/unfoldingWord-dev/dcs-profile-blank</text:p>
          </table:table-cell>
          <table:table-cell office:value-type="string" office:string-value="2021-05-11T21:05:08Z">
            <text:p>2021-05-11T21:05:0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cs-profile-unfoldingword">
            <text:p>dcs-profile-unfoldingword</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28:28Z">
            <text:p>2021-05-11T21:28:28Z</text:p>
          </table:table-cell>
          <table:table-cell office:value-type="string" office:string-value="2021-05-11T21:04:58Z">
            <text:p>2021-05-11T21:04: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unfoldingword">
            <text:p>https://github.com/unfoldingWord-dev/dcs-profile-unfoldingword</text:p>
          </table:table-cell>
          <table:table-cell office:value-type="string" office:string-value="2021-05-11T21:28:35Z">
            <text:p>2021-05-11T21:28:35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cs-profile-unfoldingword-mirrored">
            <text:p>dcs-profile-unfoldingword-mirrored</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0:44:48Z">
            <text:p>2021-05-11T20:44:48Z</text:p>
          </table:table-cell>
          <table:table-cell office:value-type="string" office:string-value="2021-05-06T17:19:29Z">
            <text:p>2021-05-06T17:19: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unfoldingword-mirrored">
            <text:p>https://github.com/unfoldingWord-dev/dcs-profile-unfoldingword-mirrored</text:p>
          </table:table-cell>
          <table:table-cell office:value-type="string" office:string-value="2021-05-11T20:44:52Z">
            <text:p>2021-05-11T20:44:52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cs-templates">
            <text:p>dcs-template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1-27T10:22:11Z">
            <text:p>2023-11-27T10:22:11Z</text:p>
          </table:table-cell>
          <table:table-cell office:value-type="string" office:string-value="2023-11-27T10:22:08Z">
            <text:p>2023-11-27T10:22: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foxprogs']">
            <text:p>['richmahn', 'foxprogs']</text:p>
          </table:table-cell>
          <table:table-cell office:value-type="string" office:string-value="0">
            <text:p>0</text:p>
          </table:table-cell>
          <table:table-cell office:value-type="string" office:string-value="0">
            <text:p>0</text:p>
          </table:table-cell>
          <table:table-cell office:value-type="string" office:string-value="https://github.com/unfoldingWord/dcs-templates">
            <text:p>https://github.com/unfoldingWord/dcs-templates</text:p>
          </table:table-cell>
          <table:table-cell office:value-type="string" office:string-value="2023-09-27T18:53:50Z">
            <text:p>2023-09-27T18:53:5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cs-vanilla">
            <text:p>dcs-vanilla</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1-25T15:47:26Z">
            <text:p>2025-01-25T15:47:26Z</text:p>
          </table:table-cell>
          <table:table-cell office:value-type="string" office:string-value="2025-01-25T15:47:11Z">
            <text:p>2025-01-25T15:47: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dcs-vanilla">
            <text:p>https://github.com/unfoldingWord-box3/dcs-vanilla</text:p>
          </table:table-cell>
          <table:table-cell office:value-type="string" office:string-value="2025-01-25T15:47:15Z">
            <text:p>2025-01-25T15:47:15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oor43">
            <text:p>Door43</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7-04-25T18:49:08Z">
            <text:p>2017-04-25T18:49:08Z</text:p>
          </table:table-cell>
          <table:table-cell office:value-type="string" office:string-value="2016-11-15T14:20:40Z">
            <text:p>2016-11-15T14:20:40Z</text:p>
          </table:table-cell>
          <table:table-cell office:value-type="string" office:string-value="">
            <text:p/>
          </table:table-cell>
          <table:table-cell office:value-type="string" office:string-value="17">
            <text:p>1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illip-hopper', 'Phil Hopper', 'da1nerd', 'PurpleGuitar', 'superdav42', 'Apache', 'Apache Production', 'licoabi', 'root', 'kbuildsyourdotcom', 'dboerschlein', 'codemis', 'Apache Door43', 'Jesse A. Griffin', 'jag3773', 'Ricahrd Mahn', 'System Administrator', 'richmahn@gmail.com']">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office:string-value="0">
            <text:p>0</text:p>
          </table:table-cell>
          <table:table-cell office:value-type="string" office:string-value="0">
            <text:p>0</text:p>
          </table:table-cell>
          <table:table-cell office:value-type="string" office:string-value="https://github.com/unfoldingWord-dev/Door43">
            <text:p>https://github.com/unfoldingWord-dev/Door43</text:p>
          </table:table-cell>
          <table:table-cell office:value-type="string" office:string-value="2026-03-15T03:14:44Z">
            <text:p>2026-03-15T03:14:44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oor43-acceptance-tests">
            <text:p>door43-acceptance-test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3-16T21:59:37Z">
            <text:p>2017-03-16T21:59:37Z</text:p>
          </table:table-cell>
          <table:table-cell office:value-type="string" office:string-value="2017-03-16T21:59:36Z">
            <text:p>2017-03-16T21:59: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jag3773', 'Phil Hopper']">
            <text:p>['phillip-hopper', 'jag3773',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or43-acceptance-tests">
            <text:p>https://github.com/unfoldingWord-dev/door43-acceptance-tests</text:p>
          </table:table-cell>
          <table:table-cell office:value-type="string" office:string-value="2023-01-28T16:19:09Z">
            <text:p>2023-01-28T16:19:09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oor43-catalog-job-handler">
            <text:p>door43-catalog-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4-02T14:43:48Z">
            <text:p>2023-04-02T14:43:48Z</text:p>
          </table:table-cell>
          <table:table-cell office:value-type="string" office:string-value="2023-04-02T14:40:57Z">
            <text:p>2023-04-02T14:40:57Z</text:p>
          </table:table-cell>
          <table:table-cell office:value-type="string" office:string-value="2023-04-02T14:43:48Z">
            <text:p>2023-04-02T14:43:48Z</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da1nerd']">
            <text:p>['richmahn', 'da1nerd']</text:p>
          </table:table-cell>
          <table:table-cell office:value-type="string" office:string-value="8">
            <text:p>8</text:p>
          </table:table-cell>
          <table:table-cell office:value-type="string" office:string-value="0">
            <text:p>0</text:p>
          </table:table-cell>
          <table:table-cell office:value-type="string" office:string-value="https://github.com/unfoldingWord/door43-catalog-job-handler">
            <text:p>https://github.com/unfoldingWord/door43-catalog-job-handler</text:p>
          </table:table-cell>
          <table:table-cell office:value-type="string" office:string-value="2022-10-04T15:44:21Z">
            <text:p>2022-10-04T15:44:21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oor43-job-handler">
            <text:p>door43-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1-23T20:41:34Z">
            <text:p>2024-01-23T20:41:34Z</text:p>
          </table:table-cell>
          <table:table-cell office:value-type="string" office:string-value="2024-01-23T20:20:22Z">
            <text:p>2024-01-23T20:20:22Z</text:p>
          </table:table-cell>
          <table:table-cell office:value-type="string" office:string-value="2024-01-23T20:41:34Z">
            <text:p>2024-01-23T20:41:34Z</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Robert Hunt', 'jag3773', 'yakob-aleksandrovich']">
            <text:p>['RobH123', 'richmahn', 'Robert Hunt', 'jag3773', 'yakob-aleksandrovich']</text:p>
          </table:table-cell>
          <table:table-cell office:value-type="string" office:string-value="38">
            <text:p>38</text:p>
          </table:table-cell>
          <table:table-cell office:value-type="string" office:string-value="0">
            <text:p>0</text:p>
          </table:table-cell>
          <table:table-cell office:value-type="string" office:string-value="https://github.com/unfoldingWord/door43-job-handler">
            <text:p>https://github.com/unfoldingWord/door43-job-handler</text:p>
          </table:table-cell>
          <table:table-cell office:value-type="string" office:string-value="2024-02-06T15:21:33Z">
            <text:p>2024-02-06T15:21:3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oor43-preview-actions">
            <text:p>door43-preview-action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3T22:32:56Z">
            <text:p>2025-11-23T22:32:56Z</text:p>
          </table:table-cell>
          <table:table-cell office:value-type="string" office:string-value="2025-11-23T22:32:54Z">
            <text:p>2025-11-23T22:32: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or43-preview-actions">
            <text:p>https://github.com/unfoldingWord/door43-preview-actions</text:p>
          </table:table-cell>
          <table:table-cell office:value-type="string" office:string-value="2025-11-23T22:33:00Z">
            <text:p>2025-11-23T22:33:0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oor43-preview-app">
            <text:p>door43-preview-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5T22:45:58Z">
            <text:p>2026-05-15T22:45:58Z</text:p>
          </table:table-cell>
          <table:table-cell office:value-type="string" office:string-value="2026-05-15T22:45:04Z">
            <text:p>2026-05-15T22:45:04Z</text:p>
          </table:table-cell>
          <table:table-cell office:value-type="string" office:string-value="2026-05-15T22:45:58Z">
            <text:p>2026-05-15T22:45:58Z</text:p>
          </table:table-cell>
          <table:table-cell office:value-type="string" office:string-value="5">
            <text:p>5</text:p>
          </table:table-cell>
          <table:table-cell office:value-type="string" office:string-value="0">
            <text:p>0</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usfm-alignment-remover', 'usfm-js', 'uw-quote-helpers', 'word-aligner-rcl']">
            <text:p>['bible-reference-rcl', 'usfm-alignment-remover', 'usfm-js', 'uw-quote-helpers', 'word-aligner-rcl']</text:p>
          </table:table-cell>
          <table:table-cell office:value-type="string" office:string-value="">
            <text:p/>
          </table:table-cell>
          <table:table-cell office:value-type="string" office:string-value="['richmahn', 'larsgson', 'PhotoNomad0']">
            <text:p>['richmahn', 'larsgson', 'PhotoNomad0']</text:p>
          </table:table-cell>
          <table:table-cell office:value-type="string" office:string-value="23">
            <text:p>23</text:p>
          </table:table-cell>
          <table:table-cell office:value-type="string" office:string-value="0">
            <text:p>0</text:p>
          </table:table-cell>
          <table:table-cell office:value-type="string" office:string-value="https://github.com/unfoldingWord/door43-preview-app">
            <text:p>https://github.com/unfoldingWord/door43-preview-app</text:p>
          </table:table-cell>
          <table:table-cell office:value-type="string" office:string-value="2026-05-15T22:45:10Z">
            <text:p>2026-05-15T22:45:1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oor43-preview-rcl">
            <text:p>door43-preview-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20T16:57:57Z">
            <text:p>2020-10-20T16:57:57Z</text:p>
          </table:table-cell>
          <table:table-cell office:value-type="string" office:string-value="2020-10-20T16:57:17Z">
            <text:p>2020-10-20T16:57:1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df-generator-rcl">
            <text:p>pdf-generato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scripture-resources-rcl']">
            <text:p>['gitea-react-toolkit', 'markdown-translatable', 'scripture-resources-rcl']</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door43-preview-rcl">
            <text:p>https://github.com/unfoldingWord-box3/door43-preview-rcl</text:p>
          </table:table-cell>
          <table:table-cell office:value-type="string" office:string-value="2022-06-14T15:16:13Z">
            <text:p>2022-06-14T15:16:1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oor43-preview-renderers">
            <text:p>door43-preview-render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2-11T16:15:26Z">
            <text:p>2026-02-11T16:15:26Z</text:p>
          </table:table-cell>
          <table:table-cell office:value-type="string" office:string-value="2026-02-11T16:15:23Z">
            <text:p>2026-02-11T16:15: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oor43-preview-renderers">
            <text:p>door43-preview-render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alignment-remover', 'usfm-js']">
            <text:p>['usfm-alignment-remover', 'usfm-j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or43-preview-renderers">
            <text:p>https://github.com/unfoldingWord/door43-preview-renderers</text:p>
          </table:table-cell>
          <table:table-cell office:value-type="string" office:string-value="2026-02-11T16:15:30Z">
            <text:p>2026-02-11T16:15:3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oor43.org">
            <text:p>door43.org</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4T16:02:14Z">
            <text:p>2026-03-14T16:02:14Z</text:p>
          </table:table-cell>
          <table:table-cell office:value-type="string" office:string-value="2024-04-11T03:45:41Z">
            <text:p>2024-04-11T03:45:41Z</text:p>
          </table:table-cell>
          <table:table-cell office:value-type="string" office:string-value="">
            <text:p/>
          </table:table-cell>
          <table:table-cell office:value-type="string" office:string-value="103">
            <text:p>103</text:p>
          </table:table-cell>
          <table:table-cell office:value-type="string" office:string-value="18">
            <text:p>18</text:p>
          </table:table-cell>
          <table:table-cell office:value-type="string" office:string-value="door43.org">
            <text:p>door43.or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jag3773', 'RobH123', 'PhotoNomad0', 'Phil Hopper', 'codemis', 'Richard Mahn', 'phillip-hopper', 'dependabot[bot]', 'yakob-aleksandrovich', 'bspidel', 'ethantkoenig', 'dependabot-preview[bot]']">
            <text:p>['richmahn', 'jag3773', 'RobH123', 'PhotoNomad0', 'Phil Hopper', 'codemis', 'Richard Mahn', 'phillip-hopper', 'dependabot[bot]', 'yakob-aleksandrovich', 'bspidel', 'ethantkoenig', 'dependabot-preview[bot]']</text:p>
          </table:table-cell>
          <table:table-cell office:value-type="string" office:string-value="0">
            <text:p>0</text:p>
          </table:table-cell>
          <table:table-cell office:value-type="string" office:string-value="0">
            <text:p>0</text:p>
          </table:table-cell>
          <table:table-cell office:value-type="string" office:string-value="https://github.com/unfoldingWord/door43.org">
            <text:p>https://github.com/unfoldingWord/door43.org</text:p>
          </table:table-cell>
          <table:table-cell office:value-type="string" office:string-value="2026-03-15T03:14:46Z">
            <text:p>2026-03-15T03:14:46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gateway-admin">
            <text:p>gateway-admin</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8-19T18:27:40Z">
            <text:p>2025-08-19T18:27:40Z</text:p>
          </table:table-cell>
          <table:table-cell office:value-type="string" office:string-value="2025-08-19T18:09:12Z">
            <text:p>2025-08-19T18:09:12Z</text:p>
          </table:table-cell>
          <table:table-cell office:value-type="string" office:string-value="2024-10-21T20:57:32Z">
            <text:p>2024-10-21T20:57:32Z</text:p>
          </table:table-cell>
          <table:table-cell office:value-type="string" office:string-value="43">
            <text:p>43</text:p>
          </table:table-cell>
          <table:table-cell office:value-type="string" office:string-value="0">
            <text:p>0</text:p>
          </table:table-cell>
          <table:table-cell office:value-type="string" office:string-value="gateway-admin">
            <text:p>gateway-adm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branch-merger', 'gitea-react-toolkit', 'markdown-translatable', 'resource-workspace-rcl', 'scripture-resources-rcl', 'single-scripture-rcl', 'tc-ui-toolkit', 'translation-helps-rcl', 'uw-content-validation', 'uw-tsv-parser', 'word-aligner']">
            <text:p>['dcs-branch-merger', 'gitea-react-toolkit', 'markdown-translatable', 'resource-workspace-rcl', 'scripture-resources-rcl', 'single-scripture-rcl', 'tc-ui-toolkit', 'translation-helps-rcl', 'uw-content-validation', 'uw-tsv-parser', 'word-aligner']</text:p>
          </table:table-cell>
          <table:table-cell office:value-type="string" office:string-value="">
            <text:p/>
          </table:table-cell>
          <table:table-cell office:value-type="string" office:string-value="['mandolyte', 'superdav42', 'richmahn', 'theNerd247', 'mannycolon', 'birchamp', 'abelpz', 'Joel-C-Johnson', 'PhotoNomad0']">
            <text:p>['mandolyte', 'superdav42', 'richmahn', 'theNerd247', 'mannycolon', 'birchamp', 'abelpz', 'Joel-C-Johnson', 'PhotoNomad0']</text:p>
          </table:table-cell>
          <table:table-cell office:value-type="string" office:string-value="7">
            <text:p>7</text:p>
          </table:table-cell>
          <table:table-cell office:value-type="string" office:string-value="0">
            <text:p>0</text:p>
          </table:table-cell>
          <table:table-cell office:value-type="string" office:string-value="https://github.com/unfoldingWord/gateway-admin">
            <text:p>https://github.com/unfoldingWord/gateway-admin</text:p>
          </table:table-cell>
          <table:table-cell office:value-type="string" office:string-value="2025-08-19T18:09:19Z">
            <text:p>2025-08-19T18:09:19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gateway-edit">
            <text:p>gateway-ed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2T20:59:09Z">
            <text:p>2026-05-12T20:59:09Z</text:p>
          </table:table-cell>
          <table:table-cell office:value-type="string" office:string-value="2026-05-11T20:47:50Z">
            <text:p>2026-05-11T20:47:50Z</text:p>
          </table:table-cell>
          <table:table-cell office:value-type="string" office:string-value="2026-03-18T14:48:31Z">
            <text:p>2026-03-18T14:48:31Z</text:p>
          </table:table-cell>
          <table:table-cell office:value-type="string" office:string-value="158">
            <text:p>158</text:p>
          </table:table-cell>
          <table:table-cell office:value-type="string" office:string-value="12">
            <text:p>12</text:p>
          </table:table-cell>
          <table:table-cell office:value-type="string" office:string-value="gateway-edit">
            <text:p>gateway-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enhanced-word-aligner-rcl', 'gitea-react-toolkit', 'markdown-translatable', 'resource-workspace-rcl', 'scripture-resources-rcl', 'scripture-tsv', 'single-scripture-rcl', 'tc-ui-toolkit', 'translation-helps-rcl', 'word-aligner', 'word-aligner-rcl']">
            <text:p>['bible-reference-rcl', 'enhanced-word-aligner-rcl', 'gitea-react-toolkit', 'markdown-translatable', 'resource-workspace-rcl', 'scripture-resources-rcl', 'scripture-tsv', 'single-scripture-rcl', 'tc-ui-toolkit', 'translation-helps-rcl', 'word-aligner', 'word-aligner-rcl']</text:p>
          </table:table-cell>
          <table:table-cell office:value-type="string" office:string-value="">
            <text:p/>
          </table:table-cell>
          <table:table-cell office:value-type="string" office:string-value="['PhotoNomad0', 'mannycolon', 'kintsoogi', 'abelpz', 'Joel-C-Johnson', 'richmahn', 'theNerd247', 'benjamin-test', 'jincypjose', 'larsgson', 'mandolyte', 'claude', 'elsylambert']">
            <text:p>['PhotoNomad0', 'mannycolon', 'kintsoogi', 'abelpz', 'Joel-C-Johnson', 'richmahn', 'theNerd247', 'benjamin-test', 'jincypjose', 'larsgson', 'mandolyte', 'claude', 'elsylambert']</text:p>
          </table:table-cell>
          <table:table-cell office:value-type="string" office:string-value="17">
            <text:p>17</text:p>
          </table:table-cell>
          <table:table-cell office:value-type="string" office:string-value="1">
            <text:p>1</text:p>
          </table:table-cell>
          <table:table-cell office:value-type="string" office:string-value="https://github.com/unfoldingWord/gateway-edit">
            <text:p>https://github.com/unfoldingWord/gateway-edit</text:p>
          </table:table-cell>
          <table:table-cell office:value-type="string" office:string-value="2026-05-11T20:47:56Z">
            <text:p>2026-05-11T20:47:56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gateway-edit-POC">
            <text:p>gateway-edit-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1-22T13:29:02Z">
            <text:p>2021-11-22T13:29:02Z</text:p>
          </table:table-cell>
          <table:table-cell office:value-type="string" office:string-value="2021-11-22T13:29:02Z">
            <text:p>2021-11-22T13:29:02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gateway-edit">
            <text:p>gateway-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gitea-react-toolkit', 'markdown-translatable', 'resource-workspace-rcl', 'scripture-resources-rcl', 'single-scripture-rcl', 'tc-ui-toolkit', 'translation-helps-rcl', 'word-aligner']">
            <text:p>['bible-reference-rcl', 'gitea-react-toolkit', 'markdown-translatable', 'resource-workspace-rcl', 'scripture-resources-rcl', 'single-scripture-rcl', 'tc-ui-toolkit', 'translation-helps-rcl', 'word-aligner']</text:p>
          </table:table-cell>
          <table:table-cell office:value-type="string" office:string-value="">
            <text:p/>
          </table:table-cell>
          <table:table-cell office:value-type="string" office:string-value="['PhotoNomad0', 'mannycolon', 'Joel-C-Johnson', 'jincypjose']">
            <text:p>['PhotoNomad0', 'mannycolon', 'Joel-C-Johnson',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gateway-edit-POC">
            <text:p>https://github.com/unfoldingWord-box3/gateway-edit-POC</text:p>
          </table:table-cell>
          <table:table-cell office:value-type="string" office:string-value="2021-11-22T13:29:05Z">
            <text:p>2021-11-22T13:29:05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gateway-translate">
            <text:p>gateway-translat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08:42:40Z">
            <text:p>2024-01-12T08:42:40Z</text:p>
          </table:table-cell>
          <table:table-cell office:value-type="string" office:string-value="2024-01-10T13:38:37Z">
            <text:p>2024-01-10T13:38:37Z</text:p>
          </table:table-cell>
          <table:table-cell office:value-type="string" office:string-value="2024-01-12T13:59:58Z">
            <text:p>2024-01-12T13:59:58Z</text:p>
          </table:table-cell>
          <table:table-cell office:value-type="string" office:string-value="35">
            <text:p>35</text:p>
          </table:table-cell>
          <table:table-cell office:value-type="string" office:string-value="5">
            <text:p>5</text:p>
          </table:table-cell>
          <table:table-cell office:value-type="string" office:string-value="gateway-translate">
            <text:p>gateway-trans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dcs-js', 'resource-workspace-rcl', 'scripture-resources-rcl', 'translation-helps-rcl']">
            <text:p>['bible-reference-rcl', 'dcs-js', 'resource-workspace-rcl', 'scripture-resources-rcl', 'translation-helps-rcl']</text:p>
          </table:table-cell>
          <table:table-cell office:value-type="string" office:string-value="">
            <text:p/>
          </table:table-cell>
          <table:table-cell office:value-type="string" office:string-value="['mandolyte', 'larsgson', 'superdav42', 'abelpz', 'theNerd247', 'richmahn', 'elsylambert', 'jincypjose']">
            <text:p>['mandolyte', 'larsgson', 'superdav42', 'abelpz', 'theNerd247', 'richmahn', 'elsylambert', 'jincypjose']</text:p>
          </table:table-cell>
          <table:table-cell office:value-type="string" office:string-value="3">
            <text:p>3</text:p>
          </table:table-cell>
          <table:table-cell office:value-type="string" office:string-value="0">
            <text:p>0</text:p>
          </table:table-cell>
          <table:table-cell office:value-type="string" office:string-value="https://github.com/unfoldingWord/gateway-translate">
            <text:p>https://github.com/unfoldingWord/gateway-translate</text:p>
          </table:table-cell>
          <table:table-cell office:value-type="string" office:string-value="2023-01-21T16:44:36Z">
            <text:p>2023-01-21T16:44:36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graphql-catalog-next">
            <text:p>graphql-catalog-nex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6-08T15:35:33Z">
            <text:p>2021-06-08T15:35:33Z</text:p>
          </table:table-cell>
          <table:table-cell office:value-type="string" office:string-value="2021-06-08T15:35:20Z">
            <text:p>2021-06-08T15:35:20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kavitharaju', 'abelpz']">
            <text:p>['mannycolon', 'kavitharaju', 'abelpz']</text:p>
          </table:table-cell>
          <table:table-cell office:value-type="string" office:string-value="0">
            <text:p>0</text:p>
          </table:table-cell>
          <table:table-cell office:value-type="string" office:string-value="0">
            <text:p>0</text:p>
          </table:table-cell>
          <table:table-cell office:value-type="string" office:string-value="https://github.com/unfoldingWord-box3/graphql-catalog-next">
            <text:p>https://github.com/unfoldingWord-box3/graphql-catalog-next</text:p>
          </table:table-cell>
          <table:table-cell office:value-type="string" office:string-value="2021-06-08T15:35:23Z">
            <text:p>2021-06-08T15:35:2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hello-dcs-react-component-library">
            <text:p>hello-dcs-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27T00:47:55Z">
            <text:p>2023-01-27T00:47:55Z</text:p>
          </table:table-cell>
          <table:table-cell office:value-type="string" office:string-value="2022-12-16T08:48:26Z">
            <text:p>2022-12-16T08:48:26Z</text:p>
          </table:table-cell>
          <table:table-cell office:value-type="string" office:string-value="">
            <text:p/>
          </table:table-cell>
          <table:table-cell office:value-type="string" office:string-value="6">
            <text:p>6</text:p>
          </table:table-cell>
          <table:table-cell office:value-type="string" office:string-value="6">
            <text:p>6</text:p>
          </table:table-cell>
          <table:table-cell office:value-type="string" office:string-value="hello-dcs-react-component-library">
            <text:p>hello-dcs-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richmahn', 'dependabot[bot]', 'yakob-aleksandrovich']">
            <text:p>['richmahn', 'dependabot[bo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hello-dcs-react-component-library">
            <text:p>https://github.com/unfoldingWord-box3/hello-dcs-react-component-library</text:p>
          </table:table-cell>
          <table:table-cell office:value-type="string" office:string-value="2022-06-14T15:15:13Z">
            <text:p>2022-06-14T15:15:1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Katalon-gatewayEdit-Elsy">
            <text:p>Katalon-gatewayEdit-Els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9-01T17:44:59Z">
            <text:p>2021-09-01T17:44:59Z</text:p>
          </table:table-cell>
          <table:table-cell office:value-type="string" office:string-value="2021-09-01T17:44:55Z">
            <text:p>2021-09-01T17:44: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itsonlambert', 'elsylambert']">
            <text:p>['elsylitsonlambert', 'elsylambert']</text:p>
          </table:table-cell>
          <table:table-cell office:value-type="string" office:string-value="0">
            <text:p>0</text:p>
          </table:table-cell>
          <table:table-cell office:value-type="string" office:string-value="0">
            <text:p>0</text:p>
          </table:table-cell>
          <table:table-cell office:value-type="string" office:string-value="https://github.com/unfoldingWord/Katalon-gatewayEdit-Elsy">
            <text:p>https://github.com/unfoldingWord/Katalon-gatewayEdit-Elsy</text:p>
          </table:table-cell>
          <table:table-cell office:value-type="string" office:string-value="2021-09-01T17:45:03Z">
            <text:p>2021-09-01T17:45:0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Katalon-gatewayEdit-Koz">
            <text:p>Katalon-gatewayEdit-Koz</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01T04:27:45Z">
            <text:p>2021-07-01T04:27:45Z</text:p>
          </table:table-cell>
          <table:table-cell office:value-type="string" office:string-value="2021-05-22T18:43:02Z">
            <text:p>2021-05-22T18:43: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Katalon-gatewayEdit-Koz">
            <text:p>https://github.com/unfoldingWord/Katalon-gatewayEdit-Koz</text:p>
          </table:table-cell>
          <table:table-cell office:value-type="string" office:string-value="2021-05-22T18:43:04Z">
            <text:p>2021-05-22T18:43:04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node-dcs-api-client">
            <text:p>node-dcs-api-client</text:p>
          </table:table-cell>
          <table:table-cell office:value-type="string" office:string-value="unfoldingWord-dev">
            <text:p>unfoldingWord-dev</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04-22T11:32:53Z">
            <text:p>2022-04-22T11:32:53Z</text:p>
          </table:table-cell>
          <table:table-cell office:value-type="string" office:string-value="2022-04-22T11:31:46Z">
            <text:p>2022-04-22T11:31:46Z</text:p>
          </table:table-cell>
          <table:table-cell office:value-type="string" office:string-value="2022-04-22T11:32:54Z">
            <text:p>2022-04-22T11:32:54Z</text:p>
          </table:table-cell>
          <table:table-cell office:value-type="string" office:string-value="0">
            <text:p>0</text:p>
          </table:table-cell>
          <table:table-cell office:value-type="string" office:string-value="0">
            <text:p>0</text:p>
          </table:table-cell>
          <table:table-cell office:value-type="string" office:string-value="dcs_api_client">
            <text:p>dcs_api_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3">
            <text:p>3</text:p>
          </table:table-cell>
          <table:table-cell office:value-type="string" office:string-value="0">
            <text:p>0</text:p>
          </table:table-cell>
          <table:table-cell office:value-type="string" office:string-value="https://github.com/unfoldingWord-dev/node-dcs-api-client">
            <text:p>https://github.com/unfoldingWord-dev/node-dcs-api-client</text:p>
          </table:table-cell>
          <table:table-cell office:value-type="string" office:string-value="2023-01-27T20:32:30Z">
            <text:p>2023-01-27T20:32:3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node-door43-rc">
            <text:p>node-door43-rc</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8-30T17:28:52Z">
            <text:p>2016-08-30T17:28:52Z</text:p>
          </table:table-cell>
          <table:table-cell office:value-type="string" office:string-value="2016-08-30T17:28:49Z">
            <text:p>2016-08-30T17:28: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oor43-rc">
            <text:p>door43-rc</text:p>
          </table:table-cell>
          <table:table-cell office:value-type="string" office:string-value="True">
            <text:p>True</text:p>
          </table:table-cell>
          <table:table-cell office:value-type="string" office:string-value="475">
            <text:p>475</text:p>
          </table:table-cell>
          <table:table-cell office:value-type="string" office:string-value="2016-09-01T18:35:44.393Z">
            <text:p>2016-09-01T18:35:44.39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node-door43-rc">
            <text:p>https://github.com/unfoldingWord-dev/node-door43-rc</text:p>
          </table:table-cell>
          <table:table-cell office:value-type="string" office:string-value="2016-08-25T18:39:16Z">
            <text:p>2016-08-25T18:39:16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d npm package">
            <text:p>Deprecated npm package</text:p>
          </table:table-cell>
          <table:table-cell office:value-type="string" office:string-value="Npm package is already explicitly marked as deprecated.">
            <text:p>Npm package is already explicitly marked as deprecated.</text:p>
          </table:table-cell>
        </table:table-row>
        <table:table-row>
          <table:table-cell office:value-type="string" office:string-value="obs-app">
            <text:p>obs-ap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5T15:14:30Z">
            <text:p>2026-05-05T15:14:30Z</text:p>
          </table:table-cell>
          <table:table-cell office:value-type="string" office:string-value="2026-05-05T15:14:21Z">
            <text:p>2026-05-05T15:14:21Z</text:p>
          </table:table-cell>
          <table:table-cell office:value-type="string" office:string-value="2025-06-03T04:28:11Z">
            <text:p>2025-06-03T04:28:11Z</text:p>
          </table:table-cell>
          <table:table-cell office:value-type="string" office:string-value="6">
            <text:p>6</text:p>
          </table:table-cell>
          <table:table-cell office:value-type="string" office:string-value="0">
            <text:p>0</text:p>
          </table:table-cell>
          <table:table-cell office:value-type="string" office:string-value="obs-app">
            <text:p>obs-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eliaspinero']">
            <text:p>['abelpz', 'eliaspinero']</text:p>
          </table:table-cell>
          <table:table-cell office:value-type="string" office:string-value="1">
            <text:p>1</text:p>
          </table:table-cell>
          <table:table-cell office:value-type="string" office:string-value="2">
            <text:p>2</text:p>
          </table:table-cell>
          <table:table-cell office:value-type="string" office:string-value="https://github.com/unfoldingWord/obs-app">
            <text:p>https://github.com/unfoldingWord/obs-app</text:p>
          </table:table-cell>
          <table:table-cell office:value-type="string" office:string-value="2026-05-05T15:16:31Z">
            <text:p>2026-05-05T15:16:31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obs-door43">
            <text:p>obs-door43</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9-16T00:02:35Z">
            <text:p>2016-09-16T00:02:35Z</text:p>
          </table:table-cell>
          <table:table-cell office:value-type="string" office:string-value="2016-09-14T12:07:32Z">
            <text:p>2016-09-14T12:0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door43">
            <text:p>https://github.com/unfoldingWord-dev/obs-door43</text:p>
          </table:table-cell>
          <table:table-cell office:value-type="string" office:string-value="2023-01-28T16:19:08Z">
            <text:p>2023-01-28T16:19:0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rg-language-resource-hook">
            <text:p>org-language-resource-hook</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6-14T06:26:31Z">
            <text:p>2022-06-14T06:26:31Z</text:p>
          </table:table-cell>
          <table:table-cell office:value-type="string" office:string-value="2022-06-14T06:26:31Z">
            <text:p>2022-06-14T06:26:3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incypjose">
            <text:p>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org-language-resource-hook">
            <text:p>https://github.com/unfoldingWord-box3/org-language-resource-hook</text:p>
          </table:table-cell>
          <table:table-cell office:value-type="string" office:string-value="2022-06-14T06:26:30Z">
            <text:p>2022-06-14T06:26:3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proskomma-scripture-resources-rcl">
            <text:p>proskomma-scripture-resources-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29T14:02:08Z">
            <text:p>2021-04-29T14:02:08Z</text:p>
          </table:table-cell>
          <table:table-cell office:value-type="string" office:string-value="2021-02-05T16:34:09Z">
            <text:p>2021-02-05T16:34: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roskomma-scripture-resources-rcl">
            <text:p>proskomma-scripture-resources-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roskomma">
            <text:p>uw-proskomma</text:p>
          </table:table-cell>
          <table:table-cell office:value-type="string" office:string-value="">
            <text:p/>
          </table:table-cell>
          <table:table-cell office:value-type="string" office:string-value="['mvahowe', 'mannycolon']">
            <text:p>['mvahowe', 'mannycolon']</text:p>
          </table:table-cell>
          <table:table-cell office:value-type="string" office:string-value="0">
            <text:p>0</text:p>
          </table:table-cell>
          <table:table-cell office:value-type="string" office:string-value="0">
            <text:p>0</text:p>
          </table:table-cell>
          <table:table-cell office:value-type="string" office:string-value="https://github.com/unfoldingWord-box3/proskomma-scripture-resources-rcl">
            <text:p>https://github.com/unfoldingWord-box3/proskomma-scripture-resources-rcl</text:p>
          </table:table-cell>
          <table:table-cell office:value-type="string" office:string-value="2022-06-14T15:15:43Z">
            <text:p>2022-06-14T15:15:4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python-resource-container">
            <text:p>python-resource-contain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2-05T23:06:00Z">
            <text:p>2018-02-05T23:06:00Z</text:p>
          </table:table-cell>
          <table:table-cell office:value-type="string" office:string-value="2018-02-05T23:05:15Z">
            <text:p>2018-02-05T23:05: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eremymlane']">
            <text:p>['da1nerd', 'jeremymlane']</text:p>
          </table:table-cell>
          <table:table-cell office:value-type="string" office:string-value="0">
            <text:p>0</text:p>
          </table:table-cell>
          <table:table-cell office:value-type="string" office:string-value="0">
            <text:p>0</text:p>
          </table:table-cell>
          <table:table-cell office:value-type="string" office:string-value="https://github.com/unfoldingWord-dev/python-resource-container">
            <text:p>https://github.com/unfoldingWord-dev/python-resource-container</text:p>
          </table:table-cell>
          <table:table-cell office:value-type="string" office:string-value="2017-05-04T19:55:10Z">
            <text:p>2017-05-04T19:55:1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Resource-Container">
            <text:p>Resource-Container</text:p>
          </table:table-cell>
          <table:table-cell office:value-type="string" office:string-value="unfoldingWord-dev">
            <text:p>unfoldingWord-dev</text:p>
          </table:table-cell>
          <table:table-cell office:value-type="string" office:string-value="Makefile">
            <text:p>Makefile</text:p>
          </table:table-cell>
          <table:table-cell office:value-type="string" office:string-value="False">
            <text:p>False</text:p>
          </table:table-cell>
          <table:table-cell office:value-type="string" office:string-value="False">
            <text:p>False</text:p>
          </table:table-cell>
          <table:table-cell office:value-type="string" office:string-value="2025-10-09T10:27:34Z">
            <text:p>2025-10-09T10:27:34Z</text:p>
          </table:table-cell>
          <table:table-cell office:value-type="string" office:string-value="2025-10-09T10:27:33Z">
            <text:p>2025-10-09T10:27:33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ag3773', 'yakob-aleksandrovich', 'PhotoNomad0', 'RobH123', 'timjore']">
            <text:p>['da1nerd', 'jag3773', 'yakob-aleksandrovich', 'PhotoNomad0', 'RobH123', 'timjore']</text:p>
          </table:table-cell>
          <table:table-cell office:value-type="string" office:string-value="2">
            <text:p>2</text:p>
          </table:table-cell>
          <table:table-cell office:value-type="string" office:string-value="0">
            <text:p>0</text:p>
          </table:table-cell>
          <table:table-cell office:value-type="string" office:string-value="https://github.com/unfoldingWord-dev/Resource-Container">
            <text:p>https://github.com/unfoldingWord-dev/Resource-Container</text:p>
          </table:table-cell>
          <table:table-cell office:value-type="string" office:string-value="2025-10-09T10:27:37Z">
            <text:p>2025-10-09T10:27:37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resource-container-rcl">
            <text:p>resource-container-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06:31:27Z">
            <text:p>2023-01-06T06:31:27Z</text:p>
          </table:table-cell>
          <table:table-cell office:value-type="string" office:string-value="2021-03-10T16:03:18Z">
            <text:p>2021-03-10T16:03:18Z</text:p>
          </table:table-cell>
          <table:table-cell office:value-type="string" office:string-value="">
            <text:p/>
          </table:table-cell>
          <table:table-cell office:value-type="string" office:string-value="23">
            <text:p>23</text:p>
          </table:table-cell>
          <table:table-cell office:value-type="string" office:string-value="23">
            <text:p>23</text:p>
          </table:table-cell>
          <table:table-cell office:value-type="string" office:string-value="resource-container-rcl">
            <text:p>resource-containe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resource-container-rcl">
            <text:p>https://github.com/unfoldingWord-box3/resource-container-rcl</text:p>
          </table:table-cell>
          <table:table-cell office:value-type="string" office:string-value="2022-06-14T15:16:49Z">
            <text:p>2022-06-14T15:16:49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scripture-as-graph">
            <text:p>scripture-as-graph</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30T20:47:55Z">
            <text:p>2022-12-30T20:47:55Z</text:p>
          </table:table-cell>
          <table:table-cell office:value-type="string" office:string-value="2020-07-22T12:31:01Z">
            <text:p>2020-07-22T12:31:01Z</text:p>
          </table:table-cell>
          <table:table-cell office:value-type="string" office:string-value="">
            <text:p/>
          </table:table-cell>
          <table:table-cell office:value-type="string" office:string-value="10">
            <text:p>10</text:p>
          </table:table-cell>
          <table:table-cell office:value-type="string" office:string-value="10">
            <text:p>10</text:p>
          </table:table-cell>
          <table:table-cell office:value-type="string" office:string-value="scripture-as-graph">
            <text:p>scripture-as-grap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mvahowe', 'jag3773']">
            <text:p>['mvahowe',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scripture-as-graph">
            <text:p>https://github.com/unfoldingWord-box3/scripture-as-graph</text:p>
          </table:table-cell>
          <table:table-cell office:value-type="string" office:string-value="2020-07-22T12:31:12Z">
            <text:p>2020-07-22T12:31:12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ScripturePane">
            <text:p>ScripturePan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17T19:59:54Z">
            <text:p>2018-05-17T19:59:54Z</text:p>
          </table:table-cell>
          <table:table-cell office:value-type="string" office:string-value="2018-05-17T19:59:53Z">
            <text:p>2018-05-17T19:59: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cripturePane">
            <text:p>Scripture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ring-punctuation-tokenizer', 'tc-tool', 'usfm-js']">
            <text:p>['string-punctuation-tokenizer', 'tc-tool', 'usfm-js']</text:p>
          </table:table-cell>
          <table:table-cell office:value-type="string" office:string-value="">
            <text:p/>
          </table:table-cell>
          <table:table-cell office:value-type="string" office:string-value="['mannycolon', 'PhotoNomad0', 'da1nerd', 'klappy', 'RoyalSix', 'EllDoubleYew', 'cdwhitfield73', 'Sterling (Jay) Scott', 'ihoegen', 'richmahn', 'bspidel', 'Richard Mahn']">
            <text:p>['mannycolon', 'PhotoNomad0', 'da1nerd', 'klappy', 'RoyalSix', 'EllDoubleYew', 'cdwhitfield73', 'Sterling (Jay) Scott', 'ihoegen', 'richmahn', 'bspidel',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ScripturePane">
            <text:p>https://github.com/unfoldingWord-dev/ScripturePane</text:p>
          </table:table-cell>
          <table:table-cell office:value-type="string" office:string-value="2019-10-22T19:35:10Z">
            <text:p>2019-10-22T19:35:1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create-app">
            <text:p>tc-create-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3T18:47:10Z">
            <text:p>2026-05-13T18:47:10Z</text:p>
          </table:table-cell>
          <table:table-cell office:value-type="string" office:string-value="2026-05-13T18:47:10Z">
            <text:p>2026-05-13T18:47:10Z</text:p>
          </table:table-cell>
          <table:table-cell office:value-type="string" office:string-value="2025-07-29T17:16:53Z">
            <text:p>2025-07-29T17:16:53Z</text:p>
          </table:table-cell>
          <table:table-cell office:value-type="string" office:string-value="292">
            <text:p>292</text:p>
          </table:table-cell>
          <table:table-cell office:value-type="string" office:string-value="19">
            <text:p>19</text:p>
          </table:table-cell>
          <table:table-cell office:value-type="string" office:string-value="tc-create-app">
            <text:p>tc-create-app</text:p>
          </table:table-cell>
          <table:table-cell office:value-type="string" office:string-value="False">
            <text:p>False</text:p>
          </table:table-cell>
          <table:table-cell office:value-type="string" office:string-value="48">
            <text:p>48</text:p>
          </table:table-cell>
          <table:table-cell office:value-type="string" office:string-value="2022-02-22T21:12:10.659Z">
            <text:p>2022-02-22T21:12:10.659Z</text:p>
          </table:table-cell>
          <table:table-cell office:value-type="string" office:string-value="">
            <text:p/>
          </table:table-cell>
          <table:table-cell office:value-type="string" office:string-value="['bible-reference-range', 'datatable-translatable', 'dcs-branch-merger', 'gitea-react-toolkit', 'markdown-translatable', 'scripture-resources-rcl', 'tc-ui-toolkit', 'usfm-js', 'uw-content-validation', 'uw-languages-rcl', 'uw-tsv-parser', 'word-aligner', '@unfoldingword/eslint-confi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office:string-value="">
            <text:p/>
          </table:table-cell>
          <table:table-cell office:value-type="string" office:string-value="['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office:string-value="35">
            <text:p>35</text:p>
          </table:table-cell>
          <table:table-cell office:value-type="string" office:string-value="0">
            <text:p>0</text:p>
          </table:table-cell>
          <table:table-cell office:value-type="string" office:string-value="https://github.com/unfoldingWord/tc-create-app">
            <text:p>https://github.com/unfoldingWord/tc-create-app</text:p>
          </table:table-cell>
          <table:table-cell office:value-type="string" office:string-value="2026-05-13T18:47:17Z">
            <text:p>2026-05-13T18:47:17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48 downloads in the last year) and no detected local consumers.">
            <text:p>Package has low but nonzero npm usage (48 downloads in the last year) and no detected local consumers.</text:p>
          </table:table-cell>
        </table:table-row>
        <table:table-row>
          <table:table-cell office:value-type="string" office:string-value="tc-study/@bt-synergy/catalog-adapter-indexeddb">
            <text:p>tc-study/@bt-synergy/catalog-adapter-indexedd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talog-adapter-indexeddb">
            <text:p>@bt-synergy/catalog-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catalog-adapter-memory">
            <text:p>tc-study/@bt-synergy/catalog-adapter-memo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talog-adapter-memory">
            <text:p>@bt-synergy/catalog-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catalog-adapter-sqlite">
            <text:p>tc-study/@bt-synergy/catalog-adapter-sql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talog-adapter-sqlite">
            <text:p>@bt-synergy/catalog-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catalog-cli">
            <text:p>tc-study/@bt-synergy/catalog-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talog-cli">
            <text:p>@bt-synergy/catalog-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tc-study/@bt-synergy/catalog-manager">
            <text:p>tc-study/@bt-synergy/catalog-manag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talog-manager">
            <text:p>@bt-synergy/catalog-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door43-api">
            <text:p>tc-study/@bt-synergy/door43-ap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door43-api">
            <text:p>@bt-synergy/door43-ap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actions">
            <text:p>tc-study/@bt-synergy/resource-action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actions">
            <text:p>@bt-synergy/resource-action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adapters">
            <text:p>tc-study/@bt-synergy/resource-adapter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adapters">
            <text:p>@bt-synergy/resource-adapt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bundler">
            <text:p>tc-study/@bt-synergy/resource-bundl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bundler">
            <text:p>@bt-synergy/resource-bundl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cache">
            <text:p>tc-study/@bt-synergy/resource-cach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cache">
            <text:p>@bt-synergy/resource-cach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catalog">
            <text:p>tc-study/@bt-synergy/resource-catalog</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catalog">
            <text:p>@bt-synergy/resource-catalo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cli">
            <text:p>tc-study/@bt-synergy/resource-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cli">
            <text:p>@bt-synergy/resource-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tc-study/@bt-synergy/resource-package-builder">
            <text:p>tc-study/@bt-synergy/resource-package-buil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package-builder">
            <text:p>@bt-synergy/resource-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tc-study/@bt-synergy/resource-panels">
            <text:p>tc-study/@bt-synergy/resource-pane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panels">
            <text:p>@bt-synergy/resource-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parsers">
            <text:p>tc-study/@bt-synergy/resource-parser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parsers">
            <text:p>@bt-synergy/resource-pars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selection">
            <text:p>tc-study/@bt-synergy/resource-selection</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selection">
            <text:p>@bt-synergy/resource-sele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signals">
            <text:p>tc-study/@bt-synergy/resource-signa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signals">
            <text:p>@bt-synergy/resource-signa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types">
            <text:p>tc-study/@bt-synergy/resource-typ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types">
            <text:p>@bt-synergy/resource-typ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scripture-loader">
            <text:p>tc-study/@bt-synergy/scripture-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scripture-loader">
            <text:p>@bt-synergy/scripture-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scripture-resource">
            <text:p>tc-study/@bt-synergy/scripture-resourc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scripture-resource">
            <text:p>tc-study/@bt-synergy/scripture-resourc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unified-catalog-store">
            <text:p>tc-study/@bt-synergy/unified-catalog-st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unified-catalog-store">
            <text:p>@bt-synergy/unified-catalog-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toolkit/resource-downloader">
            <text:p>tc-study/@bt-toolkit/resource-down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toolkit/resource-downloader">
            <text:p>@bt-toolkit/resource-down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resource-panels-spike">
            <text:p>tc-study/resource-panels-spik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resource-panels-spike">
            <text:p>resource-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_Resources">
            <text:p>tC_Resources</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9-09T10:57:36Z">
            <text:p>2018-09-09T10:57:36Z</text:p>
          </table:table-cell>
          <table:table-cell office:value-type="string" office:string-value="2018-08-06T15:39:55Z">
            <text:p>2018-08-06T15:39: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_resources">
            <text:p>tc_resourc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PhotoNomad0', 'richmahn', 'mannycolon', 'Richard Mahn', 'klappy', 'RoyalSix', 'da1nerd', 'Sterling (Jay) Scott']">
            <text:p>['PhotoNomad0', 'richmahn', 'mannycolon', 'Richard Mahn', 'klappy', 'RoyalSix', 'da1nerd',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tC_Resources">
            <text:p>https://github.com/unfoldingWord-dev/tC_Resources</text:p>
          </table:table-cell>
          <table:table-cell office:value-type="string" office:string-value="2023-01-28T16:35:42Z">
            <text:p>2023-01-28T16:35:42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tn_add_scripture_links">
            <text:p>tn_add_scripture_link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7-29T19:11:11Z">
            <text:p>2025-07-29T19:11:11Z</text:p>
          </table:table-cell>
          <table:table-cell office:value-type="string" office:string-value="2025-07-29T19:11:09Z">
            <text:p>2025-07-29T19:11: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n_add_scripture_links">
            <text:p>https://github.com/unfoldingWord-dev/tn_add_scripture_links</text:p>
          </table:table-cell>
          <table:table-cell office:value-type="string" office:string-value="2025-07-29T19:12:09Z">
            <text:p>2025-07-29T19:12:09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ranslationCore">
            <text:p>translation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31T11:31:00Z">
            <text:p>2026-01-31T11:31:00Z</text:p>
          </table:table-cell>
          <table:table-cell office:value-type="string" office:string-value="2026-01-06T21:26:21Z">
            <text:p>2026-01-06T21:26:21Z</text:p>
          </table:table-cell>
          <table:table-cell office:value-type="string" office:string-value="2026-01-12T14:46:30Z">
            <text:p>2026-01-12T14:46:30Z</text:p>
          </table:table-cell>
          <table:table-cell office:value-type="string" office:string-value="640">
            <text:p>640</text:p>
          </table:table-cell>
          <table:table-cell office:value-type="string" office:string-value="13">
            <text:p>13</text:p>
          </table:table-cell>
          <table:table-cell office:value-type="string" office:string-value="translationCore">
            <text:p>translation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checking-tool-wrapper', 'gogs-client', 'selections', 'string-punctuation-tokenizer', 'tc-source-content-updater', 'tc-strings', 'tc-tool', 'tc-ui-toolkit', 'tsv-groupdata-parser', 'usfm-js', 'word-aligner', 'wordmap', 'wordmap-lexer', 'electronite']">
            <text:p>['bible-reference-range', 'checking-tool-wrapper', 'gogs-client', 'selections', 'string-punctuation-tokenizer', 'tc-source-content-updater', 'tc-strings', 'tc-tool', 'tc-ui-toolkit', 'tsv-groupdata-parser', 'usfm-js', 'word-aligner', 'wordmap', 'wordmap-lexer', 'electronite']</text:p>
          </table:table-cell>
          <table:table-cell office:value-type="string" office:string-value="">
            <text:p/>
          </table:table-cell>
          <table:table-cell office:value-type="string" office:string-value="['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office:string-value="89">
            <text:p>89</text:p>
          </table:table-cell>
          <table:table-cell office:value-type="string" office:string-value="13531">
            <text:p>13531</text:p>
          </table:table-cell>
          <table:table-cell office:value-type="string" office:string-value="https://github.com/unfoldingWord/translationCore">
            <text:p>https://github.com/unfoldingWord/translationCore</text:p>
          </table:table-cell>
          <table:table-cell office:value-type="string" office:string-value="2026-01-06T21:26:25Z">
            <text:p>2026-01-06T21:26:25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ranslationCore-PoC">
            <text:p>translationCore-PoC</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7-06T20:17:32Z">
            <text:p>2018-07-06T20:17:32Z</text:p>
          </table:table-cell>
          <table:table-cell office:value-type="string" office:string-value="2018-07-06T20:17:31Z">
            <text:p>2018-07-06T20:17:31Z</text:p>
          </table:table-cell>
          <table:table-cell office:value-type="string" office:string-value="">
            <text:p/>
          </table:table-cell>
          <table:table-cell office:value-type="string" office:string-value="40">
            <text:p>4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Core-PoC">
            <text:p>https://github.com/unfoldingWord-dev/translationCore-PoC</text:p>
          </table:table-cell>
          <table:table-cell office:value-type="string" office:string-value="2023-01-28T16:19:08Z">
            <text:p>2023-01-28T16:19:0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s-android">
            <text:p>ts-androi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7-26T16:17:42Z">
            <text:p>2019-07-26T16:17:42Z</text:p>
          </table:table-cell>
          <table:table-cell office:value-type="string" office:string-value="2019-07-26T16:15:31Z">
            <text:p>2019-07-26T16:15:31Z</text:p>
          </table:table-cell>
          <table:table-cell office:value-type="string" office:string-value="2019-07-29T13:45:34Z">
            <text:p>2019-07-29T13:45:34Z</text:p>
          </table:table-cell>
          <table:table-cell office:value-type="string" office:string-value="651">
            <text:p>65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PhotoNomad0', 'jshuma', 'andreradroid', 'jag3773', 'HannaJaicks', 'benjore', 'mondele', 'sea-liesch']">
            <text:p>['da1nerd', 'PhotoNomad0', 'jshuma', 'andreradroid', 'jag3773', 'HannaJaicks', 'benjore', 'mondele', 'sea-liesch']</text:p>
          </table:table-cell>
          <table:table-cell office:value-type="string" office:string-value="61">
            <text:p>61</text:p>
          </table:table-cell>
          <table:table-cell office:value-type="string" office:string-value="2302">
            <text:p>2302</text:p>
          </table:table-cell>
          <table:table-cell office:value-type="string" office:string-value="https://github.com/unfoldingWord-dev/ts-android">
            <text:p>https://github.com/unfoldingWord-dev/ts-android</text:p>
          </table:table-cell>
          <table:table-cell office:value-type="string" office:string-value="2026-04-22T14:45:07Z">
            <text:p>2026-04-22T14:45:07Z</text:p>
          </table:table-cell>
          <table:table-cell office:value-type="string" office:string-value="Manual review">
            <text:p>Manual review</text:p>
          </table:table-cell>
          <table:table-cell office:value-type="string" office:string-value="Repository has at least 50 open issues (651 open issues).">
            <text:p>Repository has at least 50 open issues (651 open issue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s-desktop">
            <text:p>ts-desktop</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6-17T00:09:31Z">
            <text:p>2022-06-17T00:09:31Z</text:p>
          </table:table-cell>
          <table:table-cell office:value-type="string" office:string-value="2019-11-11T14:08:52Z">
            <text:p>2019-11-11T14:08:52Z</text:p>
          </table:table-cell>
          <table:table-cell office:value-type="string" office:string-value="2019-11-11T14:16:17Z">
            <text:p>2019-11-11T14:16:17Z</text:p>
          </table:table-cell>
          <table:table-cell office:value-type="string" office:string-value="182">
            <text:p>182</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dwhitfield73', 'da1nerd', 'Thomas Klemz', 'vleong2332', 'Travis CI', 'kbuildsyourdotcom', 'EmmittJ', 'Delmar Hager', 'jag3773', 'a-gundy', 'jeremymlane', 'dhager7', 'soccerhand', 'Travis-CI']">
            <text:p>['cdwhitfield73', 'da1nerd', 'Thomas Klemz', 'vleong2332', 'Travis CI', 'kbuildsyourdotcom', 'EmmittJ', 'Delmar Hager', 'jag3773', 'a-gundy', 'jeremymlane', 'dhager7', 'soccerhand', 'Travis-CI']</text:p>
          </table:table-cell>
          <table:table-cell office:value-type="string" office:string-value="29">
            <text:p>29</text:p>
          </table:table-cell>
          <table:table-cell office:value-type="string" office:string-value="14384">
            <text:p>14384</text:p>
          </table:table-cell>
          <table:table-cell office:value-type="string" office:string-value="https://github.com/unfoldingWord-dev/ts-desktop">
            <text:p>https://github.com/unfoldingWord-dev/ts-desktop</text:p>
          </table:table-cell>
          <table:table-cell office:value-type="string" office:string-value="2026-04-22T14:46:49Z">
            <text:p>2026-04-22T14:46:49Z</text:p>
          </table:table-cell>
          <table:table-cell office:value-type="string" office:string-value="Manual review">
            <text:p>Manual review</text:p>
          </table:table-cell>
          <table:table-cell office:value-type="string" office:string-value="Repository has at least 50 open issues (182 open issues).">
            <text:p>Repository has at least 50 open issues (182 open issue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s-requirements">
            <text:p>ts-requirements</text:p>
          </table:table-cell>
          <table:table-cell office:value-type="string" office:string-value="unfoldingWord-dev">
            <text:p>unfoldingWord-dev</text:p>
          </table:table-cell>
          <table:table-cell office:value-type="string" office:string-value="Cucumber">
            <text:p>Cucumber</text:p>
          </table:table-cell>
          <table:table-cell office:value-type="string" office:string-value="False">
            <text:p>False</text:p>
          </table:table-cell>
          <table:table-cell office:value-type="string" office:string-value="False">
            <text:p>False</text:p>
          </table:table-cell>
          <table:table-cell office:value-type="string" office:string-value="2016-03-25T20:23:25Z">
            <text:p>2016-03-25T20:23:25Z</text:p>
          </table:table-cell>
          <table:table-cell office:value-type="string" office:string-value="2016-03-25T20:23:25Z">
            <text:p>2016-03-25T20:23:25Z</text:p>
          </table:table-cell>
          <table:table-cell office:value-type="string" office:string-value="">
            <text:p/>
          </table:table-cell>
          <table:table-cell office:value-type="string" office:string-value="131">
            <text:p>13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RRohrssen']">
            <text:p>['da1nerd', 'RRohrssen']</text:p>
          </table:table-cell>
          <table:table-cell office:value-type="string" office:string-value="0">
            <text:p>0</text:p>
          </table:table-cell>
          <table:table-cell office:value-type="string" office:string-value="0">
            <text:p>0</text:p>
          </table:table-cell>
          <table:table-cell office:value-type="string" office:string-value="https://github.com/unfoldingWord-dev/ts-requirements">
            <text:p>https://github.com/unfoldingWord-dev/ts-requirements</text:p>
          </table:table-cell>
          <table:table-cell office:value-type="string" office:string-value="2016-12-07T22:47:45Z">
            <text:p>2016-12-07T22:47:45Z</text:p>
          </table:table-cell>
          <table:table-cell office:value-type="string" office:string-value="Manual review">
            <text:p>Manual review</text:p>
          </table:table-cell>
          <table:table-cell office:value-type="string" office:string-value="Repository has at least 50 open issues (131 open issues).">
            <text:p>Repository has at least 50 open issues (131 open issue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s-v2-catalog-backport">
            <text:p>ts-v2-catalog-backport</text:p>
          </table:table-cell>
          <table:table-cell office:value-type="string" office:string-value="unfoldingWord">
            <text:p>unfoldingWord</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2-12-31T07:59:27Z">
            <text:p>2022-12-31T07:59:27Z</text:p>
          </table:table-cell>
          <table:table-cell office:value-type="string" office:string-value="2022-06-02T18:06:07Z">
            <text:p>2022-06-02T18:06:07Z</text:p>
          </table:table-cell>
          <table:table-cell office:value-type="string" office:string-value="2022-06-01T22:42:37Z">
            <text:p>2022-06-01T22:42:37Z</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2">
            <text:p>2</text:p>
          </table:table-cell>
          <table:table-cell office:value-type="string" office:string-value="0">
            <text:p>0</text:p>
          </table:table-cell>
          <table:table-cell office:value-type="string" office:string-value="https://github.com/unfoldingWord/ts-v2-catalog-backport">
            <text:p>https://github.com/unfoldingWord/ts-v2-catalog-backport</text:p>
          </table:table-cell>
          <table:table-cell office:value-type="string" office:string-value="2025-09-09T08:54:13Z">
            <text:p>2025-09-09T08:54:1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x-dev-dcs">
            <text:p>tx-dev-dcs</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09T21:13:08Z">
            <text:p>2022-02-09T21:13:08Z</text:p>
          </table:table-cell>
          <table:table-cell office:value-type="string" office:string-value="2021-08-25T20:47:08Z">
            <text:p>2021-08-25T20:47: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x-dev-dcs">
            <text:p>https://github.com/unfoldingWord/tx-dev-dcs</text:p>
          </table:table-cell>
          <table:table-cell office:value-type="string" office:string-value="2022-10-05T18:56:57Z">
            <text:p>2022-10-05T18:56:57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x-dev-door43">
            <text:p>tx-dev-door43</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12T22:01:02Z">
            <text:p>2021-07-12T22:01:02Z</text:p>
          </table:table-cell>
          <table:table-cell office:value-type="string" office:string-value="2021-07-12T21:58:40Z">
            <text:p>2021-07-12T21:58: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dev-door43">
            <text:p>https://github.com/unfoldingWord-dev/tx-dev-door43</text:p>
          </table:table-cell>
          <table:table-cell office:value-type="string" office:string-value="2021-07-12T21:58:43Z">
            <text:p>2021-07-12T21:58:4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x-door43">
            <text:p>tx-door43</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6T12:06:34Z">
            <text:p>2017-02-06T12:06:34Z</text:p>
          </table:table-cell>
          <table:table-cell office:value-type="string" office:string-value="2016-12-20T05:51:28Z">
            <text:p>2016-12-20T05:51: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Gogs']">
            <text:p>['Richard Mahn', 'richmahn', 'Gogs']</text:p>
          </table:table-cell>
          <table:table-cell office:value-type="string" office:string-value="0">
            <text:p>0</text:p>
          </table:table-cell>
          <table:table-cell office:value-type="string" office:string-value="0">
            <text:p>0</text:p>
          </table:table-cell>
          <table:table-cell office:value-type="string" office:string-value="https://github.com/unfoldingWord-dev/tx-door43">
            <text:p>https://github.com/unfoldingWord-dev/tx-door43</text:p>
          </table:table-cell>
          <table:table-cell office:value-type="string" office:string-value="2026-03-15T03:15:10Z">
            <text:p>2026-03-15T03:15:1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x-enqueue-job">
            <text:p>tx-enqueue-jo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7T01:28:53Z">
            <text:p>2024-04-17T01:28:53Z</text:p>
          </table:table-cell>
          <table:table-cell office:value-type="string" office:string-value="2024-01-25T16:47:13Z">
            <text:p>2024-01-25T16:47:13Z</text:p>
          </table:table-cell>
          <table:table-cell office:value-type="string" office:string-value="2024-01-25T16:51:03Z">
            <text:p>2024-01-25T16:51:03Z</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jag3773', 'yakob-aleksandrovich']">
            <text:p>['RobH123', 'richmahn', 'jag3773', 'yakob-aleksandrovich']</text:p>
          </table:table-cell>
          <table:table-cell office:value-type="string" office:string-value="20">
            <text:p>20</text:p>
          </table:table-cell>
          <table:table-cell office:value-type="string" office:string-value="0">
            <text:p>0</text:p>
          </table:table-cell>
          <table:table-cell office:value-type="string" office:string-value="https://github.com/unfoldingWord/tx-enqueue-job">
            <text:p>https://github.com/unfoldingWord/tx-enqueue-job</text:p>
          </table:table-cell>
          <table:table-cell office:value-type="string" office:string-value="2024-02-06T15:23:21Z">
            <text:p>2024-02-06T15:23:21Z</text:p>
          </table:table-cell>
          <table:table-cell office:value-type="string" office:string-value="Manual review">
            <text:p>Manual review</text:p>
          </table:table-cell>
          <table:table-cell office:value-type="string" office:string-value="Repository has significant release history or GitHub downloads (20 releases, 0 downloads).">
            <text:p>Repository has significant release history or GitHub downloads (20 releases, 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x-job-handler">
            <text:p>tx-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6-21T20:22:59Z">
            <text:p>2024-06-21T20:22:59Z</text:p>
          </table:table-cell>
          <table:table-cell office:value-type="string" office:string-value="2024-06-21T20:22:59Z">
            <text:p>2024-06-21T20:22:59Z</text:p>
          </table:table-cell>
          <table:table-cell office:value-type="string" office:string-value="2024-01-23T20:41:06Z">
            <text:p>2024-01-23T20:41:06Z</text:p>
          </table:table-cell>
          <table:table-cell office:value-type="string" office:string-value="4">
            <text:p>4</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dependabot[bot]', 'jag3773']">
            <text:p>['RobH123', 'richmahn', 'dependabot[bot]', 'jag3773']</text:p>
          </table:table-cell>
          <table:table-cell office:value-type="string" office:string-value="40">
            <text:p>40</text:p>
          </table:table-cell>
          <table:table-cell office:value-type="string" office:string-value="0">
            <text:p>0</text:p>
          </table:table-cell>
          <table:table-cell office:value-type="string" office:string-value="https://github.com/unfoldingWord/tx-job-handler">
            <text:p>https://github.com/unfoldingWord/tx-job-handler</text:p>
          </table:table-cell>
          <table:table-cell office:value-type="string" office:string-value="2024-06-21T20:23:02Z">
            <text:p>2024-06-21T20:23:02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uw-android">
            <text:p>uw-androi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8-06-08T15:14:35Z">
            <text:p>2018-06-08T15:14:35Z</text:p>
          </table:table-cell>
          <table:table-cell office:value-type="string" office:string-value="2018-06-08T15:12:32Z">
            <text:p>2018-06-08T15:12:32Z</text:p>
          </table:table-cell>
          <table:table-cell office:value-type="string" office:string-value="2018-06-08T15:14:36Z">
            <text:p>2018-06-08T15:14:36Z</text:p>
          </table:table-cell>
          <table:table-cell office:value-type="string" office:string-value="18">
            <text:p>18</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text:p>['GottaGetSwifty', 'bknatterud', 'jag3773']</text:p>
          </table:table-cell>
          <table:table-cell office:value-type="string" office:string-value="44">
            <text:p>44</text:p>
          </table:table-cell>
          <table:table-cell office:value-type="string" office:string-value="2300">
            <text:p>2300</text:p>
          </table:table-cell>
          <table:table-cell office:value-type="string" office:string-value="https://github.com/unfoldingWord-dev/uw-android">
            <text:p>https://github.com/unfoldingWord-dev/uw-android</text:p>
          </table:table-cell>
          <table:table-cell office:value-type="string" office:string-value="2025-10-02T14:11:55Z">
            <text:p>2025-10-02T14:11:55Z</text:p>
          </table:table-cell>
          <table:table-cell office:value-type="string" office:string-value="Manual review">
            <text:p>Manual review</text:p>
          </table:table-cell>
          <table:table-cell office:value-type="string" office:string-value="Repository has significant release history or GitHub downloads (44 releases, 2300 downloads).">
            <text:p>Repository has significant release history or GitHub downloads (44 releases, 2300 downloads).</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uw-website-resource-version-updater">
            <text:p>uw-website-resource-version-updater</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4T22:06:05Z">
            <text:p>2025-06-04T22:06:05Z</text:p>
          </table:table-cell>
          <table:table-cell office:value-type="string" office:string-value="2025-06-04T22:06:02Z">
            <text:p>2025-06-04T22:0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uw-website-resource-version-updater">
            <text:p>https://github.com/unfoldingWord/uw-website-resource-version-updater</text:p>
          </table:table-cell>
          <table:table-cell office:value-type="string" office:string-value="2025-06-04T22:06:08Z">
            <text:p>2025-06-04T22:06:0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github">
            <text:p>.github</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9-27T02:01:37Z">
            <text:p>2023-09-27T02:01:37Z</text:p>
          </table:table-cell>
          <table:table-cell office:value-type="string" office:string-value="2023-09-27T02:01:37Z">
            <text:p>2023-09-27T02:01: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amp', 'elsylambert']">
            <text:p>['birchamp', 'elsylambert']</text:p>
          </table:table-cell>
          <table:table-cell office:value-type="string" office:string-value="0">
            <text:p>0</text:p>
          </table:table-cell>
          <table:table-cell office:value-type="string" office:string-value="0">
            <text:p>0</text:p>
          </table:table-cell>
          <table:table-cell office:value-type="string" office:string-value="https://github.com/unfoldingWord/.github">
            <text:p>https://github.com/unfoldingWord/.github</text:p>
          </table:table-cell>
          <table:table-cell office:value-type="string" office:string-value="2023-06-23T17:54:35Z">
            <text:p>2023-06-23T17:54:35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android-event-buffer">
            <text:p>android-event-buff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07T23:36:28Z">
            <text:p>2017-02-07T23:36:28Z</text:p>
          </table:table-cell>
          <table:table-cell office:value-type="string" office:string-value="2017-02-07T23:35:53Z">
            <text:p>2017-02-07T23:35: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event-buffer">
            <text:p>https://github.com/unfoldingWord-dev/android-event-buffer</text:p>
          </table:table-cell>
          <table:table-cell office:value-type="string" office:string-value="2017-01-05T01:22:50Z">
            <text:p>2017-01-05T01:22:50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android-foreground">
            <text:p>android-foregroun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23T18:30:54Z">
            <text:p>2017-02-23T18:30:54Z</text:p>
          </table:table-cell>
          <table:table-cell office:value-type="string" office:string-value="2017-02-23T18:30:46Z">
            <text:p>2017-02-23T18:30: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foreground">
            <text:p>https://github.com/unfoldingWord-dev/android-foreground</text:p>
          </table:table-cell>
          <table:table-cell office:value-type="string" office:string-value="2017-02-10T22:11:12Z">
            <text:p>2017-02-10T22:11:1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android-gogs-client">
            <text:p>android-gogs-client</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30T23:42:39Z">
            <text:p>2019-04-30T23:42:39Z</text:p>
          </table:table-cell>
          <table:table-cell office:value-type="string" office:string-value="2019-04-30T23:42:38Z">
            <text:p>2019-04-30T23:42:38Z</text:p>
          </table:table-cell>
          <table:table-cell office:value-type="string" office:string-value="2016-02-29T21:22:22Z">
            <text:p>2016-02-29T21:22:22Z</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2">
            <text:p>2</text:p>
          </table:table-cell>
          <table:table-cell office:value-type="string" office:string-value="0">
            <text:p>0</text:p>
          </table:table-cell>
          <table:table-cell office:value-type="string" office:string-value="https://github.com/unfoldingWord-dev/android-gogs-client">
            <text:p>https://github.com/unfoldingWord-dev/android-gogs-client</text:p>
          </table:table-cell>
          <table:table-cell office:value-type="string" office:string-value="2024-12-11T07:18:00Z">
            <text:p>2024-12-11T07:18:00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android-http">
            <text:p>android-http</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26T20:08:26Z">
            <text:p>2019-04-26T20:08:26Z</text:p>
          </table:table-cell>
          <table:table-cell office:value-type="string" office:string-value="2019-04-26T20:06:51Z">
            <text:p>2019-04-26T20:06: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http">
            <text:p>https://github.com/unfoldingWord-dev/android-http</text:p>
          </table:table-cell>
          <table:table-cell office:value-type="string" office:string-value="2019-04-26T20:08:03Z">
            <text:p>2019-04-26T20:08:0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android-logger">
            <text:p>android-logg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19T22:57:41Z">
            <text:p>2017-04-19T22:57:41Z</text:p>
          </table:table-cell>
          <table:table-cell office:value-type="string" office:string-value="2017-04-19T22:57:33Z">
            <text:p>2017-04-19T22:57: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sarabia']">
            <text:p>['da1nerd', 'jsarabia']</text:p>
          </table:table-cell>
          <table:table-cell office:value-type="string" office:string-value="0">
            <text:p>0</text:p>
          </table:table-cell>
          <table:table-cell office:value-type="string" office:string-value="0">
            <text:p>0</text:p>
          </table:table-cell>
          <table:table-cell office:value-type="string" office:string-value="https://github.com/unfoldingWord-dev/android-logger">
            <text:p>https://github.com/unfoldingWord-dev/android-logger</text:p>
          </table:table-cell>
          <table:table-cell office:value-type="string" office:string-value="2016-02-27T02:27:42Z">
            <text:p>2016-02-27T02:27:4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android-task-manager">
            <text:p>android-task-manag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3-21T21:14:27Z">
            <text:p>2017-03-21T21:14:27Z</text:p>
          </table:table-cell>
          <table:table-cell office:value-type="string" office:string-value="2017-03-21T21:14:14Z">
            <text:p>2017-03-21T21:14: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task-manager">
            <text:p>https://github.com/unfoldingWord-dev/android-task-manager</text:p>
          </table:table-cell>
          <table:table-cell office:value-type="string" office:string-value="2016-06-15T00:18:45Z">
            <text:p>2016-06-15T00:18:45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api-index">
            <text:p>api-index</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0-06T14:56:54Z">
            <text:p>2023-10-06T14:56:54Z</text:p>
          </table:table-cell>
          <table:table-cell office:value-type="string" office:string-value="2023-10-06T14:56:52Z">
            <text:p>2023-10-06T14:56: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codemis', 'yakob-aleksandrovich', 'da1nerd', 'phillip-hopper', 'RoyalSix']">
            <text:p>['jag3773', 'codemis', 'yakob-aleksandrovich', 'da1nerd', 'phillip-hopper', 'RoyalSix']</text:p>
          </table:table-cell>
          <table:table-cell office:value-type="string" office:string-value="0">
            <text:p>0</text:p>
          </table:table-cell>
          <table:table-cell office:value-type="string" office:string-value="0">
            <text:p>0</text:p>
          </table:table-cell>
          <table:table-cell office:value-type="string" office:string-value="https://github.com/unfoldingWord-dev/api-index">
            <text:p>https://github.com/unfoldingWord-dev/api-index</text:p>
          </table:table-cell>
          <table:table-cell office:value-type="string" office:string-value="2023-10-06T14:53:06Z">
            <text:p>2023-10-06T14:53:0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blank-project-template">
            <text:p>blank-project-templat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8-23T18:30:41Z">
            <text:p>2022-08-23T18:30:41Z</text:p>
          </table:table-cell>
          <table:table-cell office:value-type="string" office:string-value="2021-12-01T16:36:14Z">
            <text:p>2021-12-01T16:36:14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0">
            <text:p>0</text:p>
          </table:table-cell>
          <table:table-cell office:value-type="string" office:string-value="0">
            <text:p>0</text:p>
          </table:table-cell>
          <table:table-cell office:value-type="string" office:string-value="https://github.com/unfoldingWord/blank-project-template">
            <text:p>https://github.com/unfoldingWord/blank-project-template</text:p>
          </table:table-cell>
          <table:table-cell office:value-type="string" office:string-value="2022-08-20T15:23:15Z">
            <text:p>2022-08-20T15:23:15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book-package-app">
            <text:p>book-package-ap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6T02:24:43Z">
            <text:p>2023-01-06T02:24:43Z</text:p>
          </table:table-cell>
          <table:table-cell office:value-type="string" office:string-value="2023-01-02T13:23:19Z">
            <text:p>2023-01-02T13:23:19Z</text:p>
          </table:table-cell>
          <table:table-cell office:value-type="string" office:string-value="2020-03-30T14:42:12Z">
            <text:p>2020-03-30T14:42:12Z</text:p>
          </table:table-cell>
          <table:table-cell office:value-type="string" office:string-value="24">
            <text:p>24</text:p>
          </table:table-cell>
          <table:table-cell office:value-type="string" office:string-value="17">
            <text:p>17</text:p>
          </table:table-cell>
          <table:table-cell office:value-type="string" office:string-value="book-package-app">
            <text:p>book-package-app</text:p>
          </table:table-cell>
          <table:table-cell office:value-type="string" office:string-value="False">
            <text:p>False</text:p>
          </table:table-cell>
          <table:table-cell office:value-type="string" office:string-value="89">
            <text:p>89</text:p>
          </table:table-cell>
          <table:table-cell office:value-type="string" office:string-value="2020-07-15T14:29:05.613Z">
            <text:p>2020-07-15T14:29:05.613Z</text:p>
          </table:table-cell>
          <table:table-cell office:value-type="string" office:string-value="">
            <text:p/>
          </table:table-cell>
          <table:table-cell office:value-type="string" office:string-value="book-package-rcl">
            <text:p>book-package-rcl</text:p>
          </table:table-cell>
          <table:table-cell office:value-type="string" office:string-value="">
            <text:p/>
          </table:table-cell>
          <table:table-cell office:value-type="string" office:string-value="['mandolyte', 'dependabot[bot]', 'jag3773']">
            <text:p>['mandolyte', 'dependabot[bot]', 'jag3773']</text:p>
          </table:table-cell>
          <table:table-cell office:value-type="string" office:string-value="7">
            <text:p>7</text:p>
          </table:table-cell>
          <table:table-cell office:value-type="string" office:string-value="55">
            <text:p>55</text:p>
          </table:table-cell>
          <table:table-cell office:value-type="string" office:string-value="https://github.com/unfoldingWord/book-package-app">
            <text:p>https://github.com/unfoldingWord/book-package-app</text:p>
          </table:table-cell>
          <table:table-cell office:value-type="string" office:string-value="2021-12-17T13:15:30Z">
            <text:p>2021-12-17T13:15:30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89 downloads in the last year) and no detected local consumers.">
            <text:p>Package has low but nonzero npm usage (89 downloads in the last year) and no detected local consumers.</text:p>
          </table:table-cell>
        </table:table-row>
        <table:table-row>
          <table:table-cell office:value-type="string" office:string-value="Brown-Driver-Briggs-Enhanced">
            <text:p>Brown-Driver-Briggs-Enhanced</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5-02T13:05:04Z">
            <text:p>2023-05-02T13:05:04Z</text:p>
          </table:table-cell>
          <table:table-cell office:value-type="string" office:string-value="2023-05-02T13:03:35Z">
            <text:p>2023-05-02T13:03:35Z</text:p>
          </table:table-cell>
          <table:table-cell office:value-type="string" office:string-value="">
            <text:p/>
          </table:table-cell>
          <table:table-cell office:value-type="string" office:string-value="3">
            <text:p>3</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IanLindsley']">
            <text:p>['jdejoo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rown-Driver-Briggs-Enhanced">
            <text:p>https://github.com/unfoldingWord/Brown-Driver-Briggs-Enhanced</text:p>
          </table:table-cell>
          <table:table-cell office:value-type="string" office:string-value="2026-03-10T18:58:39Z">
            <text:p>2026-03-10T18:58:3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chamilo2obsidian">
            <text:p>chamilo2obsidian</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12-13T23:30:29Z">
            <text:p>2022-12-13T23:30:29Z</text:p>
          </table:table-cell>
          <table:table-cell office:value-type="string" office:string-value="2022-12-13T23:30:24Z">
            <text:p>2022-12-13T23:30: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chamilo2obsidian">
            <text:p>https://github.com/unfoldingWord-box3/chamilo2obsidian</text:p>
          </table:table-cell>
          <table:table-cell office:value-type="string" office:string-value="2022-12-12T20:50:51Z">
            <text:p>2022-12-12T20:50:5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checking-app-theia">
            <text:p>checking-app-theia</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claude_security_sentinel">
            <text:p>claude_security_sentinel</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02T19:57:42Z">
            <text:p>2026-03-02T19:57:42Z</text:p>
          </table:table-cell>
          <table:table-cell office:value-type="string" office:string-value="2026-03-02T19:57:32Z">
            <text:p>2026-03-02T19:5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claude_security_sentinel">
            <text:p>https://github.com/unfoldingWord/claude_security_sentinel</text:p>
          </table:table-cell>
          <table:table-cell office:value-type="string" office:string-value="2026-03-02T19:57:47Z">
            <text:p>2026-03-02T19:57:4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cloudfront_logprocessor">
            <text:p>cloudfront_logprocesso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3-31T07:19:49Z">
            <text:p>2023-03-31T07:19:49Z</text:p>
          </table:table-cell>
          <table:table-cell office:value-type="string" office:string-value="2023-03-31T07:19:48Z">
            <text:p>2023-03-31T07:19: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ap-Jan Swijnenburg', 'yakob-aleksandrovich', 'elgohr']">
            <text:p>['Jaap-Jan Swijnenburg', 'yakob-aleksandrovich', 'elgohr']</text:p>
          </table:table-cell>
          <table:table-cell office:value-type="string" office:string-value="0">
            <text:p>0</text:p>
          </table:table-cell>
          <table:table-cell office:value-type="string" office:string-value="0">
            <text:p>0</text:p>
          </table:table-cell>
          <table:table-cell office:value-type="string" office:string-value="https://github.com/unfoldingWord/cloudfront_logprocessor">
            <text:p>https://github.com/unfoldingWord/cloudfront_logprocessor</text:p>
          </table:table-cell>
          <table:table-cell office:value-type="string" office:string-value="2022-10-06T08:25:01Z">
            <text:p>2022-10-06T08:25:0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ata_tracking_import">
            <text:p>data_tracking_impor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03T19:14:01Z">
            <text:p>2026-02-03T19:14:01Z</text:p>
          </table:table-cell>
          <table:table-cell office:value-type="string" office:string-value="2026-02-03T19:13:59Z">
            <text:p>2026-02-03T19:13:59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IanLindsley', 'drcox633']">
            <text:p>['yakob-aleksandrovich', '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data_tracking_import">
            <text:p>https://github.com/unfoldingWord/data_tracking_import</text:p>
          </table:table-cell>
          <table:table-cell office:value-type="string" office:string-value="2026-02-03T19:14:08Z">
            <text:p>2026-02-03T19:14:0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ata_tracking_wrangler">
            <text:p>data_tracking_wrangler</text:p>
          </table:table-cell>
          <table:table-cell office:value-type="string" office:string-value="unfoldingWord">
            <text:p>unfoldingWord</text:p>
          </table:table-cell>
          <table:table-cell office:value-type="string" office:string-value="R">
            <text:p>R</text:p>
          </table:table-cell>
          <table:table-cell office:value-type="string" office:string-value="False">
            <text:p>False</text:p>
          </table:table-cell>
          <table:table-cell office:value-type="string" office:string-value="False">
            <text:p>False</text:p>
          </table:table-cell>
          <table:table-cell office:value-type="string" office:string-value="2025-12-02T16:38:51Z">
            <text:p>2025-12-02T16:38:51Z</text:p>
          </table:table-cell>
          <table:table-cell office:value-type="string" office:string-value="2025-12-02T16:38:41Z">
            <text:p>2025-12-02T16:38: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drcox633', 'Derek Cox']">
            <text:p>['yakob-aleksandrovich', 'drcox633', 'Derek Cox']</text:p>
          </table:table-cell>
          <table:table-cell office:value-type="string" office:string-value="0">
            <text:p>0</text:p>
          </table:table-cell>
          <table:table-cell office:value-type="string" office:string-value="0">
            <text:p>0</text:p>
          </table:table-cell>
          <table:table-cell office:value-type="string" office:string-value="https://github.com/unfoldingWord/data_tracking_wrangler">
            <text:p>https://github.com/unfoldingWord/data_tracking_wrangler</text:p>
          </table:table-cell>
          <table:table-cell office:value-type="string" office:string-value="2025-12-02T16:38:55Z">
            <text:p>2025-12-02T16:38:55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okuwiki-enhancedindexer">
            <text:p>dokuwiki-enhancedindex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1-15T12:01:11Z">
            <text:p>2016-01-15T12:01:11Z</text:p>
          </table:table-cell>
          <table:table-cell office:value-type="string" office:string-value="2016-01-15T12:01:04Z">
            <text:p>2016-01-15T12:01: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superdav42', 'Phil Hopper', 'jag3773']">
            <text:p>['phillip-hopper', 'superdav42', 'Phil Hopper', 'jag3773']</text:p>
          </table:table-cell>
          <table:table-cell office:value-type="string" office:string-value="0">
            <text:p>0</text:p>
          </table:table-cell>
          <table:table-cell office:value-type="string" office:string-value="0">
            <text:p>0</text:p>
          </table:table-cell>
          <table:table-cell office:value-type="string" office:string-value="https://github.com/unfoldingWord-dev/dokuwiki-enhancedindexer">
            <text:p>https://github.com/unfoldingWord-dev/dokuwiki-enhancedindexer</text:p>
          </table:table-cell>
          <table:table-cell office:value-type="string" office:string-value="2016-01-14T18:53:56Z">
            <text:p>2016-01-14T18:53:5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okuwiki-obs-comparer">
            <text:p>dokuwiki-obs-compar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23T01:03:31Z">
            <text:p>2015-06-23T01:03:31Z</text:p>
          </table:table-cell>
          <table:table-cell office:value-type="string" office:string-value="2015-06-02T01:42:21Z">
            <text:p>2015-06-02T01:42: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okuwiki-obs-comparer">
            <text:p>https://github.com/unfoldingWord-dev/dokuwiki-obs-comparer</text:p>
          </table:table-cell>
          <table:table-cell office:value-type="string" office:string-value="2015-05-29T18:20:26Z">
            <text:p>2015-05-29T18:20:2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okuwiki-plugin-obs">
            <text:p>dokuwiki-plugin-obs</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8:35:18Z">
            <text:p>2015-05-23T18:35:18Z</text:p>
          </table:table-cell>
          <table:table-cell office:value-type="string" office:string-value="2015-05-23T18:26:14Z">
            <text:p>2015-05-23T18:26: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Jesse A. Griffin', 'Apache']">
            <text:p>['phillip-hopper', 'Phil Hopper', 'Jesse A. Griffin', 'Apache']</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
            <text:p>https://github.com/unfoldingWord-dev/dokuwiki-plugin-obs</text:p>
          </table:table-cell>
          <table:table-cell office:value-type="string" office:string-value="2015-06-23T18:57:35Z">
            <text:p>2015-06-23T18:57:35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okuwiki-plugin-obs-audio-upload">
            <text:p>dokuwiki-plugin-obs-audio-upload</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5-05-23T17:13:24Z">
            <text:p>2015-05-23T17:13:24Z</text:p>
          </table:table-cell>
          <table:table-cell office:value-type="string" office:string-value="2015-05-23T17:13:23Z">
            <text:p>2015-05-23T17:13:23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audio-upload">
            <text:p>https://github.com/unfoldingWord-dev/dokuwiki-plugin-obs-audio-upload</text:p>
          </table:table-cell>
          <table:table-cell office:value-type="string" office:string-value="2015-03-19T19:30:11Z">
            <text:p>2015-03-19T19:30:1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okuwiki-plugin-obs-review">
            <text:p>dokuwiki-plugin-obs-review</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1:00Z">
            <text:p>2015-06-10T19:51:00Z</text:p>
          </table:table-cell>
          <table:table-cell office:value-type="string" office:string-value="2015-06-10T19:50:59Z">
            <text:p>2015-06-10T19:5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review">
            <text:p>https://github.com/unfoldingWord-dev/dokuwiki-plugin-obs-review</text:p>
          </table:table-cell>
          <table:table-cell office:value-type="string" office:string-value="2015-04-13T19:33:48Z">
            <text:p>2015-04-13T19:33:4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okuwiki-plugin-register">
            <text:p>dokuwiki-plugin-regist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6:59:10Z">
            <text:p>2015-05-23T16:59:10Z</text:p>
          </table:table-cell>
          <table:table-cell office:value-type="string" office:string-value="2015-05-23T16:59:09Z">
            <text:p>2015-05-23T16:59: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register">
            <text:p>https://github.com/unfoldingWord-dev/dokuwiki-plugin-register</text:p>
          </table:table-cell>
          <table:table-cell office:value-type="string" office:string-value="2015-03-12T19:17:46Z">
            <text:p>2015-03-12T19:17:4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okuwiki-plugin-shared">
            <text:p>dokuwiki-plugin-shared</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0:16Z">
            <text:p>2015-06-10T19:50:16Z</text:p>
          </table:table-cell>
          <table:table-cell office:value-type="string" office:string-value="2015-06-10T19:50:15Z">
            <text:p>2015-06-10T19:50: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shared">
            <text:p>https://github.com/unfoldingWord-dev/dokuwiki-plugin-shared</text:p>
          </table:table-cell>
          <table:table-cell office:value-type="string" office:string-value="2015-06-04T20:09:16Z">
            <text:p>2015-06-04T20:09:1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okuwiki-to-rc">
            <text:p>dokuwiki-to-rc</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9-29T23:38:30Z">
            <text:p>2017-09-29T23:38:30Z</text:p>
          </table:table-cell>
          <table:table-cell office:value-type="string" office:string-value="2016-12-20T20:45:22Z">
            <text:p>2016-12-20T20:45:22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to-rc">
            <text:p>https://github.com/unfoldingWord-dev/dokuwiki-to-rc</text:p>
          </table:table-cell>
          <table:table-cell office:value-type="string" office:string-value="2016-09-24T19:55:06Z">
            <text:p>2016-09-24T19:55:0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okuwiki-usfm-import">
            <text:p>dokuwiki-usfm-import</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11T18:33:11Z">
            <text:p>2015-05-11T18:33:11Z</text:p>
          </table:table-cell>
          <table:table-cell office:value-type="string" office:string-value="2015-05-11T18:31:01Z">
            <text:p>2015-05-11T18:31:01Z</text:p>
          </table:table-cell>
          <table:table-cell office:value-type="string" office:string-value="">
            <text:p/>
          </table:table-cell>
          <table:table-cell office:value-type="string" office:string-value="4">
            <text:p>4</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dokuwiki-usfm-import">
            <text:p>https://github.com/unfoldingWord-dev/dokuwiki-usfm-import</text:p>
          </table:table-cell>
          <table:table-cell office:value-type="string" office:string-value="2015-06-23T19:07:28Z">
            <text:p>2015-06-23T19:07:2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ownload-link-tracker">
            <text:p>download-link-tracker</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6T21:39:43Z">
            <text:p>2025-06-06T21:39:43Z</text:p>
          </table:table-cell>
          <table:table-cell office:value-type="string" office:string-value="2025-06-06T21:39:41Z">
            <text:p>2025-06-06T21:39: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wnload-link-tracker">
            <text:p>https://github.com/unfoldingWord/download-link-tracker</text:p>
          </table:table-cell>
          <table:table-cell office:value-type="string" office:string-value="2025-06-06T21:39:46Z">
            <text:p>2025-06-06T21:39:4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w-gitcommit">
            <text:p>dw-gitcommit</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4-08T17:34:08Z">
            <text:p>2016-04-08T17:34:08Z</text:p>
          </table:table-cell>
          <table:table-cell office:value-type="string" office:string-value="2016-04-08T17:34:07Z">
            <text:p>2016-04-08T17:34: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woolfg', 'danny0838', 'root', 'richmahn', 'birkirb', 'Dave Pearce']">
            <text:p>['Jesse A. Griffin', 'woolfg', 'danny0838', 'root', 'richmahn', 'birkirb', 'Dave Pearce']</text:p>
          </table:table-cell>
          <table:table-cell office:value-type="string" office:string-value="0">
            <text:p>0</text:p>
          </table:table-cell>
          <table:table-cell office:value-type="string" office:string-value="0">
            <text:p>0</text:p>
          </table:table-cell>
          <table:table-cell office:value-type="string" office:string-value="https://github.com/unfoldingWord-dev/dw-gitcommit">
            <text:p>https://github.com/unfoldingWord-dev/dw-gitcommit</text:p>
          </table:table-cell>
          <table:table-cell office:value-type="string" office:string-value="2016-04-08T13:55:39Z">
            <text:p>2016-04-08T13:55:3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w-zipodt">
            <text:p>dw-zipodt</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5-28T21:07:47Z">
            <text:p>2015-05-28T21:07:47Z</text:p>
          </table:table-cell>
          <table:table-cell office:value-type="string" office:string-value="">
            <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dw-zipodt">
            <text:p>https://github.com/unfoldingWord-dev/dw-zipodt</text:p>
          </table:table-cell>
          <table:table-cell office:value-type="string" office:string-value="2015-05-28T21:07:46Z">
            <text:p>2015-05-28T21:07:4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w_redirects">
            <text:p>dw_redirec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4T14:42:42Z">
            <text:p>2020-05-14T14:42:42Z</text:p>
          </table:table-cell>
          <table:table-cell office:value-type="string" office:string-value="2020-05-14T14:42:41Z">
            <text:p>2020-05-14T14:42: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w_redirects">
            <text:p>https://github.com/unfoldingWord/dw_redirects</text:p>
          </table:table-cell>
          <table:table-cell office:value-type="string" office:string-value="2020-05-14T14:42:44Z">
            <text:p>2020-05-14T14:42:4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en_obs_tf">
            <text:p>en_obs_tf</text:p>
          </table:table-cell>
          <table:table-cell office:value-type="string" office:string-value="unfoldingWord">
            <text:p>unfoldingWord</text:p>
          </table:table-cell>
          <table:table-cell office:value-type="string" office:string-value="SCSS">
            <text:p>SCSS</text:p>
          </table:table-cell>
          <table:table-cell office:value-type="string" office:string-value="False">
            <text:p>False</text:p>
          </table:table-cell>
          <table:table-cell office:value-type="string" office:string-value="False">
            <text:p>False</text:p>
          </table:table-cell>
          <table:table-cell office:value-type="string" office:string-value="2023-08-16T19:50:46Z">
            <text:p>2023-08-16T19:50:46Z</text:p>
          </table:table-cell>
          <table:table-cell office:value-type="string" office:string-value="2023-08-16T19:37:59Z">
            <text:p>2023-08-16T19:37: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github-actions[bot]', 'morganrdvs', 'ILindsley']">
            <text:p>['IanLindsley', 'github-actions[bot]', 'morganrdvs', 'ILindsley']</text:p>
          </table:table-cell>
          <table:table-cell office:value-type="string" office:string-value="0">
            <text:p>0</text:p>
          </table:table-cell>
          <table:table-cell office:value-type="string" office:string-value="0">
            <text:p>0</text:p>
          </table:table-cell>
          <table:table-cell office:value-type="string" office:string-value="https://github.com/unfoldingWord/en_obs_tf">
            <text:p>https://github.com/unfoldingWord/en_obs_tf</text:p>
          </table:table-cell>
          <table:table-cell office:value-type="string" office:string-value="2023-06-07T19:49:43Z">
            <text:p>2023-06-07T19:49:4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ExampleCheckingApp-tC">
            <text:p>ExampleCheckingApp-tC</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6:27:50Z">
            <text:p>2016-08-15T16:27:50Z</text:p>
          </table:table-cell>
          <table:table-cell office:value-type="string" office:string-value="2016-08-15T16:27:50Z">
            <text:p>2016-08-15T16:2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ExampleCheckingApp-tC">
            <text:p>https://github.com/unfoldingWord-dev/ExampleCheckingApp-tC</text:p>
          </table:table-cell>
          <table:table-cell office:value-type="string" office:string-value="2016-08-15T16:27:49Z">
            <text:p>2016-08-15T16:27:4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exports">
            <text:p>expor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8-05T19:30:09Z">
            <text:p>2014-08-05T19:30:09Z</text:p>
          </table:table-cell>
          <table:table-cell office:value-type="string" office:string-value="2014-08-05T19:30:05Z">
            <text:p>2014-08-05T19:30: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smedia', 'root']">
            <text:p>['Door43', 'dsmedia', 'root']</text:p>
          </table:table-cell>
          <table:table-cell office:value-type="string" office:string-value="0">
            <text:p>0</text:p>
          </table:table-cell>
          <table:table-cell office:value-type="string" office:string-value="0">
            <text:p>0</text:p>
          </table:table-cell>
          <table:table-cell office:value-type="string" office:string-value="https://github.com/unfoldingWord-dev/exports">
            <text:p>https://github.com/unfoldingWord-dev/exports</text:p>
          </table:table-cell>
          <table:table-cell office:value-type="string" office:string-value="2015-06-23T21:38:19Z">
            <text:p>2015-06-23T21:38:1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fia-kb">
            <text:p>fia-k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13T19:46:18Z">
            <text:p>2026-03-13T19:46:18Z</text:p>
          </table:table-cell>
          <table:table-cell office:value-type="string" office:string-value="2026-03-13T19:45:51Z">
            <text:p>2026-03-13T19:45: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https://github.com/unfoldingWord/fia-kb">
            <text:p>https://github.com/unfoldingWord/fia-kb</text:p>
          </table:table-cell>
          <table:table-cell office:value-type="string" office:string-value="2026-03-13T19:46:02Z">
            <text:p>2026-03-13T19:46:0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fred-mcp">
            <text:p>fred-mcp</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5-07T01:50:37Z">
            <text:p>2026-05-07T01:50:37Z</text:p>
          </table:table-cell>
          <table:table-cell office:value-type="string" office:string-value="2026-05-07T01:50:35Z">
            <text:p>2026-05-07T01:50: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claude']">
            <text:p>['Ian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fred-mcp">
            <text:p>https://github.com/unfoldingWord/fred-mcp</text:p>
          </table:table-cell>
          <table:table-cell office:value-type="string" office:string-value="2026-05-07T01:50:40Z">
            <text:p>2026-05-07T01:50:40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fred-zulip-bot">
            <text:p>fred-zulip-bo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7T20:31:27Z">
            <text:p>2025-10-07T20:31:27Z</text:p>
          </table:table-cell>
          <table:table-cell office:value-type="string" office:string-value="2025-10-07T20:31:22Z">
            <text:p>2025-10-07T20:31: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jl011', 'Codex Assistant', 'ILindsley', 'abiatarprado', 'IanLindsley', 'drcox633']">
            <text:p>['ijl011', 'Codex Assistant', 'ILindsley', 'abiatarprado', '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fred-zulip-bot">
            <text:p>https://github.com/unfoldingWord/fred-zulip-bot</text:p>
          </table:table-cell>
          <table:table-cell office:value-type="string" office:string-value="2025-10-07T20:31:31Z">
            <text:p>2025-10-07T20:31:3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gl-database-visualizations">
            <text:p>gl-database-visualization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27T04:38:12Z">
            <text:p>2024-06-27T04:38:12Z</text:p>
          </table:table-cell>
          <table:table-cell office:value-type="string" office:string-value="2024-06-27T04:38:09Z">
            <text:p>2024-06-27T04:38: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nu-alexander', 'jag3773']">
            <text:p>['binu-alexander',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gl-database-visualizations">
            <text:p>https://github.com/unfoldingWord-box3/gl-database-visualizations</text:p>
          </table:table-cell>
          <table:table-cell office:value-type="string" office:string-value="2024-06-27T04:38:16Z">
            <text:p>2024-06-27T04:38:1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gl_database">
            <text:p>gl_databas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2-10T15:16:33Z">
            <text:p>2021-02-10T15:16:33Z</text:p>
          </table:table-cell>
          <table:table-cell office:value-type="string" office:string-value="2021-01-21T20:44:46Z">
            <text:p>2021-01-21T20:44: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gl_database">
            <text:p>https://github.com/unfoldingWord/gl_database</text:p>
          </table:table-cell>
          <table:table-cell office:value-type="string" office:string-value="2021-01-21T20:44:49Z">
            <text:p>2021-01-21T20:44:4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gl_database_code">
            <text:p>gl_database_cod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10-14T15:01:43Z">
            <text:p>2021-10-14T15:01:43Z</text:p>
          </table:table-cell>
          <table:table-cell office:value-type="string" office:string-value="2021-10-14T15:01:43Z">
            <text:p>2021-10-14T15:01:4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gl_database_code">
            <text:p>https://github.com/unfoldingWord/gl_database_code</text:p>
          </table:table-cell>
          <table:table-cell office:value-type="string" office:string-value="2021-10-14T15:01:45Z">
            <text:p>2021-10-14T15:01:45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gogs-custom">
            <text:p>gogs-custom</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7-05-01T04:12:23Z">
            <text:p>2017-05-01T04:12:23Z</text:p>
          </table:table-cell>
          <table:table-cell office:value-type="string" office:string-value="2017-05-01T04:09:11Z">
            <text:p>2017-05-01T04:09: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bspidel', 'jag3773', 'Root@git']">
            <text:p>['Richard Mahn', 'Gogs', 'richmahn', 'bspidel', 'jag3773', 'Root@git']</text:p>
          </table:table-cell>
          <table:table-cell office:value-type="string" office:string-value="0">
            <text:p>0</text:p>
          </table:table-cell>
          <table:table-cell office:value-type="string" office:string-value="0">
            <text:p>0</text:p>
          </table:table-cell>
          <table:table-cell office:value-type="string" office:string-value="https://github.com/unfoldingWord-dev/gogs-custom">
            <text:p>https://github.com/unfoldingWord-dev/gogs-custom</text:p>
          </table:table-cell>
          <table:table-cell office:value-type="string" office:string-value="2025-10-02T14:14:06Z">
            <text:p>2025-10-02T14:14:0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gogs_auto_scaling">
            <text:p>gogs_auto_scaling</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5-20T10:45:38Z">
            <text:p>2022-05-20T10:45:38Z</text:p>
          </table:table-cell>
          <table:table-cell office:value-type="string" office:string-value="2022-05-20T10:45:38Z">
            <text:p>2022-05-20T10:45: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root', 'yakob-aleksandrovich']">
            <text:p>['jag3773', 'roo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gogs_auto_scaling">
            <text:p>https://github.com/unfoldingWord-dev/gogs_auto_scaling</text:p>
          </table:table-cell>
          <table:table-cell office:value-type="string" office:string-value="2022-05-20T10:45:41Z">
            <text:p>2022-05-20T10:45:4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greek-apparatus-app">
            <text:p>greek-apparatus-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2-18T21:03:03Z">
            <text:p>2020-12-18T21:03:03Z</text:p>
          </table:table-cell>
          <table:table-cell office:value-type="string" office:string-value="2020-12-14T15:55:47Z">
            <text:p>2020-12-14T15:55:47Z</text:p>
          </table:table-cell>
          <table:table-cell office:value-type="string" office:string-value="">
            <text:p/>
          </table:table-cell>
          <table:table-cell office:value-type="string" office:string-value="21">
            <text:p>21</text:p>
          </table:table-cell>
          <table:table-cell office:value-type="string" office:string-value="0">
            <text:p>0</text:p>
          </table:table-cell>
          <table:table-cell office:value-type="string" office:string-value="greek-apparatus-app">
            <text:p>greek-apparatus-app</text:p>
          </table:table-cell>
          <table:table-cell office:value-type="string" office:string-value="False">
            <text:p>False</text:p>
          </table:table-cell>
          <table:table-cell office:value-type="string" office:string-value="54">
            <text:p>54</text:p>
          </table:table-cell>
          <table:table-cell office:value-type="string" office:string-value="2020-12-11T16:05:46.321Z">
            <text:p>2020-12-11T16:05:46.321Z</text:p>
          </table:table-cell>
          <table:table-cell office:value-type="string" office:string-value="">
            <text:p/>
          </table:table-cell>
          <table:table-cell office:value-type="string" office:string-value="['bible-reference-rcl', 'datatable-translatable', 'gitea-react-toolkit', 'scripture-resources-rcl', 'string-punctuation-tokenizer', 'usfm-js']">
            <text:p>['bible-reference-rcl', 'datatable-translatable', 'gitea-react-toolkit', 'scripture-resources-rcl', 'string-punctuation-tokenizer', 'usfm-js']</text:p>
          </table:table-cell>
          <table:table-cell office:value-type="string" office:string-value="">
            <text:p/>
          </table:table-cell>
          <table:table-cell office:value-type="string" office:string-value="['richmahn', 'mannycolon', 'ancientTexts-net']">
            <text:p>['richmahn', 'mannycolon',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box3/greek-apparatus-app">
            <text:p>https://github.com/unfoldingWord-box3/greek-apparatus-app</text:p>
          </table:table-cell>
          <table:table-cell office:value-type="string" office:string-value="2021-02-11T13:51:27Z">
            <text:p>2021-02-11T13:51:2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54 downloads in the last year) and no detected local consumers.">
            <text:p>Package has low but nonzero npm usage (54 downloads in the last year) and no detected local consumers.</text:p>
          </table:table-cell>
        </table:table-row>
        <table:table-row>
          <table:table-cell office:value-type="string" office:string-value="GWE-Tests">
            <text:p>GWE-Tes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07-29T13:32:24Z">
            <text:p>2024-07-29T13:32:24Z</text:p>
          </table:table-cell>
          <table:table-cell office:value-type="string" office:string-value="2024-07-29T13:32:24Z">
            <text:p>2024-07-29T13:32: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GWE-Tests">
            <text:p>https://github.com/unfoldingWord/GWE-Tests</text:p>
          </table:table-cell>
          <table:table-cell office:value-type="string" office:string-value="2024-07-29T13:32:27Z">
            <text:p>2024-07-29T13:32:2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hello-world-react-component-library">
            <text:p>hello-world-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07:49:26Z">
            <text:p>2023-03-02T07:49:26Z</text:p>
          </table:table-cell>
          <table:table-cell office:value-type="string" office:string-value="2022-02-23T21:09:04Z">
            <text:p>2022-02-23T21:09:04Z</text:p>
          </table:table-cell>
          <table:table-cell office:value-type="string" office:string-value="">
            <text:p/>
          </table:table-cell>
          <table:table-cell office:value-type="string" office:string-value="32">
            <text:p>32</text:p>
          </table:table-cell>
          <table:table-cell office:value-type="string" office:string-value="27">
            <text:p>27</text:p>
          </table:table-cell>
          <table:table-cell office:value-type="string" office:string-value="hello-world-react-component-library">
            <text:p>hello-world-react-component-library</text:p>
          </table:table-cell>
          <table:table-cell office:value-type="string" office:string-value="False">
            <text:p>False</text:p>
          </table:table-cell>
          <table:table-cell office:value-type="string" office:string-value="159">
            <text:p>159</text:p>
          </table:table-cell>
          <table:table-cell office:value-type="string" office:string-value="2019-09-25T16:00:59.747Z">
            <text:p>2019-09-25T16:00:59.747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RoyalSix', 'Sterling (Jay) Scott']">
            <text:p>['klappy', 'RoyalSix',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box3/hello-world-react-component-library">
            <text:p>https://github.com/unfoldingWord-box3/hello-world-react-component-library</text:p>
          </table:table-cell>
          <table:table-cell office:value-type="string" office:string-value="2022-06-14T15:18:39Z">
            <text:p>2022-06-14T15:18:3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159 downloads in the last year) and no detected local consumers.">
            <text:p>Package has low but nonzero npm usage (159 downloads in the last year) and no detected local consumers.</text:p>
          </table:table-cell>
        </table:table-row>
        <table:table-row>
          <table:table-cell office:value-type="string" office:string-value="hubot">
            <text:p>hubot</text:p>
          </table:table-cell>
          <table:table-cell office:value-type="string" office:string-value="unfoldingWord-dev">
            <text:p>unfoldingWord-dev</text:p>
          </table:table-cell>
          <table:table-cell office:value-type="string" office:string-value="CoffeeScript">
            <text:p>CoffeeScript</text:p>
          </table:table-cell>
          <table:table-cell office:value-type="string" office:string-value="False">
            <text:p>False</text:p>
          </table:table-cell>
          <table:table-cell office:value-type="string" office:string-value="False">
            <text:p>False</text:p>
          </table:table-cell>
          <table:table-cell office:value-type="string" office:string-value="2016-12-01T19:40:08Z">
            <text:p>2016-12-01T19:40:08Z</text:p>
          </table:table-cell>
          <table:table-cell office:value-type="string" office:string-value="2016-12-01T19:40:00Z">
            <text:p>2016-12-01T19:40:00Z</text:p>
          </table:table-cell>
          <table:table-cell office:value-type="string" office:string-value="">
            <text:p/>
          </table:table-cell>
          <table:table-cell office:value-type="string" office:string-value="25">
            <text:p>2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superdav42', 'Simi Shonowo', 'root', 'Richard Mahn', 'richmahn', 'hubot', 'markalolo', 'richmahn@gmail.com']">
            <text:p>['jag3773', 'superdav42', 'Simi Shonowo', 'root', 'Richard Mahn', 'richmahn', 'hubot', 'markalolo', 'richmahn@gmail.com']</text:p>
          </table:table-cell>
          <table:table-cell office:value-type="string" office:string-value="0">
            <text:p>0</text:p>
          </table:table-cell>
          <table:table-cell office:value-type="string" office:string-value="0">
            <text:p>0</text:p>
          </table:table-cell>
          <table:table-cell office:value-type="string" office:string-value="https://github.com/unfoldingWord-dev/hubot">
            <text:p>https://github.com/unfoldingWord-dev/hubot</text:p>
          </table:table-cell>
          <table:table-cell office:value-type="string" office:string-value="2016-12-01T19:33:07Z">
            <text:p>2016-12-01T19:33:0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inventoryst">
            <text:p>inventorys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4-02T09:43:44Z">
            <text:p>2026-04-02T09:43:44Z</text:p>
          </table:table-cell>
          <table:table-cell office:value-type="string" office:string-value="2026-04-02T09:43:40Z">
            <text:p>2026-04-02T09:4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inventoryst">
            <text:p>https://github.com/unfoldingWord/inventoryst</text:p>
          </table:table-cell>
          <table:table-cell office:value-type="string" office:string-value="2026-04-02T09:43:48Z">
            <text:p>2026-04-02T09:43:4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Katalon_MD-TSV_Converter_Koz">
            <text:p>Katalon_MD-TSV_Converter_Koz</text:p>
          </table:table-cell>
          <table:table-cell office:value-type="string" office:string-value="unfoldingWord">
            <text:p>unfoldingWord</text:p>
          </table:table-cell>
          <table:table-cell office:value-type="string" office:string-value="Groovy">
            <text:p>Groovy</text:p>
          </table:table-cell>
          <table:table-cell office:value-type="string" office:string-value="False">
            <text:p>False</text:p>
          </table:table-cell>
          <table:table-cell office:value-type="string" office:string-value="False">
            <text:p>False</text:p>
          </table:table-cell>
          <table:table-cell office:value-type="string" office:string-value="2021-07-01T04:35:46Z">
            <text:p>2021-07-01T04:35:46Z</text:p>
          </table:table-cell>
          <table:table-cell office:value-type="string" office:string-value="2021-07-01T04:33:40Z">
            <text:p>2021-07-01T04:3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kozie">
            <text:p>cckozie</text:p>
          </table:table-cell>
          <table:table-cell office:value-type="string" office:string-value="0">
            <text:p>0</text:p>
          </table:table-cell>
          <table:table-cell office:value-type="string" office:string-value="0">
            <text:p>0</text:p>
          </table:table-cell>
          <table:table-cell office:value-type="string" office:string-value="https://github.com/unfoldingWord/Katalon_MD-TSV_Converter_Koz">
            <text:p>https://github.com/unfoldingWord/Katalon_MD-TSV_Converter_Koz</text:p>
          </table:table-cell>
          <table:table-cell office:value-type="string" office:string-value="2021-07-01T04:36:22Z">
            <text:p>2021-07-01T04:36:2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Katalon_tC_Create">
            <text:p>Katalon_tC_Create</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7-08T17:16:23Z">
            <text:p>2021-07-08T17:16:23Z</text:p>
          </table:table-cell>
          <table:table-cell office:value-type="string" office:string-value="2021-07-08T17:16:06Z">
            <text:p>2021-07-08T17:1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kozie', 'cckoz']">
            <text:p>['cckozie', 'cckoz']</text:p>
          </table:table-cell>
          <table:table-cell office:value-type="string" office:string-value="0">
            <text:p>0</text:p>
          </table:table-cell>
          <table:table-cell office:value-type="string" office:string-value="0">
            <text:p>0</text:p>
          </table:table-cell>
          <table:table-cell office:value-type="string" office:string-value="https://github.com/unfoldingWord/Katalon_tC_Create">
            <text:p>https://github.com/unfoldingWord/Katalon_tC_Create</text:p>
          </table:table-cell>
          <table:table-cell office:value-type="string" office:string-value="2021-07-08T17:16:26Z">
            <text:p>2021-07-08T17:16:2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kr1-data-scripts">
            <text:p>kr1-data-script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2T04:31:56Z">
            <text:p>2025-12-12T04:31:56Z</text:p>
          </table:table-cell>
          <table:table-cell office:value-type="string" office:string-value="2025-12-12T04:31:51Z">
            <text:p>2025-12-12T04:31: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drcox633']">
            <text:p>['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kr1-data-scripts">
            <text:p>https://github.com/unfoldingWord/kr1-data-scripts</text:p>
          </table:table-cell>
          <table:table-cell office:value-type="string" office:string-value="2025-12-12T04:31:59Z">
            <text:p>2025-12-12T04:31:5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lambda-tw-strongs-list-generator">
            <text:p>lambda-tw-strongs-list-generator</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0T12:36:08Z">
            <text:p>2025-09-10T12:36:08Z</text:p>
          </table:table-cell>
          <table:table-cell office:value-type="string" office:string-value="2025-09-10T12:36:07Z">
            <text:p>2025-09-10T12:36: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lambda-tw-strongs-list-generator">
            <text:p>https://github.com/unfoldingWord/lambda-tw-strongs-list-generator</text:p>
          </table:table-cell>
          <table:table-cell office:value-type="string" office:string-value="2025-09-10T12:36:11Z">
            <text:p>2025-09-10T12:36:1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language-search">
            <text:p>language-search</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8T16:25:04Z">
            <text:p>2025-12-18T16:25:04Z</text:p>
          </table:table-cell>
          <table:table-cell office:value-type="string" office:string-value="2025-12-18T16:25:00Z">
            <text:p>2025-12-18T16:25: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root', 'paltman']">
            <text:p>['yakob-aleksandrovich', 'root', 'paltman']</text:p>
          </table:table-cell>
          <table:table-cell office:value-type="string" office:string-value="0">
            <text:p>0</text:p>
          </table:table-cell>
          <table:table-cell office:value-type="string" office:string-value="0">
            <text:p>0</text:p>
          </table:table-cell>
          <table:table-cell office:value-type="string" office:string-value="https://github.com/unfoldingWord/language-search">
            <text:p>https://github.com/unfoldingWord/language-search</text:p>
          </table:table-cell>
          <table:table-cell office:value-type="string" office:string-value="2025-12-18T16:25:08Z">
            <text:p>2025-12-18T16:25:0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lexicon-poc">
            <text:p>lexicon-poc</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10-20T10:56:21Z">
            <text:p>2021-10-20T10:56:21Z</text:p>
          </table:table-cell>
          <table:table-cell office:value-type="string" office:string-value="2021-10-20T10:56:06Z">
            <text:p>2021-10-20T10:5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https://github.com/unfoldingWord-box3/lexicon-poc">
            <text:p>https://github.com/unfoldingWord-box3/lexicon-poc</text:p>
          </table:table-cell>
          <table:table-cell office:value-type="string" office:string-value="2021-10-20T10:56:31Z">
            <text:p>2021-10-20T10:56:3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loki-exporter">
            <text:p>loki-export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08T16:01:29Z">
            <text:p>2026-05-08T16:01:29Z</text:p>
          </table:table-cell>
          <table:table-cell office:value-type="string" office:string-value="2026-05-08T16:01:24Z">
            <text:p>2026-05-08T16:01: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https://github.com/unfoldingWord/loki-exporter">
            <text:p>https://github.com/unfoldingWord/loki-exporter</text:p>
          </table:table-cell>
          <table:table-cell office:value-type="string" office:string-value="2026-05-08T16:01:37Z">
            <text:p>2026-05-08T16:01:3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media">
            <text:p>media</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7-28T19:30:07Z">
            <text:p>2014-07-28T19:30:07Z</text:p>
          </table:table-cell>
          <table:table-cell office:value-type="string" office:string-value="2014-07-28T19:30:04Z">
            <text:p>2014-07-28T19:30: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istant Shores Media', 'root']">
            <text:p>['Door43', 'Distant Shores Media', 'root']</text:p>
          </table:table-cell>
          <table:table-cell office:value-type="string" office:string-value="0">
            <text:p>0</text:p>
          </table:table-cell>
          <table:table-cell office:value-type="string" office:string-value="0">
            <text:p>0</text:p>
          </table:table-cell>
          <table:table-cell office:value-type="string" office:string-value="https://github.com/unfoldingWord-dev/media">
            <text:p>https://github.com/unfoldingWord-dev/media</text:p>
          </table:table-cell>
          <table:table-cell office:value-type="string" office:string-value="2015-06-23T21:37:51Z">
            <text:p>2015-06-23T21:37:5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metrics">
            <text:p>metric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18T15:31:33Z">
            <text:p>2026-02-18T15:31:33Z</text:p>
          </table:table-cell>
          <table:table-cell office:value-type="string" office:string-value="2026-02-18T15:31:28Z">
            <text:p>2026-02-18T15:31:28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yakob-aleksandrovich', 'richmahn', 'bspidel', 'jesse@unfoldingword.org', 'Jaap-Jan Swijnenburg', 'dependabot[bot]', 'elgohr']">
            <text:p>['jag3773', 'yakob-aleksandrovich', 'richmahn', 'bspidel', 'jesse@unfoldingword.org', 'Jaap-Jan Swijnenburg', 'dependabot[bot]', 'elgohr']</text:p>
          </table:table-cell>
          <table:table-cell office:value-type="string" office:string-value="0">
            <text:p>0</text:p>
          </table:table-cell>
          <table:table-cell office:value-type="string" office:string-value="0">
            <text:p>0</text:p>
          </table:table-cell>
          <table:table-cell office:value-type="string" office:string-value="https://github.com/unfoldingWord/metrics">
            <text:p>https://github.com/unfoldingWord/metrics</text:p>
          </table:table-cell>
          <table:table-cell office:value-type="string" office:string-value="2026-02-18T15:31:37Z">
            <text:p>2026-02-18T15:31:3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mini-sb-handler">
            <text:p>mini-sb-handle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9-12T09:53:14Z">
            <text:p>2024-09-12T09:53:14Z</text:p>
          </table:table-cell>
          <table:table-cell office:value-type="string" office:string-value="2024-09-12T09:53:09Z">
            <text:p>2024-09-12T09:53: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mini-sb-handler">
            <text:p>https://github.com/unfoldingWord-box3/mini-sb-handler</text:p>
          </table:table-cell>
          <table:table-cell office:value-type="string" office:string-value="2024-09-12T09:53:19Z">
            <text:p>2024-09-12T09:53:1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minitracker">
            <text:p>minitrack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22T15:45:41Z">
            <text:p>2025-12-22T15:45:41Z</text:p>
          </table:table-cell>
          <table:table-cell office:value-type="string" office:string-value="2025-12-22T15:45:38Z">
            <text:p>2025-12-22T15:45: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minitracker">
            <text:p>https://github.com/unfoldingWord/minitracker</text:p>
          </table:table-cell>
          <table:table-cell office:value-type="string" office:string-value="2025-12-22T15:45:45Z">
            <text:p>2025-12-22T15:45:45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NotionImport">
            <text:p>NotionImport</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0-23T20:23:28Z">
            <text:p>2023-10-23T20:23:28Z</text:p>
          </table:table-cell>
          <table:table-cell office:value-type="string" office:string-value="2023-10-23T20:23:28Z">
            <text:p>2023-10-23T20:23: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NotionImport">
            <text:p>https://github.com/unfoldingWord-box3/NotionImport</text:p>
          </table:table-cell>
          <table:table-cell office:value-type="string" office:string-value="2023-10-23T20:12:59Z">
            <text:p>2023-10-23T20:12:5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nsmsg">
            <text:p>nsmsg</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2-24T19:58:22Z">
            <text:p>2015-02-24T19:58:22Z</text:p>
          </table:table-cell>
          <table:table-cell office:value-type="string" office:string-value="2015-02-24T19:55:32Z">
            <text:p>2015-02-24T19:55: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nsmsg">
            <text:p>https://github.com/unfoldingWord-dev/nsmsg</text:p>
          </table:table-cell>
          <table:table-cell office:value-type="string" office:string-value="2015-06-23T21:40:04Z">
            <text:p>2015-06-23T21:40:0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comparer">
            <text:p>obs-compar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4-11T06:23:30Z">
            <text:p>2015-04-11T06:23:30Z</text:p>
          </table:table-cell>
          <table:table-cell office:value-type="string" office:string-value="2015-04-11T06:23:34Z">
            <text:p>2015-04-11T06:23:3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obs-comparer">
            <text:p>https://github.com/unfoldingWord-dev/obs-comparer</text:p>
          </table:table-cell>
          <table:table-cell office:value-type="string" office:string-value="2015-04-11T06:23:30Z">
            <text:p>2015-04-11T06:23:30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data">
            <text:p>obs-dat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3-24T13:00:10Z">
            <text:p>2018-03-24T13:00:10Z</text:p>
          </table:table-cell>
          <table:table-cell office:value-type="string" office:string-value="2018-03-24T12:59:58Z">
            <text:p>2018-03-24T12:59: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data">
            <text:p>https://github.com/unfoldingWord-dev/obs-data</text:p>
          </table:table-cell>
          <table:table-cell office:value-type="string" office:string-value="2018-03-24T13:00:11Z">
            <text:p>2018-03-24T13:00:1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reader">
            <text:p>obs-reader</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5-09-24T19:15:38Z">
            <text:p>2015-09-24T19:15:38Z</text:p>
          </table:table-cell>
          <table:table-cell office:value-type="string" office:string-value="2015-09-24T19:15:36Z">
            <text:p>2015-09-24T19:15: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ewmanr19', 'jag3773', 'phillip-hopper', 'root', 'Phil Hopper']">
            <text:p>['newmanr19', 'jag3773', 'phillip-hopper', 'root',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reader">
            <text:p>https://github.com/unfoldingWord-dev/obs-reader</text:p>
          </table:table-cell>
          <table:table-cell office:value-type="string" office:string-value="2015-03-09T22:06:24Z">
            <text:p>2015-03-09T22:06:2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web">
            <text:p>obs-web</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1-27T11:32:33Z">
            <text:p>2023-01-27T11:32:33Z</text:p>
          </table:table-cell>
          <table:table-cell office:value-type="string" office:string-value="2023-01-03T21:29:18Z">
            <text:p>2023-01-03T21:29:18Z</text:p>
          </table:table-cell>
          <table:table-cell office:value-type="string" office:string-value="">
            <text:p/>
          </table:table-cell>
          <table:table-cell office:value-type="string" office:string-value="3">
            <text:p>3</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obs-web">
            <text:p>https://github.com/unfoldingWord/obs-web</text:p>
          </table:table-cell>
          <table:table-cell office:value-type="string" office:string-value="2026-04-27T00:53:46Z">
            <text:p>2026-04-27T00:53:4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_tools">
            <text:p>obs_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11:48:14Z">
            <text:p>2018-06-04T11:48:14Z</text:p>
          </table:table-cell>
          <table:table-cell office:value-type="string" office:string-value="2016-12-20T14:11:44Z">
            <text:p>2016-12-20T14:11: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_tools">
            <text:p>https://github.com/unfoldingWord-dev/obs_tools</text:p>
          </table:table-cell>
          <table:table-cell office:value-type="string" office:string-value="2016-08-29T19:48:09Z">
            <text:p>2016-08-29T19:48:0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ce-print-preview-tools">
            <text:p>oce-print-preview-tool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2-13T23:46:18Z">
            <text:p>2023-12-13T23:46:1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oce-print-preview-tools">
            <text:p>https://github.com/unfoldingWord/oce-print-preview-tools</text:p>
          </table:table-cell>
          <table:table-cell office:value-type="string" office:string-value="2023-12-14T00:56:44Z">
            <text:p>2023-12-14T00:56:4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dd-claude-plugin">
            <text:p>odd-claude-plugin</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1-22T20:16:10Z">
            <text:p>2026-01-22T20:16:10Z</text:p>
          </table:table-cell>
          <table:table-cell office:value-type="string" office:string-value="2026-01-22T20:16:07Z">
            <text:p>2026-01-22T20:16: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odd-claude-plugin">
            <text:p>https://github.com/unfoldingWord/odd-claude-plugin</text:p>
          </table:table-cell>
          <table:table-cell office:value-type="string" office:string-value="2026-01-22T20:16:13Z">
            <text:p>2026-01-22T20:16:1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pages">
            <text:p>pages</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4-10-21T15:55:23Z">
            <text:p>2014-10-21T15:55:23Z</text:p>
          </table:table-cell>
          <table:table-cell office:value-type="string" office:string-value="2014-10-21T15:55:20Z">
            <text:p>2014-10-21T15:55: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istant Shores Media', 'Jesse A. Griffin', 'root']">
            <text:p>['Door43', 'Distant Shores Media', '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dev/pages">
            <text:p>https://github.com/unfoldingWord-dev/pages</text:p>
          </table:table-cell>
          <table:table-cell office:value-type="string" office:string-value="2019-02-28T03:39:24Z">
            <text:p>2019-02-28T03:39:2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pdf-splitter">
            <text:p>pdf-splitter</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24T13:19:57Z">
            <text:p>2022-02-24T13:19:57Z</text:p>
          </table:table-cell>
          <table:table-cell office:value-type="string" office:string-value="2022-02-24T13:19:55Z">
            <text:p>2022-02-24T13:19: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pdf-splitter">
            <text:p>https://github.com/unfoldingWord-box3/pdf-splitter</text:p>
          </table:table-cell>
          <table:table-cell office:value-type="string" office:string-value="2022-02-24T13:17:52Z">
            <text:p>2022-02-24T13:17:5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pi-collab">
            <text:p>pi-collab</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5-05-24T20:40:08Z">
            <text:p>2015-05-24T20:40:08Z</text:p>
          </table:table-cell>
          <table:table-cell office:value-type="string" office:string-value="2015-05-24T20:40:01Z">
            <text:p>2015-05-24T20:40:01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nutsenm', 'Jesse A. Griffin', 'jag3773', 'Shay Hayes']">
            <text:p>['knutsenm', 'Jesse A. Griffin', 'jag3773', 'Shay Hayes']</text:p>
          </table:table-cell>
          <table:table-cell office:value-type="string" office:string-value="0">
            <text:p>0</text:p>
          </table:table-cell>
          <table:table-cell office:value-type="string" office:string-value="0">
            <text:p>0</text:p>
          </table:table-cell>
          <table:table-cell office:value-type="string" office:string-value="https://github.com/unfoldingWord-dev/pi-collab">
            <text:p>https://github.com/unfoldingWord-dev/pi-collab</text:p>
          </table:table-cell>
          <table:table-cell office:value-type="string" office:string-value="2016-04-22T10:55:48Z">
            <text:p>2016-04-22T10:55:4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populate-gl-quote-rcl">
            <text:p>populate-gl-quote-rcl</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9-23T16:15:56Z">
            <text:p>2022-09-23T16:15:56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box3/populate-gl-quote-rcl">
            <text:p>https://github.com/unfoldingWord-box3/populate-gl-quote-rcl</text:p>
          </table:table-cell>
          <table:table-cell office:value-type="string" office:string-value="2022-09-23T16:15:55Z">
            <text:p>2022-09-23T16:15:55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PublishingBlockchain">
            <text:p>PublishingBlockchain</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2-22T23:26:11Z">
            <text:p>2015-12-22T23:26:11Z</text:p>
          </table:table-cell>
          <table:table-cell office:value-type="string" office:string-value="2015-12-22T23:26:11Z">
            <text:p>2015-12-22T23:26: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ev/PublishingBlockchain">
            <text:p>https://github.com/unfoldingWord-dev/PublishingBlockchain</text:p>
          </table:table-cell>
          <table:table-cell office:value-type="string" office:string-value="2018-03-11T20:57:04Z">
            <text:p>2018-03-11T20:57:0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python-aws-tools">
            <text:p>python-aws-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6-30T18:36:54Z">
            <text:p>2017-06-30T18:36:54Z</text:p>
          </table:table-cell>
          <table:table-cell office:value-type="string" office:string-value="2017-06-30T18:36:02Z">
            <text:p>2017-06-30T18:3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python-aws-tools">
            <text:p>https://github.com/unfoldingWord-dev/python-aws-tools</text:p>
          </table:table-cell>
          <table:table-cell office:value-type="string" office:string-value="2017-08-23T22:31:23Z">
            <text:p>2017-08-23T22:31:2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python-gitea-client">
            <text:p>python-gitea-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0-10-05T01:46:07Z">
            <text:p>2020-10-05T01:46:07Z</text:p>
          </table:table-cell>
          <table:table-cell office:value-type="string" office:string-value="2020-10-05T01:43:14Z">
            <text:p>2020-10-05T01:43:14Z</text:p>
          </table:table-cell>
          <table:table-cell office:value-type="string" office:string-value="2020-10-02T16:00:43Z">
            <text:p>2020-10-02T16:00:43Z</text:p>
          </table:table-cell>
          <table:table-cell office:value-type="string" office:string-value="5">
            <text:p>5</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da1nerd', 'guyzmo', 'costibleotu', 'evrardjp', 'jag3773', 'Richard Mahn', 'pyhedgehog']">
            <text:p>['ethantkoenig', 'richmahn', 'da1nerd', 'guyzmo', 'costibleotu', 'evrardjp', 'jag3773', 'Richard Mahn', 'pyhedgehog']</text:p>
          </table:table-cell>
          <table:table-cell office:value-type="string" office:string-value="2">
            <text:p>2</text:p>
          </table:table-cell>
          <table:table-cell office:value-type="string" office:string-value="0">
            <text:p>0</text:p>
          </table:table-cell>
          <table:table-cell office:value-type="string" office:string-value="https://github.com/unfoldingWord-dev/python-gitea-client">
            <text:p>https://github.com/unfoldingWord-dev/python-gitea-client</text:p>
          </table:table-cell>
          <table:table-cell office:value-type="string" office:string-value="2025-02-23T11:58:32Z">
            <text:p>2025-02-23T11:58:3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rc-schema">
            <text:p>rc-schema</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8-10T21:21:47Z">
            <text:p>2023-08-10T21:21:47Z</text:p>
          </table:table-cell>
          <table:table-cell office:value-type="string" office:string-value="2023-08-10T21:21:47Z">
            <text:p>2023-08-10T21:21: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obH123']">
            <text:p>['richmahn', 'RobH123']</text:p>
          </table:table-cell>
          <table:table-cell office:value-type="string" office:string-value="0">
            <text:p>0</text:p>
          </table:table-cell>
          <table:table-cell office:value-type="string" office:string-value="0">
            <text:p>0</text:p>
          </table:table-cell>
          <table:table-cell office:value-type="string" office:string-value="https://github.com/unfoldingWord/rc-schema">
            <text:p>https://github.com/unfoldingWord/rc-schema</text:p>
          </table:table-cell>
          <table:table-cell office:value-type="string" office:string-value="2021-11-30T18:22:18Z">
            <text:p>2021-11-30T18:22:1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s3_list-zip">
            <text:p>s3_list-zip</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2-19T22:47:48Z">
            <text:p>2016-02-19T22:47:48Z</text:p>
          </table:table-cell>
          <table:table-cell office:value-type="string" office:string-value="2016-02-19T22:47:37Z">
            <text:p>2016-02-19T22:47: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odemis">
            <text:p>codemis</text:p>
          </table:table-cell>
          <table:table-cell office:value-type="string" office:string-value="0">
            <text:p>0</text:p>
          </table:table-cell>
          <table:table-cell office:value-type="string" office:string-value="0">
            <text:p>0</text:p>
          </table:table-cell>
          <table:table-cell office:value-type="string" office:string-value="https://github.com/unfoldingWord-dev/s3_list-zip">
            <text:p>https://github.com/unfoldingWord-dev/s3_list-zip</text:p>
          </table:table-cell>
          <table:table-cell office:value-type="string" office:string-value="2016-02-19T21:11:59Z">
            <text:p>2016-02-19T21:11:5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sigadd">
            <text:p>sigadd</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4-01T22:00:27Z">
            <text:p>2015-04-01T22:00:27Z</text:p>
          </table:table-cell>
          <table:table-cell office:value-type="string" office:string-value="2015-04-01T22:00:25Z">
            <text:p>2015-04-01T22:00: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esse A. Griffin', 'root']">
            <text:p>['da1nerd', '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dev/sigadd">
            <text:p>https://github.com/unfoldingWord-dev/sigadd</text:p>
          </table:table-cell>
          <table:table-cell office:value-type="string" office:string-value="2015-04-01T22:00:28Z">
            <text:p>2015-04-01T22:00:2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SIL_API_loader">
            <text:p>SIL_API_loader</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6-29T18:35:44Z">
            <text:p>2023-06-29T18:35:44Z</text:p>
          </table:table-cell>
          <table:table-cell office:value-type="string" office:string-value="2023-06-29T18:35:34Z">
            <text:p>2023-06-29T18:35: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SIL_API_loader">
            <text:p>https://github.com/unfoldingWord-box3/SIL_API_loader</text:p>
          </table:table-cell>
          <table:table-cell office:value-type="string" office:string-value="2023-06-29T15:32:27Z">
            <text:p>2023-06-29T15:32:2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Simplify">
            <text:p>Simplif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15T20:16:37Z">
            <text:p>2024-08-15T20:16:37Z</text:p>
          </table:table-cell>
          <table:table-cell office:value-type="string" office:string-value="2024-08-15T20:16:37Z">
            <text:p>2024-08-15T20:16: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Simplify">
            <text:p>https://github.com/unfoldingWord-box3/Simplify</text:p>
          </table:table-cell>
          <table:table-cell office:value-type="string" office:string-value="2024-08-15T20:16:40Z">
            <text:p>2024-08-15T20:16:40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slack-lambda">
            <text:p>slack-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5-23T16:07:31Z">
            <text:p>2017-05-23T16:07:31Z</text:p>
          </table:table-cell>
          <table:table-cell office:value-type="string" office:string-value="2017-05-23T15:38:49Z">
            <text:p>2017-05-23T15:38: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PhotoNomad0', 'jag3773', 'richmahn']">
            <text:p>['Phil Hopper', 'phillip-hopper', 'PhotoNomad0',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slack-lambda">
            <text:p>https://github.com/unfoldingWord-dev/slack-lambda</text:p>
          </table:table-cell>
          <table:table-cell office:value-type="string" office:string-value="2017-03-15T16:22:01Z">
            <text:p>2017-03-15T16:22:0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SpeechToText">
            <text:p>SpeechToTex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3-14T13:49:53Z">
            <text:p>2024-03-14T13:49:53Z</text:p>
          </table:table-cell>
          <table:table-cell office:value-type="string" office:string-value="2024-03-14T13:49:41Z">
            <text:p>2024-03-14T13:49: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SpeechToText">
            <text:p>https://github.com/unfoldingWord-box3/SpeechToText</text:p>
          </table:table-cell>
          <table:table-cell office:value-type="string" office:string-value="2024-03-13T21:24:03Z">
            <text:p>2024-03-13T21:24:0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SplitAudioByText">
            <text:p>SplitAudioByTex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06T20:43:08Z">
            <text:p>2025-03-06T20:43:08Z</text:p>
          </table:table-cell>
          <table:table-cell office:value-type="string" office:string-value="2025-03-06T20:43:03Z">
            <text:p>2025-03-06T20:43: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SplitAudioByText">
            <text:p>https://github.com/unfoldingWord-box3/SplitAudioByText</text:p>
          </table:table-cell>
          <table:table-cell office:value-type="string" office:string-value="2025-03-06T20:43:12Z">
            <text:p>2025-03-06T20:43:1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c-helps-skills">
            <text:p>tc-helps-skill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4-07T21:29:21Z">
            <text:p>2026-04-07T21:29:21Z</text:p>
          </table:table-cell>
          <table:table-cell office:value-type="string" office:string-value="2026-04-07T21:29:01Z">
            <text:p>2026-04-07T21:2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amp', 'Birch Champeon']">
            <text:p>['birchamp', 'Birch Champeon']</text:p>
          </table:table-cell>
          <table:table-cell office:value-type="string" office:string-value="0">
            <text:p>0</text:p>
          </table:table-cell>
          <table:table-cell office:value-type="string" office:string-value="0">
            <text:p>0</text:p>
          </table:table-cell>
          <table:table-cell office:value-type="string" office:string-value="https://github.com/unfoldingWord/tc-helps-skills">
            <text:p>https://github.com/unfoldingWord/tc-helps-skills</text:p>
          </table:table-cell>
          <table:table-cell office:value-type="string" office:string-value="2026-04-07T21:29:27Z">
            <text:p>2026-04-07T21:29:2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CCreateQA-Daniel">
            <text:p>tCCreateQA-Daniel</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2-15T18:34:01Z">
            <text:p>2023-02-15T18:34:01Z</text:p>
          </table:table-cell>
          <table:table-cell office:value-type="string" office:string-value="2023-02-15T18:34:00Z">
            <text:p>2023-02-15T18:34: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tCCreateQA-Daniel">
            <text:p>https://github.com/unfoldingWord/tCCreateQA-Daniel</text:p>
          </table:table-cell>
          <table:table-cell office:value-type="string" office:string-value="2023-02-15T18:34:00Z">
            <text:p>2023-02-15T18:34:00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cCreateQA-elsy">
            <text:p>tcCreateQA-els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2-14T15:33:53Z">
            <text:p>2023-02-14T15:33:53Z</text:p>
          </table:table-cell>
          <table:table-cell office:value-type="string" office:string-value="2023-02-14T15:33:53Z">
            <text:p>2023-02-14T15:33: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itsonlambert', 'elsylambert', 'Elsy Litson']">
            <text:p>['elsylitsonlambert', 'elsylambert', 'Elsy Litson']</text:p>
          </table:table-cell>
          <table:table-cell office:value-type="string" office:string-value="0">
            <text:p>0</text:p>
          </table:table-cell>
          <table:table-cell office:value-type="string" office:string-value="0">
            <text:p>0</text:p>
          </table:table-cell>
          <table:table-cell office:value-type="string" office:string-value="https://github.com/unfoldingWord/tcCreateQA-elsy">
            <text:p>https://github.com/unfoldingWord/tcCreateQA-elsy</text:p>
          </table:table-cell>
          <table:table-cell office:value-type="string" office:string-value="2022-04-21T19:00:59Z">
            <text:p>2022-04-21T19:00:5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d-neo4j-poc">
            <text:p>td-neo4j-poc</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04-25T18:44:28Z">
            <text:p>2019-04-25T18:44:28Z</text:p>
          </table:table-cell>
          <table:table-cell office:value-type="string" office:string-value="2019-04-25T18:44:27Z">
            <text:p>2019-04-25T18:44: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box3/td-neo4j-poc">
            <text:p>https://github.com/unfoldingWord-box3/td-neo4j-poc</text:p>
          </table:table-cell>
          <table:table-cell office:value-type="string" office:string-value="2019-04-25T18:44:29Z">
            <text:p>2019-04-25T18:44:2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heia-examples">
            <text:p>theia-examples</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n-tsv7-to-tsv8">
            <text:p>tn-tsv7-to-tsv8</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11-14T10:49:22Z">
            <text:p>2024-11-14T10:49:22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tn-tsv7-to-tsv8">
            <text:p>https://github.com/unfoldingWord/tn-tsv7-to-tsv8</text:p>
          </table:table-cell>
          <table:table-cell office:value-type="string" office:string-value="2024-11-14T10:49:22Z">
            <text:p>2024-11-14T10:49:2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ools">
            <text:p>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9T15:52:11Z">
            <text:p>2024-04-19T15:52:11Z</text:p>
          </table:table-cell>
          <table:table-cell office:value-type="string" office:string-value="2024-04-19T15:51:24Z">
            <text:p>2024-04-19T15:51:24Z</text:p>
          </table:table-cell>
          <table:table-cell office:value-type="string" office:string-value="">
            <text:p/>
          </table:table-cell>
          <table:table-cell office:value-type="string" office:string-value="13">
            <text:p>13</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tools">
            <text:p>https://github.com/unfoldingWord-dev/tools</text:p>
          </table:table-cell>
          <table:table-cell office:value-type="string" office:string-value="2026-03-15T03:14:48Z">
            <text:p>2026-03-15T03:14:4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r-requirements">
            <text:p>tr-requiremen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6-24T21:33:04Z">
            <text:p>2015-06-24T21:33:04Z</text:p>
          </table:table-cell>
          <table:table-cell office:value-type="string" office:string-value="2015-06-24T21:33:02Z">
            <text:p>2015-06-24T21:33:02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jag3773']">
            <text:p>['Jesse A. Griffin',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requirements">
            <text:p>https://github.com/unfoldingWord-dev/tr-requirements</text:p>
          </table:table-cell>
          <table:table-cell office:value-type="string" office:string-value="2015-06-24T21:29:18Z">
            <text:p>2015-06-24T21:29:1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ranslation-helps-print-preview">
            <text:p>translation-helps-print-preview</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0T21:25:08Z">
            <text:p>2022-06-20T21:25:08Z</text:p>
          </table:table-cell>
          <table:table-cell office:value-type="string" office:string-value="2022-06-20T21:25:06Z">
            <text:p>2022-06-20T21:25:06Z</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abelpz', 'richmahn', 'birchamp']">
            <text:p>['klappy', 'abelpz', 'richmahn', 'birchamp']</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helps-print-preview">
            <text:p>https://github.com/unfoldingWord-box3/translation-helps-print-preview</text:p>
          </table:table-cell>
          <table:table-cell office:value-type="string" office:string-value="2022-06-17T15:46:05Z">
            <text:p>2022-06-17T15:46:05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ranslationNotes">
            <text:p>translationNote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6:29:39Z">
            <text:p>2016-08-15T16:29:39Z</text:p>
          </table:table-cell>
          <table:table-cell office:value-type="string" office:string-value="2016-08-15T16:29:38Z">
            <text:p>2016-08-15T16:29: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Notes">
            <text:p>https://github.com/unfoldingWord-dev/translationNotes</text:p>
          </table:table-cell>
          <table:table-cell office:value-type="string" office:string-value="2016-08-15T16:29:38Z">
            <text:p>2016-08-15T16:29:3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ranslationRecorder-Info">
            <text:p>translationRecorder-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37:00Z">
            <text:p>2025-10-09T10:37:00Z</text:p>
          </table:table-cell>
          <table:table-cell office:value-type="string" office:string-value="2025-10-09T10:37:00Z">
            <text:p>2025-10-09T10:37:00Z</text:p>
          </table:table-cell>
          <table:table-cell office:value-type="string" office:string-value="2017-05-10T20:33:49Z">
            <text:p>2017-05-10T20:33:49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1">
            <text:p>1</text:p>
          </table:table-cell>
          <table:table-cell office:value-type="string" office:string-value="0">
            <text:p>0</text:p>
          </table:table-cell>
          <table:table-cell office:value-type="string" office:string-value="https://github.com/unfoldingWord-dev/translationRecorder-Info">
            <text:p>https://github.com/unfoldingWord-dev/translationRecorder-Info</text:p>
          </table:table-cell>
          <table:table-cell office:value-type="string" office:string-value="2025-10-09T10:37:04Z">
            <text:p>2025-10-09T10:37:0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ranslationStudio-Info">
            <text:p>translationStudio-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40:03Z">
            <text:p>2025-10-09T10:40:03Z</text:p>
          </table:table-cell>
          <table:table-cell office:value-type="string" office:string-value="2025-10-09T10:40:03Z">
            <text:p>2025-10-09T10:40: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gamer78', 'ChrisJarka', 'yakob-aleksandrovich', 'jag3773']">
            <text:p>['pgamer78', 'ChrisJarka',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Studio-Info">
            <text:p>https://github.com/unfoldingWord-dev/translationStudio-Info</text:p>
          </table:table-cell>
          <table:table-cell office:value-type="string" office:string-value="2025-10-09T10:40:07Z">
            <text:p>2025-10-09T10:40:0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ranslationWords-tC">
            <text:p>translationWords-tC</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9:12:57Z">
            <text:p>2016-08-15T19:12:57Z</text:p>
          </table:table-cell>
          <table:table-cell office:value-type="string" office:string-value="2016-08-15T16:26:13Z">
            <text:p>2016-08-15T16:26: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Words-tC">
            <text:p>https://github.com/unfoldingWord-dev/translationWords-tC</text:p>
          </table:table-cell>
          <table:table-cell office:value-type="string" office:string-value="2016-08-15T16:26:26Z">
            <text:p>2016-08-15T16:26:2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s-exports">
            <text:p>ts-expor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6-13T20:29:55Z">
            <text:p>2014-06-13T20:29:55Z</text:p>
          </table:table-cell>
          <table:table-cell office:value-type="string" office:string-value="2014-06-13T20:29:49Z">
            <text:p>2014-06-13T20:29: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dev/ts-exports">
            <text:p>https://github.com/unfoldingWord-dev/ts-exports</text:p>
          </table:table-cell>
          <table:table-cell office:value-type="string" office:string-value="2015-06-23T21:38:46Z">
            <text:p>2015-06-23T21:38:4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s-stats">
            <text:p>ts-stat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08-10T11:28:50Z">
            <text:p>2021-08-10T11:28:50Z</text:p>
          </table:table-cell>
          <table:table-cell office:value-type="string" office:string-value="2021-08-10T11:28:46Z">
            <text:p>2021-08-10T11:28: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s-stats">
            <text:p>https://github.com/unfoldingWord-dev/ts-stats</text:p>
          </table:table-cell>
          <table:table-cell office:value-type="string" office:string-value="2021-08-10T11:28:53Z">
            <text:p>2021-08-10T11:28:5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w_consistency">
            <text:p>tw_consistency</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8-22T12:10:23Z">
            <text:p>2017-08-22T12:10:23Z</text:p>
          </table:table-cell>
          <table:table-cell office:value-type="string" office:string-value="2017-08-22T12:10:13Z">
            <text:p>2017-08-22T12:10: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ev/tw_consistency">
            <text:p>https://github.com/unfoldingWord-dev/tw_consistency</text:p>
          </table:table-cell>
          <table:table-cell office:value-type="string" office:string-value="2017-06-16T19:00:44Z">
            <text:p>2017-06-16T19:00:4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win-ahk">
            <text:p>twin-ahk</text:p>
          </table:table-cell>
          <table:table-cell office:value-type="string" office:string-value="unfoldingWord-box3">
            <text:p>unfoldingWord-box3</text:p>
          </table:table-cell>
          <table:table-cell office:value-type="string" office:string-value="AutoHotkey">
            <text:p>AutoHotkey</text:p>
          </table:table-cell>
          <table:table-cell office:value-type="string" office:string-value="False">
            <text:p>False</text:p>
          </table:table-cell>
          <table:table-cell office:value-type="string" office:string-value="False">
            <text:p>False</text:p>
          </table:table-cell>
          <table:table-cell office:value-type="string" office:string-value="2024-05-21T01:35:50Z">
            <text:p>2024-05-21T01:35:50Z</text:p>
          </table:table-cell>
          <table:table-cell office:value-type="string" office:string-value="2024-05-21T01:35:50Z">
            <text:p>2024-05-21T01:35: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twin-ahk">
            <text:p>https://github.com/unfoldingWord-box3/twin-ahk</text:p>
          </table:table-cell>
          <table:table-cell office:value-type="string" office:string-value="2024-05-21T01:35:54Z">
            <text:p>2024-05-21T01:35:5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x">
            <text:p>tx</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9T10:49:33Z">
            <text:p>2025-10-09T10:49:33Z</text:p>
          </table:table-cell>
          <table:table-cell office:value-type="string" office:string-value="2025-10-09T10:49:33Z">
            <text:p>2025-10-09T10:49: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yakob-aleksandrovich', 'jag3773']">
            <text:p>['da1nerd',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
            <text:p>https://github.com/unfoldingWord-dev/tx</text:p>
          </table:table-cell>
          <table:table-cell office:value-type="string" office:string-value="2025-10-09T10:49:37Z">
            <text:p>2025-10-09T10:49:3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x-dev">
            <text:p>tx-dev</text:p>
          </table:table-cell>
          <table:table-cell office:value-type="string" office:string-value="unfoldingWord">
            <text:p>unfoldingWord</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23-10-18T23:02:42Z">
            <text:p>2023-10-18T23:02:42Z</text:p>
          </table:table-cell>
          <table:table-cell office:value-type="string" office:string-value="2023-10-18T23:02:39Z">
            <text:p>2023-10-18T23:02: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x-dev">
            <text:p>https://github.com/unfoldingWord/tx-dev</text:p>
          </table:table-cell>
          <table:table-cell office:value-type="string" office:string-value="2022-12-12T05:15:44Z">
            <text:p>2022-12-12T05:15:4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x-html2pdf">
            <text:p>tx-html2pdf</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20T05:32:39Z">
            <text:p>2016-12-20T05:32:39Z</text:p>
          </table:table-cell>
          <table:table-cell office:value-type="string" office:string-value="2016-12-20T05:32:32Z">
            <text:p>2016-12-20T05:32: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html2pdf">
            <text:p>https://github.com/unfoldingWord-dev/tx-html2pdf</text:p>
          </table:table-cell>
          <table:table-cell office:value-type="string" office:string-value="2016-12-19T14:55:26Z">
            <text:p>2016-12-19T14:55:2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x-md2html">
            <text:p>tx-md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5T00:42:08Z">
            <text:p>2017-02-05T00:42:08Z</text:p>
          </table:table-cell>
          <table:table-cell office:value-type="string" office:string-value="2017-01-18T18:02:48Z">
            <text:p>2017-01-18T18:02: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il Hopper', 'phillip-hopper', 'Gogs']">
            <text:p>['Richard Mahn', 'richmahn', 'Phil Hopper', 'phillip-hopper', 'Gogs']</text:p>
          </table:table-cell>
          <table:table-cell office:value-type="string" office:string-value="1">
            <text:p>1</text:p>
          </table:table-cell>
          <table:table-cell office:value-type="string" office:string-value="0">
            <text:p>0</text:p>
          </table:table-cell>
          <table:table-cell office:value-type="string" office:string-value="https://github.com/unfoldingWord-dev/tx-md2html">
            <text:p>https://github.com/unfoldingWord-dev/tx-md2html</text:p>
          </table:table-cell>
          <table:table-cell office:value-type="string" office:string-value="2016-12-19T15:03:41Z">
            <text:p>2016-12-19T15:03:4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x-redis-poc">
            <text:p>tx-redis-poc</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10-20T13:53:17Z">
            <text:p>2023-10-20T13:53:17Z</text:p>
          </table:table-cell>
          <table:table-cell office:value-type="string" office:string-value="2023-10-20T13:53:14Z">
            <text:p>2023-10-20T13:53: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tx-redis-poc">
            <text:p>https://github.com/unfoldingWord-box3/tx-redis-poc</text:p>
          </table:table-cell>
          <table:table-cell office:value-type="string" office:string-value="2023-10-12T20:54:09Z">
            <text:p>2023-10-12T20:54:0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x-sample-client">
            <text:p>tx-sample-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20T05:54:47Z">
            <text:p>2016-12-20T05:54:47Z</text:p>
          </table:table-cell>
          <table:table-cell office:value-type="string" office:string-value="2016-12-20T05:54:38Z">
            <text:p>2016-12-20T05:54: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text:p>['Richard Mahn', 'Gogs']</text:p>
          </table:table-cell>
          <table:table-cell office:value-type="string" office:string-value="0">
            <text:p>0</text:p>
          </table:table-cell>
          <table:table-cell office:value-type="string" office:string-value="0">
            <text:p>0</text:p>
          </table:table-cell>
          <table:table-cell office:value-type="string" office:string-value="https://github.com/unfoldingWord-dev/tx-sample-client">
            <text:p>https://github.com/unfoldingWord-dev/tx-sample-client</text:p>
          </table:table-cell>
          <table:table-cell office:value-type="string" office:string-value="2016-12-19T15:14:47Z">
            <text:p>2016-12-19T15:14:4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x-shared-tools">
            <text:p>tx-shared-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4:19:33Z">
            <text:p>2017-01-18T14:19:33Z</text:p>
          </table:table-cell>
          <table:table-cell office:value-type="string" office:string-value="2017-01-18T14:19:20Z">
            <text:p>2017-01-18T14:19: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ethantkoenig', 'Phil Hopper', 'Gogs', 'bspidel', 'phillip-hopper']">
            <text:p>['Richard Mahn', 'richmahn', 'ethantkoenig', 'Phil Hopper', 'Gogs', 'bspidel',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tx-shared-tools">
            <text:p>https://github.com/unfoldingWord-dev/tx-shared-tools</text:p>
          </table:table-cell>
          <table:table-cell office:value-type="string" office:string-value="2016-09-06T13:14:39Z">
            <text:p>2016-09-06T13:14:3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x-usfm2html">
            <text:p>tx-usfm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23T01:36:55Z">
            <text:p>2016-09-23T01:36:55Z</text:p>
          </table:table-cell>
          <table:table-cell office:value-type="string" office:string-value="2016-09-23T01:36:50Z">
            <text:p>2016-09-23T01:36: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usfm2html">
            <text:p>https://github.com/unfoldingWord-dev/tx-usfm2html</text:p>
          </table:table-cell>
          <table:table-cell office:value-type="string" office:string-value="2019-02-19T12:45:43Z">
            <text:p>2019-02-19T12:45:4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x-webhook">
            <text:p>tx-webhook</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06T19:14:09Z">
            <text:p>2016-09-06T19:14:09Z</text:p>
          </table:table-cell>
          <table:table-cell office:value-type="string" office:string-value="2016-09-06T19:13:03Z">
            <text:p>2016-09-06T19:13: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st', 'richmahn', 'Richard Mahn', 'bspidel', 'jag3773']">
            <text:p>['Root Test', 'richmahn', 'Richard Mahn', 'bspidel',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webhook">
            <text:p>https://github.com/unfoldingWord-dev/tx-webhook</text:p>
          </table:table-cell>
          <table:table-cell office:value-type="string" office:string-value="2016-08-08T20:49:12Z">
            <text:p>2016-08-08T20:49:1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x-webhook-client">
            <text:p>tx-webhook-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8:00:19Z">
            <text:p>2017-01-18T18:00:19Z</text:p>
          </table:table-cell>
          <table:table-cell office:value-type="string" office:string-value="2017-01-18T18:00:15Z">
            <text:p>2017-01-18T18:00: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Gogs', 'Phil Hopper', 'phillip-hopper']">
            <text:p>['Richard Mahn', 'richmahn', 'Gogs', '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tx-webhook-client">
            <text:p>https://github.com/unfoldingWord-dev/tx-webhook-client</text:p>
          </table:table-cell>
          <table:table-cell office:value-type="string" office:string-value="2016-09-22T16:25:43Z">
            <text:p>2016-09-22T16:25:4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ugnt-app">
            <text:p>ugnt-app</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6-12-12T16:32:12Z">
            <text:p>2016-12-12T16:32:12Z</text:p>
          </table:table-cell>
          <table:table-cell office:value-type="string" office:string-value="2016-12-12T16:30:59Z">
            <text:p>2016-12-12T16:30:59Z</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ugnt-app">
            <text:p>https://github.com/unfoldingWord-dev/ugnt-app</text:p>
          </table:table-cell>
          <table:table-cell office:value-type="string" office:string-value="2016-12-12T16:32:16Z">
            <text:p>2016-12-12T16:32:1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Unlocked-Bible-Commentary-Info">
            <text:p>Unlocked-Bible-Commentary-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3:46Z">
            <text:p>2025-10-09T11:03:46Z</text:p>
          </table:table-cell>
          <table:table-cell office:value-type="string" office:string-value="2025-10-09T11:03:46Z">
            <text:p>2025-10-09T11:03: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nlocked-Bible-Commentary-Info">
            <text:p>https://github.com/unfoldingWord-dev/Unlocked-Bible-Commentary-Info</text:p>
          </table:table-cell>
          <table:table-cell office:value-type="string" office:string-value="2025-12-09T15:21:29Z">
            <text:p>2025-12-09T15:21:2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Unlocked-Bible-Notes-Info">
            <text:p>Unlocked-Bible-Notes-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7:50Z">
            <text:p>2025-10-09T11:07:50Z</text:p>
          </table:table-cell>
          <table:table-cell office:value-type="string" office:string-value="2025-10-09T11:07:50Z">
            <text:p>2025-10-09T11:0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jag3773', 'yakob-aleksandrovich', 'russp41']">
            <text:p>['ChrisJarka', 'jag3773', 'yakob-aleksandrovich', 'russp41']</text:p>
          </table:table-cell>
          <table:table-cell office:value-type="string" office:string-value="0">
            <text:p>0</text:p>
          </table:table-cell>
          <table:table-cell office:value-type="string" office:string-value="0">
            <text:p>0</text:p>
          </table:table-cell>
          <table:table-cell office:value-type="string" office:string-value="https://github.com/unfoldingWord-dev/Unlocked-Bible-Notes-Info">
            <text:p>https://github.com/unfoldingWord-dev/Unlocked-Bible-Notes-Info</text:p>
          </table:table-cell>
          <table:table-cell office:value-type="string" office:string-value="2025-12-09T15:21:13Z">
            <text:p>2025-12-09T15:21:1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Unlocked-Grammar-Info">
            <text:p>Unlocked-Grammar-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10:38Z">
            <text:p>2025-10-09T11:10:38Z</text:p>
          </table:table-cell>
          <table:table-cell office:value-type="string" office:string-value="2025-10-09T11:10:38Z">
            <text:p>2025-10-09T11:10: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presson', 'pjoakes', 'jag3773', 'yakob-aleksandrovich']">
            <text:p>['cpresson', 'pjoakes', 'jag3773',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Unlocked-Grammar-Info">
            <text:p>https://github.com/unfoldingWord-dev/Unlocked-Grammar-Info</text:p>
          </table:table-cell>
          <table:table-cell office:value-type="string" office:string-value="2025-10-09T11:10:42Z">
            <text:p>2025-10-09T11:10:4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Unlocked-Greek-Lexicon-Info">
            <text:p>Unlocked-Greek-Lexicon-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26:54Z">
            <text:p>2025-10-09T11:26:54Z</text:p>
          </table:table-cell>
          <table:table-cell office:value-type="string" office:string-value="2025-10-09T11:26:54Z">
            <text:p>2025-10-09T11:26: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statez', 'cpresson', 'yakob-aleksandrovich', 'toddlprice', 'jag3773']">
            <text:p>['destatez', 'cpresson', 'yakob-aleksandrovich', 'toddlprice',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nlocked-Greek-Lexicon-Info">
            <text:p>https://github.com/unfoldingWord-dev/Unlocked-Greek-Lexicon-Info</text:p>
          </table:table-cell>
          <table:table-cell office:value-type="string" office:string-value="2025-10-09T11:26:58Z">
            <text:p>2025-10-09T11:26:5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USFM-Utils">
            <text:p>USFM-Uti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1-14T22:01:10Z">
            <text:p>2018-01-14T22:01:10Z</text:p>
          </table:table-cell>
          <table:table-cell office:value-type="string" office:string-value="2016-10-04T01:35:53Z">
            <text:p>2016-10-04T01:35:5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USFM-Utils">
            <text:p>https://github.com/unfoldingWord-dev/USFM-Utils</text:p>
          </table:table-cell>
          <table:table-cell office:value-type="string" office:string-value="2026-02-23T14:45:47Z">
            <text:p>2026-02-23T14:45:4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uw-api">
            <text:p>uw-api</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7-07-24T12:47:59Z">
            <text:p>2017-07-24T12:47:59Z</text:p>
          </table:table-cell>
          <table:table-cell office:value-type="string" office:string-value="2017-07-24T12:47:28Z">
            <text:p>2017-07-24T12:47: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uw-api">
            <text:p>https://github.com/unfoldingWord-dev/uw-api</text:p>
          </table:table-cell>
          <table:table-cell office:value-type="string" office:string-value="2016-11-02T15:00:23Z">
            <text:p>2016-11-02T15:00:2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uW-Bible-Maps">
            <text:p>uW-Bible-Map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1-18T15:24:04Z">
            <text:p>2015-11-18T15:24:04Z</text:p>
          </table:table-cell>
          <table:table-cell office:value-type="string" office:string-value="">
            <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uW-Bible-Maps">
            <text:p>https://github.com/unfoldingWord-dev/uW-Bible-Maps</text:p>
          </table:table-cell>
          <table:table-cell office:value-type="string" office:string-value="2015-11-18T15:24:04Z">
            <text:p>2015-11-18T15:24:0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uw-data-tools">
            <text:p>uw-data-tools</text:p>
          </table:table-cell>
          <table:table-cell office:value-type="string" office:string-value="unfoldingWord-box3">
            <text:p>unfoldingWord-box3</text:p>
          </table:table-cell>
          <table:table-cell office:value-type="string" office:string-value="Jupyter Notebook">
            <text:p>Jupyter Notebook</text:p>
          </table:table-cell>
          <table:table-cell office:value-type="string" office:string-value="False">
            <text:p>False</text:p>
          </table:table-cell>
          <table:table-cell office:value-type="string" office:string-value="False">
            <text:p>False</text:p>
          </table:table-cell>
          <table:table-cell office:value-type="string" office:string-value="2021-11-30T10:14:35Z">
            <text:p>2021-11-30T10:14:35Z</text:p>
          </table:table-cell>
          <table:table-cell office:value-type="string" office:string-value="2021-11-30T10:14:19Z">
            <text:p>2021-11-30T10:14: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https://github.com/unfoldingWord-box3/uw-data-tools">
            <text:p>https://github.com/unfoldingWord-box3/uw-data-tools</text:p>
          </table:table-cell>
          <table:table-cell office:value-type="string" office:string-value="2021-11-30T10:14:38Z">
            <text:p>2021-11-30T10:14:3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uw-ios">
            <text:p>uw-ios</text:p>
          </table:table-cell>
          <table:table-cell office:value-type="string" office:string-value="unfoldingWord-dev">
            <text:p>unfoldingWord-dev</text:p>
          </table:table-cell>
          <table:table-cell office:value-type="string" office:string-value="C">
            <text:p>C</text:p>
          </table:table-cell>
          <table:table-cell office:value-type="string" office:string-value="False">
            <text:p>False</text:p>
          </table:table-cell>
          <table:table-cell office:value-type="string" office:string-value="False">
            <text:p>False</text:p>
          </table:table-cell>
          <table:table-cell office:value-type="string" office:string-value="2022-07-08T15:45:27Z">
            <text:p>2022-07-08T15:45:27Z</text:p>
          </table:table-cell>
          <table:table-cell office:value-type="string" office:string-value="2022-07-08T15:45:17Z">
            <text:p>2022-07-08T15:45:17Z</text:p>
          </table:table-cell>
          <table:table-cell office:value-type="string" office:string-value="2014-12-30T20:42:03Z">
            <text:p>2014-12-30T20:42:03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vid Solberg', 'bknatterud', 'dwsolberg', 'jag3773']">
            <text:p>['David Solberg', 'bknatterud', 'dwsolberg', 'jag3773']</text:p>
          </table:table-cell>
          <table:table-cell office:value-type="string" office:string-value="3">
            <text:p>3</text:p>
          </table:table-cell>
          <table:table-cell office:value-type="string" office:string-value="20">
            <text:p>20</text:p>
          </table:table-cell>
          <table:table-cell office:value-type="string" office:string-value="https://github.com/unfoldingWord-dev/uw-ios">
            <text:p>https://github.com/unfoldingWord-dev/uw-ios</text:p>
          </table:table-cell>
          <table:table-cell office:value-type="string" office:string-value="2025-10-02T14:12:49Z">
            <text:p>2025-10-02T14:12:4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uW-mobile-app">
            <text:p>uW-mobile-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5-03-09T22:15:57Z">
            <text:p>2015-03-09T22:15:57Z</text:p>
          </table:table-cell>
          <table:table-cell office:value-type="string" office:string-value="2015-03-09T22:15:57Z">
            <text:p>2015-03-09T22:15: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ever2ice', 'jag3773', 'timjore']">
            <text:p>['never2ice', 'jag3773', 'timjore']</text:p>
          </table:table-cell>
          <table:table-cell office:value-type="string" office:string-value="0">
            <text:p>0</text:p>
          </table:table-cell>
          <table:table-cell office:value-type="string" office:string-value="0">
            <text:p>0</text:p>
          </table:table-cell>
          <table:table-cell office:value-type="string" office:string-value="https://github.com/unfoldingWord-dev/uW-mobile-app">
            <text:p>https://github.com/unfoldingWord-dev/uW-mobile-app</text:p>
          </table:table-cell>
          <table:table-cell office:value-type="string" office:string-value="2016-09-26T09:51:13Z">
            <text:p>2016-09-26T09:51:1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uw-pdf-conversion-tools">
            <text:p>uw-pdf-conversion-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3-05T13:06:26Z">
            <text:p>2023-03-05T13:06:26Z</text:p>
          </table:table-cell>
          <table:table-cell office:value-type="string" office:string-value="2021-06-03T20:21:45Z">
            <text:p>2021-06-03T20:21:45Z</text:p>
          </table:table-cell>
          <table:table-cell office:value-type="string" office:string-value="">
            <text:p/>
          </table:table-cell>
          <table:table-cell office:value-type="string" office:string-value="4">
            <text:p>4</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ichard Mahn']">
            <text:p>['richmahn',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uw-pdf-conversion-tools">
            <text:p>https://github.com/unfoldingWord-dev/uw-pdf-conversion-tools</text:p>
          </table:table-cell>
          <table:table-cell office:value-type="string" office:string-value="2021-06-03T20:21:52Z">
            <text:p>2021-06-03T20:21:5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uw-publisher">
            <text:p>uw-publish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8-29T05:28:04Z">
            <text:p>2015-08-29T05:28:04Z</text:p>
          </table:table-cell>
          <table:table-cell office:value-type="string" office:string-value="2015-08-29T05:28:03Z">
            <text:p>2015-08-29T05:28: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codemis']">
            <text:p>['da1nerd', 'codemis']</text:p>
          </table:table-cell>
          <table:table-cell office:value-type="string" office:string-value="0">
            <text:p>0</text:p>
          </table:table-cell>
          <table:table-cell office:value-type="string" office:string-value="0">
            <text:p>0</text:p>
          </table:table-cell>
          <table:table-cell office:value-type="string" office:string-value="https://github.com/unfoldingWord-dev/uw-publisher">
            <text:p>https://github.com/unfoldingWord-dev/uw-publisher</text:p>
          </table:table-cell>
          <table:table-cell office:value-type="string" office:string-value="2016-08-30T09:37:59Z">
            <text:p>2016-08-30T09:37:5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uW-Tools-Collab">
            <text:p>uW-Tools-Collab</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2T15:52:46Z">
            <text:p>2025-09-12T15:52:46Z</text:p>
          </table:table-cell>
          <table:table-cell office:value-type="string" office:string-value="2025-09-12T15:52:46Z">
            <text:p>2025-09-12T15:52: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birchamp']">
            <text:p>['abelpz', 'birchamp']</text:p>
          </table:table-cell>
          <table:table-cell office:value-type="string" office:string-value="0">
            <text:p>0</text:p>
          </table:table-cell>
          <table:table-cell office:value-type="string" office:string-value="0">
            <text:p>0</text:p>
          </table:table-cell>
          <table:table-cell office:value-type="string" office:string-value="https://github.com/unfoldingWord/uW-Tools-Collab">
            <text:p>https://github.com/unfoldingWord/uW-Tools-Collab</text:p>
          </table:table-cell>
          <table:table-cell office:value-type="string" office:string-value="2025-09-12T15:52:50Z">
            <text:p>2025-09-12T15:52:50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uw_tools">
            <text:p>uw_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01:18:15Z">
            <text:p>2018-06-04T01:18:15Z</text:p>
          </table:table-cell>
          <table:table-cell office:value-type="string" office:string-value="2017-01-06T18:38:25Z">
            <text:p>2017-01-06T18:38: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Richard Mahn', 'richmahn']">
            <text:p>['phillip-hopper', 'Phil Hopper', 'Richard Mahn',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uw_tools">
            <text:p>https://github.com/unfoldingWord-dev/uw_tools</text:p>
          </table:table-cell>
          <table:table-cell office:value-type="string" office:string-value="2016-11-02T15:14:26Z">
            <text:p>2016-11-02T15:14:2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viewer-app-cordova">
            <text:p>viewer-app-cordova</text:p>
          </table:table-cell>
          <table:table-cell office:value-type="string" office:string-value="unfoldingWord-box3">
            <text:p>unfoldingWord-box3</text:p>
          </table:table-cell>
          <table:table-cell office:value-type="string" office:string-value="Objective-C">
            <text:p>Objective-C</text:p>
          </table:table-cell>
          <table:table-cell office:value-type="string" office:string-value="False">
            <text:p>False</text:p>
          </table:table-cell>
          <table:table-cell office:value-type="string" office:string-value="False">
            <text:p>False</text:p>
          </table:table-cell>
          <table:table-cell office:value-type="string" office:string-value="2022-11-09T09:01:35Z">
            <text:p>2022-11-09T09:01:35Z</text:p>
          </table:table-cell>
          <table:table-cell office:value-type="string" office:string-value="2022-11-09T09:01:35Z">
            <text:p>2022-11-09T09:01: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1">
            <text:p>1</text:p>
          </table:table-cell>
          <table:table-cell office:value-type="string" office:string-value="14">
            <text:p>14</text:p>
          </table:table-cell>
          <table:table-cell office:value-type="string" office:string-value="https://github.com/unfoldingWord-box3/viewer-app-cordova">
            <text:p>https://github.com/unfoldingWord-box3/viewer-app-cordova</text:p>
          </table:table-cell>
          <table:table-cell office:value-type="string" office:string-value="2022-11-09T09:01:40Z">
            <text:p>2022-11-09T09:01:40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wordmap-react-toolkit">
            <text:p>wordmap-react-toolki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7T10:58:07Z">
            <text:p>2023-01-07T10:58:07Z</text:p>
          </table:table-cell>
          <table:table-cell office:value-type="string" office:string-value="2019-11-07T08:12:31Z">
            <text:p>2019-11-07T08:12:31Z</text:p>
          </table:table-cell>
          <table:table-cell office:value-type="string" office:string-value="">
            <text:p/>
          </table:table-cell>
          <table:table-cell office:value-type="string" office:string-value="25">
            <text:p>25</text:p>
          </table:table-cell>
          <table:table-cell office:value-type="string" office:string-value="25">
            <text:p>25</text:p>
          </table:table-cell>
          <table:table-cell office:value-type="string" office:string-value="wordmap-react-toolkit">
            <text:p>wordmap-react-toolkit</text:p>
          </table:table-cell>
          <table:table-cell office:value-type="string" office:string-value="False">
            <text:p>False</text:p>
          </table:table-cell>
          <table:table-cell office:value-type="string" office:string-value="216">
            <text:p>216</text:p>
          </table:table-cell>
          <table:table-cell office:value-type="string" office:string-value="2019-11-07T08:13:01.981Z">
            <text:p>2019-11-07T08:13:01.981Z</text:p>
          </table:table-cell>
          <table:table-cell office:value-type="string" office:string-value="">
            <text:p/>
          </table:table-cell>
          <table:table-cell office:value-type="string" office:string-value="['wordmap', 'wordmap-lexer']">
            <text:p>['wordmap', 'wordmap-lexer']</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box3/wordmap-react-toolkit">
            <text:p>https://github.com/unfoldingWord-box3/wordmap-react-toolkit</text:p>
          </table:table-cell>
          <table:table-cell office:value-type="string" office:string-value="2022-06-17T15:47:04Z">
            <text:p>2022-06-17T15:47:0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216 downloads in the last year) and no detected local consumers.">
            <text:p>Package has low but nonzero npm usage (216 downloads in the last year) and no detected local consumers.</text:p>
          </table:table-cell>
        </table:table-row>
        <table:table-row>
          <table:table-cell office:value-type="string" office:string-value="wordmap-seed-app">
            <text:p>wordmap-seed-app</text:p>
          </table:table-cell>
          <table:table-cell office:value-type="string" office:string-value="unfoldingWord-box3">
            <text:p>unfoldingWord-box3</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3-02-23T22:52:06Z">
            <text:p>2023-02-23T22:52:06Z</text:p>
          </table:table-cell>
          <table:table-cell office:value-type="string" office:string-value="2023-02-23T22:52:03Z">
            <text:p>2023-02-23T22:52: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klappy', 'themikejr', 'bspidel']">
            <text:p>['jdejoode', 'klappy', 'themikejr', 'bspidel']</text:p>
          </table:table-cell>
          <table:table-cell office:value-type="string" office:string-value="0">
            <text:p>0</text:p>
          </table:table-cell>
          <table:table-cell office:value-type="string" office:string-value="0">
            <text:p>0</text:p>
          </table:table-cell>
          <table:table-cell office:value-type="string" office:string-value="https://github.com/unfoldingWord-box3/wordmap-seed-app">
            <text:p>https://github.com/unfoldingWord-box3/wordmap-seed-app</text:p>
          </table:table-cell>
          <table:table-cell office:value-type="string" office:string-value="2023-02-23T22:52:12Z">
            <text:p>2023-02-23T22:52:1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world-language-map-rcl">
            <text:p>world-language-map-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3T01:07:52Z">
            <text:p>2024-10-13T01:07:52Z</text:p>
          </table:table-cell>
          <table:table-cell office:value-type="string" office:string-value="2024-10-13T01:07:50Z">
            <text:p>2024-10-13T01:0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ld-language-map-rcl">
            <text:p>world-language-map-rcl</text:p>
          </table:table-cell>
          <table:table-cell office:value-type="string" office:string-value="False">
            <text:p>False</text:p>
          </table:table-cell>
          <table:table-cell office:value-type="string" office:string-value="102">
            <text:p>102</text:p>
          </table:table-cell>
          <table:table-cell office:value-type="string" office:string-value="2024-10-13T01:08:01.943Z">
            <text:p>2024-10-13T01:08:01.94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world-language-map-rcl">
            <text:p>https://github.com/unfoldingWord/world-language-map-rcl</text:p>
          </table:table-cell>
          <table:table-cell office:value-type="string" office:string-value="2024-10-13T01:07:56Z">
            <text:p>2024-10-13T01:07:5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102 downloads in the last year) and no detected local consumers.">
            <text:p>Package has low but nonzero npm usage (102 downloads in the last year) and no detected local consumers.</text:p>
          </table:table-cell>
        </table:table-row>
        <table:table-row>
          <table:table-cell office:value-type="string" office:string-value="avd-ar">
            <text:p>avd-ar</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2-23T03:29:23Z">
            <text:p>2016-02-23T03:29:23Z</text:p>
          </table:table-cell>
          <table:table-cell office:value-type="string" office:string-value="2016-02-23T03:29:20Z">
            <text:p>2016-02-23T03:29: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avd-ar">
            <text:p>https://github.com/unfoldingWord/avd-ar</text:p>
          </table:table-cell>
          <table:table-cell office:value-type="string" office:string-value="2023-01-28T16:52:17Z">
            <text:p>2023-01-28T16:52: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esign">
            <text:p>design</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10-03T16:24:06Z">
            <text:p>2016-10-03T16:24:06Z</text:p>
          </table:table-cell>
          <table:table-cell office:value-type="string" office:string-value="">
            <text:p/>
          </table:table-cell>
          <table:table-cell office:value-type="string" office:string-value="">
            <text:p/>
          </table:table-cell>
          <table:table-cell office:value-type="string" office:string-value="63">
            <text:p>6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design">
            <text:p>https://github.com/unfoldingWord-dev/design</text:p>
          </table:table-cell>
          <table:table-cell office:value-type="string" office:string-value="2023-01-28T16:19:08Z">
            <text:p>2023-01-28T16:19:0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iscourse-mermaid">
            <text:p>discourse-mermaid</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3-07-26T14:38:59Z">
            <text:p>2023-07-26T14:38:59Z</text:p>
          </table:table-cell>
          <table:table-cell office:value-type="string" office:string-value="2023-07-26T14:38:59Z">
            <text:p>2023-07-26T14:38:59Z</text:p>
          </table:table-cell>
          <table:table-cell office:value-type="string" office:string-value="">
            <text:p/>
          </table:table-cell>
          <table:table-cell office:value-type="string" office:string-value="4">
            <text:p>4</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rishabhlakhotia', 'jjaffeux']">
            <text:p>['jag3773', 'rishabhlakhotia', 'jjaffeux']</text:p>
          </table:table-cell>
          <table:table-cell office:value-type="string" office:string-value="0">
            <text:p>0</text:p>
          </table:table-cell>
          <table:table-cell office:value-type="string" office:string-value="0">
            <text:p>0</text:p>
          </table:table-cell>
          <table:table-cell office:value-type="string" office:string-value="https://github.com/unfoldingWord/discourse-mermaid">
            <text:p>https://github.com/unfoldingWord/discourse-mermaid</text:p>
          </table:table-cell>
          <table:table-cell office:value-type="string" office:string-value="2025-05-13T01:56:41Z">
            <text:p>2025-05-13T01:56:41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dokuwiki-slack-invite">
            <text:p>dokuwiki-slack-invite</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8-11-02T14:11:36Z">
            <text:p>2018-11-02T14:11:36Z</text:p>
          </table:table-cell>
          <table:table-cell office:value-type="string" office:string-value="2018-11-02T14:11:35Z">
            <text:p>2018-11-02T14:11: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tejMecka', 'jag3773', 'Matej Plavevski', 'Richard Mahn', 'Saksham-Katiyar', 'yvonnel098']">
            <text:p>['MatejMecka', 'jag3773', 'Matej Plavevski', 'Richard Mahn', 'Saksham-Katiyar', '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dokuwiki-slack-invite">
            <text:p>https://github.com/unfoldingWord-dev/dokuwiki-slack-invite</text:p>
          </table:table-cell>
          <table:table-cell office:value-type="string" office:string-value="2023-01-27T20:30:22Z">
            <text:p>2023-01-27T20:30:22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example_tool">
            <text:p>example_tool</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6-12-09T21:07:14Z">
            <text:p>2016-12-09T21:07:14Z</text:p>
          </table:table-cell>
          <table:table-cell office:value-type="string" office:string-value="2016-10-20T07:35:23Z">
            <text:p>2016-10-20T07:35: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xampleTool">
            <text:p>Example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text:p>['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example_tool">
            <text:p>https://github.com/unfoldingWord-dev/example_tool</text:p>
          </table:table-cell>
          <table:table-cell office:value-type="string" office:string-value="2023-01-28T16:52:06Z">
            <text:p>2023-01-28T16:52:06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md-exports">
            <text:p>md-exports</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4-06-16T18:55:44Z">
            <text:p>2014-06-16T18:55:44Z</text:p>
          </table:table-cell>
          <table:table-cell office:value-type="string" office:string-value="2014-06-16T18:55:35Z">
            <text:p>2014-06-16T18:55: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dev/md-exports">
            <text:p>https://github.com/unfoldingWord-dev/md-exports</text:p>
          </table:table-cell>
          <table:table-cell office:value-type="string" office:string-value="2023-01-28T16:19:07Z">
            <text:p>2023-01-28T16:19:0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MediaWiki-USFMTag">
            <text:p>MediaWiki-USFMTag</text:p>
          </table:table-cell>
          <table:table-cell office:value-type="string" office:string-value="unfoldingWord">
            <text:p>unfoldingWord</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3-07-10T19:23:35Z">
            <text:p>2013-07-10T19:23:35Z</text:p>
          </table:table-cell>
          <table:table-cell office:value-type="string" office:string-value="2013-07-10T19:23:26Z">
            <text:p>2013-07-10T19:23:26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Door43']">
            <text:p>['Distant Shores Media', 'Door43']</text:p>
          </table:table-cell>
          <table:table-cell office:value-type="string" office:string-value="0">
            <text:p>0</text:p>
          </table:table-cell>
          <table:table-cell office:value-type="string" office:string-value="0">
            <text:p>0</text:p>
          </table:table-cell>
          <table:table-cell office:value-type="string" office:string-value="https://github.com/unfoldingWord/MediaWiki-USFMTag">
            <text:p>https://github.com/unfoldingWord/MediaWiki-USFMTag</text:p>
          </table:table-cell>
          <table:table-cell office:value-type="string" office:string-value="2026-02-23T14:45:18Z">
            <text:p>2026-02-23T14:45:1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MultiplatformFrameworks">
            <text:p>MultiplatformFrameworks</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11-10T17:20:33Z">
            <text:p>2022-11-10T17:20:33Z</text:p>
          </table:table-cell>
          <table:table-cell office:value-type="string" office:string-value="2020-03-16T14:26:24Z">
            <text:p>2020-03-16T14:26:24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MultiplatformFrameworks">
            <text:p>https://github.com/unfoldingWord-box3/MultiplatformFrameworks</text:p>
          </table:table-cell>
          <table:table-cell office:value-type="string" office:string-value="2025-12-03T19:52:51Z">
            <text:p>2025-12-03T19:52:51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nagios_plugins">
            <text:p>nagios_plugins</text:p>
          </table:table-cell>
          <table:table-cell office:value-type="string" office:string-value="unfoldingWord-dev">
            <text:p>unfoldingWord-dev</text:p>
          </table:table-cell>
          <table:table-cell office:value-type="string" office:string-value="Shell">
            <text:p>Shell</text:p>
          </table:table-cell>
          <table:table-cell office:value-type="string" office:string-value="True">
            <text:p>True</text:p>
          </table:table-cell>
          <table:table-cell office:value-type="string" office:string-value="False">
            <text:p>False</text:p>
          </table:table-cell>
          <table:table-cell office:value-type="string" office:string-value="2019-05-09T13:39:46Z">
            <text:p>2019-05-09T13:39:46Z</text:p>
          </table:table-cell>
          <table:table-cell office:value-type="string" office:string-value="2019-05-09T13:39:39Z">
            <text:p>2019-05-09T13:39: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Jesse A. Griffin', 'jpetitt1', 'root']">
            <text:p>['jag3773', 'Jesse A. Griffin', 'jpetitt1', 'root']</text:p>
          </table:table-cell>
          <table:table-cell office:value-type="string" office:string-value="0">
            <text:p>0</text:p>
          </table:table-cell>
          <table:table-cell office:value-type="string" office:string-value="0">
            <text:p>0</text:p>
          </table:table-cell>
          <table:table-cell office:value-type="string" office:string-value="https://github.com/unfoldingWord-dev/nagios_plugins">
            <text:p>https://github.com/unfoldingWord-dev/nagios_plugins</text:p>
          </table:table-cell>
          <table:table-cell office:value-type="string" office:string-value="2023-01-28T16:19:07Z">
            <text:p>2023-01-28T16:19:0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am">
            <text:p>obs-am</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0Z">
            <text:p>2016-01-14T23:50:50Z</text:p>
          </table:table-cell>
          <table:table-cell office:value-type="string" office:string-value="2016-01-14T23:50:48Z">
            <text:p>2016-01-14T23:50: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am">
            <text:p>https://github.com/unfoldingWord/obs-am</text:p>
          </table:table-cell>
          <table:table-cell office:value-type="string" office:string-value="2023-01-28T16:58:17Z">
            <text:p>2023-01-28T16:58: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Android">
            <text:p>OBS-Android</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3:21Z">
            <text:p>2013-07-11T18:03:21Z</text:p>
          </table:table-cell>
          <table:table-cell office:value-type="string" office:string-value="2013-07-11T18:03:21Z">
            <text:p>2013-07-11T18:03: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https://github.com/unfoldingWord-dev/OBS-Android">
            <text:p>https://github.com/unfoldingWord-dev/OBS-Android</text:p>
          </table:table-cell>
          <table:table-cell office:value-type="string" office:string-value="2023-01-28T16:19:06Z">
            <text:p>2023-01-28T16:19:06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bn">
            <text:p>obs-bn</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5Z">
            <text:p>2016-01-14T23:51:05Z</text:p>
          </table:table-cell>
          <table:table-cell office:value-type="string" office:string-value="2016-01-14T23:51:03Z">
            <text:p>2016-01-14T23:51: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bn">
            <text:p>https://github.com/unfoldingWord/obs-bn</text:p>
          </table:table-cell>
          <table:table-cell office:value-type="string" office:string-value="2023-01-28T16:58:17Z">
            <text:p>2023-01-28T16:58: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ceb">
            <text:p>obs-ceb</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5-10T14:40:53Z">
            <text:p>2016-05-10T14:40:53Z</text:p>
          </table:table-cell>
          <table:table-cell office:value-type="string" office:string-value="2016-05-10T14:40:44Z">
            <text:p>2016-05-10T14:40: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ceb">
            <text:p>https://github.com/unfoldingWord/obs-ceb</text:p>
          </table:table-cell>
          <table:table-cell office:value-type="string" office:string-value="2023-01-28T16:58:18Z">
            <text:p>2023-01-28T16:58:1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en">
            <text:p>obs-en</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7Z">
            <text:p>2016-01-14T23:50:47Z</text:p>
          </table:table-cell>
          <table:table-cell office:value-type="string" office:string-value="2016-01-14T23:50:45Z">
            <text:p>2016-01-14T23:50:4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esse A. Griffin']">
            <text:p>['root', 'Jesse A. Griffin']</text:p>
          </table:table-cell>
          <table:table-cell office:value-type="string" office:string-value="0">
            <text:p>0</text:p>
          </table:table-cell>
          <table:table-cell office:value-type="string" office:string-value="0">
            <text:p>0</text:p>
          </table:table-cell>
          <table:table-cell office:value-type="string" office:string-value="https://github.com/unfoldingWord/obs-en">
            <text:p>https://github.com/unfoldingWord/obs-en</text:p>
          </table:table-cell>
          <table:table-cell office:value-type="string" office:string-value="2023-01-28T16:58:28Z">
            <text:p>2023-01-28T16:58:2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es">
            <text:p>obs-es</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5Z">
            <text:p>2016-01-14T23:50:45Z</text:p>
          </table:table-cell>
          <table:table-cell office:value-type="string" office:string-value="2016-01-14T23:50:43Z">
            <text:p>2016-01-14T23:50:4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obs-es">
            <text:p>https://github.com/unfoldingWord/obs-es</text:p>
          </table:table-cell>
          <table:table-cell office:value-type="string" office:string-value="2023-01-28T16:58:16Z">
            <text:p>2023-01-28T16:58:16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es-419">
            <text:p>obs-es-419</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7-25T15:51:01Z">
            <text:p>2016-07-25T15:51:01Z</text:p>
          </table:table-cell>
          <table:table-cell office:value-type="string" office:string-value="2016-07-25T15:50:59Z">
            <text:p>2016-07-25T15:5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es-419">
            <text:p>https://github.com/unfoldingWord/obs-es-419</text:p>
          </table:table-cell>
          <table:table-cell office:value-type="string" office:string-value="2023-01-28T16:58:18Z">
            <text:p>2023-01-28T16:58:1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fa">
            <text:p>obs-f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6-15T12:49:15Z">
            <text:p>2016-06-15T12:49:15Z</text:p>
          </table:table-cell>
          <table:table-cell office:value-type="string" office:string-value="2016-06-15T12:49:01Z">
            <text:p>2016-06-15T12: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fa">
            <text:p>https://github.com/unfoldingWord/obs-fa</text:p>
          </table:table-cell>
          <table:table-cell office:value-type="string" office:string-value="2023-01-28T16:58:16Z">
            <text:p>2023-01-28T16:58:16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fr">
            <text:p>obs-f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0T14:38:11Z">
            <text:p>2016-05-10T14:38:11Z</text:p>
          </table:table-cell>
          <table:table-cell office:value-type="string" office:string-value="2016-05-10T14:37:59Z">
            <text:p>2016-05-10T14:37: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fr">
            <text:p>https://github.com/unfoldingWord/obs-fr</text:p>
          </table:table-cell>
          <table:table-cell office:value-type="string" office:string-value="2023-01-28T16:58:17Z">
            <text:p>2023-01-28T16:58: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gaj-x-ymnk">
            <text:p>obs-gaj-x-ymnk</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10:27Z">
            <text:p>2016-07-27T12:10:27Z</text:p>
          </table:table-cell>
          <table:table-cell office:value-type="string" office:string-value="2016-07-27T12:10:17Z">
            <text:p>2016-07-27T12:10:1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aj-x-ymnk">
            <text:p>https://github.com/unfoldingWord/obs-gaj-x-ymnk</text:p>
          </table:table-cell>
          <table:table-cell office:value-type="string" office:string-value="2023-01-28T16:58:19Z">
            <text:p>2023-01-28T16:58:19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gof">
            <text:p>obs-gof</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10T14:48:23Z">
            <text:p>2016-05-10T14:48:23Z</text:p>
          </table:table-cell>
          <table:table-cell office:value-type="string" office:string-value="2016-05-10T14:30:12Z">
            <text:p>2016-05-10T14:30:1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of">
            <text:p>https://github.com/unfoldingWord/obs-gof</text:p>
          </table:table-cell>
          <table:table-cell office:value-type="string" office:string-value="2023-01-28T16:58:18Z">
            <text:p>2023-01-28T16:58:1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gu">
            <text:p>obs-gu</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4Z">
            <text:p>2016-01-14T23:51:14Z</text:p>
          </table:table-cell>
          <table:table-cell office:value-type="string" office:string-value="2016-01-14T23:51:12Z">
            <text:p>2016-01-14T23:51:1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u">
            <text:p>https://github.com/unfoldingWord/obs-gu</text:p>
          </table:table-cell>
          <table:table-cell office:value-type="string" office:string-value="2023-01-28T16:58:22Z">
            <text:p>2023-01-28T16:58:22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ha">
            <text:p>obs-h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1Z">
            <text:p>2016-01-14T23:51:21Z</text:p>
          </table:table-cell>
          <table:table-cell office:value-type="string" office:string-value="2016-01-14T23:51:19Z">
            <text:p>2016-01-14T23:51: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a">
            <text:p>https://github.com/unfoldingWord/obs-ha</text:p>
          </table:table-cell>
          <table:table-cell office:value-type="string" office:string-value="2023-01-28T16:58:28Z">
            <text:p>2023-01-28T16:58:2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hi">
            <text:p>obs-h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2Z">
            <text:p>2016-01-14T23:51:12Z</text:p>
          </table:table-cell>
          <table:table-cell office:value-type="string" office:string-value="2016-01-14T23:51:09Z">
            <text:p>2016-01-14T23:51: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i">
            <text:p>https://github.com/unfoldingWord/obs-hi</text:p>
          </table:table-cell>
          <table:table-cell office:value-type="string" office:string-value="2023-01-28T16:58:18Z">
            <text:p>2023-01-28T16:58:1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hmr">
            <text:p>obs-hmr</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09:22Z">
            <text:p>2016-07-27T12:09:22Z</text:p>
          </table:table-cell>
          <table:table-cell office:value-type="string" office:string-value="2016-07-27T12:08:31Z">
            <text:p>2016-07-27T12:08:3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mr">
            <text:p>https://github.com/unfoldingWord/obs-hmr</text:p>
          </table:table-cell>
          <table:table-cell office:value-type="string" office:string-value="2023-01-28T16:58:18Z">
            <text:p>2023-01-28T16:58:1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hu">
            <text:p>obs-hu</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8T19:53:08Z">
            <text:p>2016-07-28T19:53:08Z</text:p>
          </table:table-cell>
          <table:table-cell office:value-type="string" office:string-value="2016-07-28T19:52:13Z">
            <text:p>2016-07-28T19:52: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u">
            <text:p>https://github.com/unfoldingWord/obs-hu</text:p>
          </table:table-cell>
          <table:table-cell office:value-type="string" office:string-value="2023-01-28T16:58:19Z">
            <text:p>2023-01-28T16:58:19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iOS">
            <text:p>OBS-iOS</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5:53Z">
            <text:p>2013-07-11T18:05:53Z</text:p>
          </table:table-cell>
          <table:table-cell office:value-type="string" office:string-value="2013-07-11T18:05:53Z">
            <text:p>2013-07-11T18:05: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https://github.com/unfoldingWord-dev/OBS-iOS">
            <text:p>https://github.com/unfoldingWord-dev/OBS-iOS</text:p>
          </table:table-cell>
          <table:table-cell office:value-type="string" office:string-value="2023-01-28T16:19:06Z">
            <text:p>2023-01-28T16:19:06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lpx">
            <text:p>obs-lpx</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28T19:45:10Z">
            <text:p>2016-05-28T19:45:10Z</text:p>
          </table:table-cell>
          <table:table-cell office:value-type="string" office:string-value="2016-05-28T19:44:44Z">
            <text:p>2016-05-28T19:44: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root']">
            <text:p>['Phil Hopper', 'root']</text:p>
          </table:table-cell>
          <table:table-cell office:value-type="string" office:string-value="0">
            <text:p>0</text:p>
          </table:table-cell>
          <table:table-cell office:value-type="string" office:string-value="0">
            <text:p>0</text:p>
          </table:table-cell>
          <table:table-cell office:value-type="string" office:string-value="https://github.com/unfoldingWord/obs-lpx">
            <text:p>https://github.com/unfoldingWord/obs-lpx</text:p>
          </table:table-cell>
          <table:table-cell office:value-type="string" office:string-value="2023-01-28T16:58:22Z">
            <text:p>2023-01-28T16:58:22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mr">
            <text:p>obs-m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6Z">
            <text:p>2016-01-14T23:51:06Z</text:p>
          </table:table-cell>
          <table:table-cell office:value-type="string" office:string-value="2016-01-14T23:51:05Z">
            <text:p>2016-01-14T23:51: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mr">
            <text:p>https://github.com/unfoldingWord/obs-mr</text:p>
          </table:table-cell>
          <table:table-cell office:value-type="string" office:string-value="2023-01-28T16:58:18Z">
            <text:p>2023-01-28T16:58:1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ne">
            <text:p>obs-ne</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33Z">
            <text:p>2016-01-22T20:24:33Z</text:p>
          </table:table-cell>
          <table:table-cell office:value-type="string" office:string-value="2016-01-22T20:24:30Z">
            <text:p>2016-01-22T20:24: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ne">
            <text:p>https://github.com/unfoldingWord/obs-ne</text:p>
          </table:table-cell>
          <table:table-cell office:value-type="string" office:string-value="2023-01-28T16:58:18Z">
            <text:p>2023-01-28T16:58:1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or">
            <text:p>obs-o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2Z">
            <text:p>2016-01-14T23:51:02Z</text:p>
          </table:table-cell>
          <table:table-cell office:value-type="string" office:string-value="2016-01-14T23:51:00Z">
            <text:p>2016-01-14T23:51: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or">
            <text:p>https://github.com/unfoldingWord/obs-or</text:p>
          </table:table-cell>
          <table:table-cell office:value-type="string" office:string-value="2023-01-28T16:58:21Z">
            <text:p>2023-01-28T16:58:21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pa">
            <text:p>obs-p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8Z">
            <text:p>2016-01-14T23:51:08Z</text:p>
          </table:table-cell>
          <table:table-cell office:value-type="string" office:string-value="2016-01-14T23:51:07Z">
            <text:p>2016-01-14T23:51: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pa">
            <text:p>https://github.com/unfoldingWord/obs-pa</text:p>
          </table:table-cell>
          <table:table-cell office:value-type="string" office:string-value="2023-01-28T16:58:17Z">
            <text:p>2023-01-28T16:58: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pdf">
            <text:p>obs-pdf</text:p>
          </table:table-cell>
          <table:table-cell office:value-type="string" office:string-value="unfoldingWord">
            <text:p>unfoldingWord</text:p>
          </table:table-cell>
          <table:table-cell office:value-type="string" office:string-value="TeX">
            <text:p>TeX</text:p>
          </table:table-cell>
          <table:table-cell office:value-type="string" office:string-value="True">
            <text:p>True</text:p>
          </table:table-cell>
          <table:table-cell office:value-type="string" office:string-value="False">
            <text:p>False</text:p>
          </table:table-cell>
          <table:table-cell office:value-type="string" office:string-value="2024-06-05T21:37:29Z">
            <text:p>2024-06-05T21:37:29Z</text:p>
          </table:table-cell>
          <table:table-cell office:value-type="string" office:string-value="2020-07-01T09:33:35Z">
            <text:p>2020-07-01T09:33:35Z</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phillip-hopper', 'Phil Hopper']">
            <text:p>['RobH123', '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obs-pdf">
            <text:p>https://github.com/unfoldingWord/obs-pdf</text:p>
          </table:table-cell>
          <table:table-cell office:value-type="string" office:string-value="2025-09-09T09:10:04Z">
            <text:p>2025-09-09T09:10:04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pt-br">
            <text:p>obs-pt-b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3Z">
            <text:p>2016-01-14T23:50:43Z</text:p>
          </table:table-cell>
          <table:table-cell office:value-type="string" office:string-value="2016-01-14T23:50:41Z">
            <text:p>2016-01-14T23:50: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pt-br">
            <text:p>https://github.com/unfoldingWord/obs-pt-br</text:p>
          </table:table-cell>
          <table:table-cell office:value-type="string" office:string-value="2023-01-28T16:58:17Z">
            <text:p>2023-01-28T16:58: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ru">
            <text:p>obs-ru</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2T17:49:13Z">
            <text:p>2016-05-12T17:49:13Z</text:p>
          </table:table-cell>
          <table:table-cell office:value-type="string" office:string-value="2016-05-12T17:49:07Z">
            <text:p>2016-05-12T17:49: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esse A. Griffin', 'phillip-hopper']">
            <text:p>['root', 'Jesse A. Griffin',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obs-ru">
            <text:p>https://github.com/unfoldingWord/obs-ru</text:p>
          </table:table-cell>
          <table:table-cell office:value-type="string" office:string-value="2023-01-28T16:58:28Z">
            <text:p>2023-01-28T16:58:2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sgj">
            <text:p>obs-sgj</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8Z">
            <text:p>2016-01-14T23:50:58Z</text:p>
          </table:table-cell>
          <table:table-cell office:value-type="string" office:string-value="2016-01-14T23:50:56Z">
            <text:p>2016-01-14T23:50: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sgj">
            <text:p>https://github.com/unfoldingWord/obs-sgj</text:p>
          </table:table-cell>
          <table:table-cell office:value-type="string" office:string-value="2023-01-28T17:00:18Z">
            <text:p>2023-01-28T17:00:1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tdj">
            <text:p>obs-tdj</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14T21:55:14Z">
            <text:p>2017-03-14T21:55:14Z</text:p>
          </table:table-cell>
          <table:table-cell office:value-type="string" office:string-value="2017-03-14T21:55:02Z">
            <text:p>2017-03-14T21:55: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tdj">
            <text:p>https://github.com/unfoldingWord/obs-tdj</text:p>
          </table:table-cell>
          <table:table-cell office:value-type="string" office:string-value="2023-01-28T16:58:19Z">
            <text:p>2023-01-28T16:58:19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tl">
            <text:p>obs-tl</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7T15:40:18Z">
            <text:p>2016-07-27T15:40:1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obs-tl">
            <text:p>https://github.com/unfoldingWord/obs-tl</text:p>
          </table:table-cell>
          <table:table-cell office:value-type="string" office:string-value="2023-01-28T16:58:19Z">
            <text:p>2023-01-28T16:58:19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tpi">
            <text:p>obs-tp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0Z">
            <text:p>2016-01-14T23:51:00Z</text:p>
          </table:table-cell>
          <table:table-cell office:value-type="string" office:string-value="2016-01-14T23:50:58Z">
            <text:p>2016-01-14T23:50: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tpi">
            <text:p>https://github.com/unfoldingWord/obs-tpi</text:p>
          </table:table-cell>
          <table:table-cell office:value-type="string" office:string-value="2023-01-28T16:58:17Z">
            <text:p>2023-01-28T16:58: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tr">
            <text:p>obs-t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24T15:53:38Z">
            <text:p>2016-05-24T15:53:38Z</text:p>
          </table:table-cell>
          <table:table-cell office:value-type="string" office:string-value="2016-05-24T15:53:02Z">
            <text:p>2016-05-24T15:53: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phillip-hopper']">
            <text:p>['root',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obs-tr">
            <text:p>https://github.com/unfoldingWord/obs-tr</text:p>
          </table:table-cell>
          <table:table-cell office:value-type="string" office:string-value="2023-01-28T16:58:17Z">
            <text:p>2023-01-28T16:58: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Translation-App">
            <text:p>OBS-Translation-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6-08-31T14:37:46Z">
            <text:p>2016-08-31T14:37:46Z</text:p>
          </table:table-cell>
          <table:table-cell office:value-type="string" office:string-value="2014-06-02T15:19:24Z">
            <text:p>2014-06-02T15:19: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BoronNeotreks', 'jag3773', 'Tim', 'Distant Shores Media', 'yvonnel098']">
            <text:p>['MBoronNeotreks', 'jag3773', 'Tim', 'Distant Shores Media', '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OBS-Translation-App">
            <text:p>https://github.com/unfoldingWord-dev/OBS-Translation-App</text:p>
          </table:table-cell>
          <table:table-cell office:value-type="string" office:string-value="2023-01-28T16:19:07Z">
            <text:p>2023-01-28T16:19:0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ur">
            <text:p>obs-u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26Z">
            <text:p>2016-01-22T20:24:26Z</text:p>
          </table:table-cell>
          <table:table-cell office:value-type="string" office:string-value="2016-01-22T20:24:25Z">
            <text:p>2016-01-22T20:24: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ur">
            <text:p>https://github.com/unfoldingWord/obs-ur</text:p>
          </table:table-cell>
          <table:table-cell office:value-type="string" office:string-value="2023-01-28T16:58:22Z">
            <text:p>2023-01-28T16:58:22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bs-vi">
            <text:p>obs-v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3Z">
            <text:p>2016-01-14T23:51:23Z</text:p>
          </table:table-cell>
          <table:table-cell office:value-type="string" office:string-value="2016-01-14T23:51:21Z">
            <text:p>2016-01-14T23:51: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vi">
            <text:p>https://github.com/unfoldingWord/obs-vi</text:p>
          </table:table-cell>
          <table:table-cell office:value-type="string" office:string-value="2023-01-28T16:58:18Z">
            <text:p>2023-01-28T16:58:1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ld-tx-manager">
            <text:p>old-tx-manag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0-20T01:23:03Z">
            <text:p>2016-10-20T01:23:03Z</text:p>
          </table:table-cell>
          <table:table-cell office:value-type="string" office:string-value="2016-10-20T01:23:03Z">
            <text:p>2016-10-20T01:23:0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ethantkoenig', 'Phil Hopper']">
            <text:p>['Richard Mahn', 'ethantkoenig',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ld-tx-manager">
            <text:p>https://github.com/unfoldingWord-dev/old-tx-manager</text:p>
          </table:table-cell>
          <table:table-cell office:value-type="string" office:string-value="2023-01-28T16:19:08Z">
            <text:p>2023-01-28T16:19:0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orthography-app-BE">
            <text:p>orthography-app-B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4-08-06T11:57:29Z">
            <text:p>2024-08-06T11:57:29Z</text:p>
          </table:table-cell>
          <table:table-cell office:value-type="string" office:string-value="2024-08-06T11:57:27Z">
            <text:p>2024-08-06T11:57: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rthoapp_poc">
            <text:p>orthoapp_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Stephen0272']">
            <text:p>['yakob-aleksandrovich', 'Stephen0272']</text:p>
          </table:table-cell>
          <table:table-cell office:value-type="string" office:string-value="0">
            <text:p>0</text:p>
          </table:table-cell>
          <table:table-cell office:value-type="string" office:string-value="0">
            <text:p>0</text:p>
          </table:table-cell>
          <table:table-cell office:value-type="string" office:string-value="https://github.com/unfoldingWord/orthography-app-BE">
            <text:p>https://github.com/unfoldingWord/orthography-app-BE</text:p>
          </table:table-cell>
          <table:table-cell office:value-type="string" office:string-value="2026-04-16T08:07:38Z">
            <text:p>2026-04-16T08:07:3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orthography-app-FE">
            <text:p>orthography-app-FE</text:p>
          </table:table-cell>
          <table:table-cell office:value-type="string" office:string-value="unfoldingWord">
            <text:p>unfoldingWord</text:p>
          </table:table-cell>
          <table:table-cell office:value-type="string" office:string-value="Dart">
            <text:p>Dart</text:p>
          </table:table-cell>
          <table:table-cell office:value-type="string" office:string-value="True">
            <text:p>True</text:p>
          </table:table-cell>
          <table:table-cell office:value-type="string" office:string-value="False">
            <text:p>False</text:p>
          </table:table-cell>
          <table:table-cell office:value-type="string" office:string-value="2024-06-05T10:56:02Z">
            <text:p>2024-06-05T10:56:02Z</text:p>
          </table:table-cell>
          <table:table-cell office:value-type="string" office:string-value="2024-06-05T10:55:54Z">
            <text:p>2024-06-05T10:55: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ephen0272">
            <text:p>Stephen0272</text:p>
          </table:table-cell>
          <table:table-cell office:value-type="string" office:string-value="0">
            <text:p>0</text:p>
          </table:table-cell>
          <table:table-cell office:value-type="string" office:string-value="0">
            <text:p>0</text:p>
          </table:table-cell>
          <table:table-cell office:value-type="string" office:string-value="https://github.com/unfoldingWord/orthography-app-FE">
            <text:p>https://github.com/unfoldingWord/orthography-app-FE</text:p>
          </table:table-cell>
          <table:table-cell office:value-type="string" office:string-value="2026-04-16T08:08:11Z">
            <text:p>2026-04-16T08:08:11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proposed_changes_module">
            <text:p>proposed_changes_modul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13Z">
            <text:p>2017-04-13T00:19:13Z</text:p>
          </table:table-cell>
          <table:table-cell office:value-type="string" office:string-value="2017-03-13T15:22:06Z">
            <text:p>2017-03-13T15:22: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roposedChanges">
            <text:p>ProposedChan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proposed_changes_module">
            <text:p>https://github.com/unfoldingWord-dev/proposed_changes_module</text:p>
          </table:table-cell>
          <table:table-cell office:value-type="string" office:string-value="2023-01-28T16:19:09Z">
            <text:p>2023-01-28T16:19:09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pub.distantshores.org">
            <text:p>pub.distantshores.org</text:p>
          </table:table-cell>
          <table:table-cell office:value-type="string" office:string-value="unfoldingWord-dev">
            <text:p>unfoldingWord-dev</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7-10-01T22:50:31Z">
            <text:p>2017-10-01T22:50:31Z</text:p>
          </table:table-cell>
          <table:table-cell office:value-type="string" office:string-value="2017-10-01T22:48:41Z">
            <text:p>2017-10-01T22:48: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pub.distantshores.org">
            <text:p>https://github.com/unfoldingWord-dev/pub.distantshores.org</text:p>
          </table:table-cell>
          <table:table-cell office:value-type="string" office:string-value="2023-01-28T16:19:09Z">
            <text:p>2023-01-28T16:19:09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submachine">
            <text:p>submachine</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5-02-17T18:57:00Z">
            <text:p>2025-02-17T18:57:00Z</text:p>
          </table:table-cell>
          <table:table-cell office:value-type="string" office:string-value="2025-02-17T18:56:56Z">
            <text:p>2025-02-17T18:56: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submachine">
            <text:p>https://github.com/unfoldingWord-dev/submachine</text:p>
          </table:table-cell>
          <table:table-cell office:value-type="string" office:string-value="2025-10-28T15:18:59Z">
            <text:p>2025-10-28T15:18:59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d">
            <text:p>td</text:p>
          </table:table-cell>
          <table:table-cell office:value-type="string" office:string-value="unfoldingWord-box3">
            <text:p>unfoldingWord-box3</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9-09-17T14:39:19Z">
            <text:p>2019-09-17T14:39:19Z</text:p>
          </table:table-cell>
          <table:table-cell office:value-type="string" office:string-value="2019-09-17T14:39:18Z">
            <text:p>2019-09-17T14:39:18Z</text:p>
          </table:table-cell>
          <table:table-cell office:value-type="string" office:string-value="">
            <text:p/>
          </table:table-cell>
          <table:table-cell office:value-type="string" office:string-value="20">
            <text:p>2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jag3773', 'Tim J']">
            <text:p>['mandolyte', 'jag3773', 'Tim J']</text:p>
          </table:table-cell>
          <table:table-cell office:value-type="string" office:string-value="0">
            <text:p>0</text:p>
          </table:table-cell>
          <table:table-cell office:value-type="string" office:string-value="0">
            <text:p>0</text:p>
          </table:table-cell>
          <table:table-cell office:value-type="string" office:string-value="https://github.com/unfoldingWord-box3/td">
            <text:p>https://github.com/unfoldingWord-box3/td</text:p>
          </table:table-cell>
          <table:table-cell office:value-type="string" office:string-value="2023-12-05T16:03:25Z">
            <text:p>2023-12-05T16:03:25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heCompassionateFatherApp">
            <text:p>TheCompassionateFather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1-04-27T22:43:14Z">
            <text:p>2011-04-27T22:43:14Z</text:p>
          </table:table-cell>
          <table:table-cell office:value-type="string" office:string-value="2011-04-27T22:42:54Z">
            <text:p>2011-04-27T22:42:5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SM', 'DSM Mobile', 'Tim Jore']">
            <text:p>['DSM', 'DSM Mobile', 'Tim Jore']</text:p>
          </table:table-cell>
          <table:table-cell office:value-type="string" office:string-value="0">
            <text:p>0</text:p>
          </table:table-cell>
          <table:table-cell office:value-type="string" office:string-value="0">
            <text:p>0</text:p>
          </table:table-cell>
          <table:table-cell office:value-type="string" office:string-value="https://github.com/unfoldingWord-dev/TheCompassionateFatherApp">
            <text:p>https://github.com/unfoldingWord-dev/TheCompassionateFatherApp</text:p>
          </table:table-cell>
          <table:table-cell office:value-type="string" office:string-value="2023-01-28T16:19:06Z">
            <text:p>2023-01-28T16:19:06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ranslation_academy">
            <text:p>translation_academy</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24Z">
            <text:p>2017-04-13T00:19:24Z</text:p>
          </table:table-cell>
          <table:table-cell office:value-type="string" office:string-value="2017-03-14T20:52:36Z">
            <text:p>2017-03-14T20:52: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Academy">
            <text:p>TranslationAcadem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klappy']">
            <text:p>['ihoegen', 'Sterling (Jay) Scott', '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_academy">
            <text:p>https://github.com/unfoldingWord-dev/translation_academy</text:p>
          </table:table-cell>
          <table:table-cell office:value-type="string" office:string-value="2023-01-28T16:19:09Z">
            <text:p>2023-01-28T16:19:09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translationDatabaseWeb">
            <text:p>translationDatabaseWeb</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3-06-06T12:28:28Z">
            <text:p>2023-06-06T12:28:28Z</text:p>
          </table:table-cell>
          <table:table-cell office:value-type="string" office:string-value="2023-06-06T12:28:28Z">
            <text:p>2023-06-06T12:28:28Z</text:p>
          </table:table-cell>
          <table:table-cell office:value-type="string" office:string-value="">
            <text:p/>
          </table:table-cell>
          <table:table-cell office:value-type="string" office:string-value="150">
            <text:p>15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leong2332', 'paltman', 'swilcox', 'Vicky Leong', 'cdaield', 'jacobwegner', 'phillip-hopper', 'smcoll', 'rbnswartz', 'Phil Hopper', 'RobH123', 'yakob-aleksandrovich', 'jag3773']">
            <text:p>['vleong2332', 'paltman', 'swilcox', 'Vicky Leong', 'cdaield', 'jacobwegner', 'phillip-hopper', 'smcoll', 'rbnswartz', 'Phil Hopper', 'RobH123',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DatabaseWeb">
            <text:p>https://github.com/unfoldingWord-dev/translationDatabaseWeb</text:p>
          </table:table-cell>
          <table:table-cell office:value-type="string" office:string-value="2023-12-05T16:16:56Z">
            <text:p>2023-12-05T16:16:56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ranslationdb-tools">
            <text:p>translationdb-tools</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5-06-23T21:33:38Z">
            <text:p>2015-06-23T21:33:38Z</text:p>
          </table:table-cell>
          <table:table-cell office:value-type="string" office:string-value="2015-06-23T21:33:37Z">
            <text:p>2015-06-23T21:33: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ve Pearce', 'jag3773']">
            <text:p>['Dave Pearce',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db-tools">
            <text:p>https://github.com/unfoldingWord-dev/translationdb-tools</text:p>
          </table:table-cell>
          <table:table-cell office:value-type="string" office:string-value="2023-01-28T16:19:07Z">
            <text:p>2023-01-28T16:19:0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ranslationHelps">
            <text:p>translationHelps</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3-12T17:46:51Z">
            <text:p>2018-03-12T17:46:51Z</text:p>
          </table:table-cell>
          <table:table-cell office:value-type="string" office:string-value="2018-03-12T17:46:50Z">
            <text:p>2018-03-12T17:46: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EllDoubleYew', 'Richard Mahn', 'klappy', 'ihoegen', 'cdwhitfield73', 'RoyalSix', 'da1nerd', 'Sterling (Jay) Scott', 'Audrey Mahn', 'PhotoNomad0']">
            <text:p>['mannycolon', 'EllDoubleYew', 'Richard Mahn', 'klappy', 'ihoegen', 'cdwhitfield73', 'RoyalSix', 'da1nerd', 'Sterling (Jay) Scott', 'Audrey Mahn',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Helps">
            <text:p>https://github.com/unfoldingWord-dev/translationHelps</text:p>
          </table:table-cell>
          <table:table-cell office:value-type="string" office:string-value="2023-01-28T16:52:06Z">
            <text:p>2023-01-28T16:52:06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translationKeyboard">
            <text:p>translationKeyboard</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8-06-08T15:50:17Z">
            <text:p>2018-06-08T15:50:17Z</text:p>
          </table:table-cell>
          <table:table-cell office:value-type="string" office:string-value="2018-06-08T15:49:12Z">
            <text:p>2018-06-08T15:49:12Z</text:p>
          </table:table-cell>
          <table:table-cell office:value-type="string" office:string-value="2018-06-08T15:50:17Z">
            <text:p>2018-06-08T15:50:17Z</text:p>
          </table:table-cell>
          <table:table-cell office:value-type="string" office:string-value="10">
            <text:p>1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24">
            <text:p>24</text:p>
          </table:table-cell>
          <table:table-cell office:value-type="string" office:string-value="729">
            <text:p>729</text:p>
          </table:table-cell>
          <table:table-cell office:value-type="string" office:string-value="https://github.com/unfoldingWord-dev/translationKeyboard">
            <text:p>https://github.com/unfoldingWord-dev/translationKeyboard</text:p>
          </table:table-cell>
          <table:table-cell office:value-type="string" office:string-value="2024-03-11T22:35:12Z">
            <text:p>2024-03-11T22:35:12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ranslationKeyboardWeb">
            <text:p>translationKeyboardWeb</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11T20:15:34Z">
            <text:p>2015-07-11T20:15:34Z</text:p>
          </table:table-cell>
          <table:table-cell office:value-type="string" office:string-value="2015-07-11T20:15:35Z">
            <text:p>2015-07-11T20:15:35Z</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KeyboardWeb">
            <text:p>https://github.com/unfoldingWord-dev/translationKeyboardWeb</text:p>
          </table:table-cell>
          <table:table-cell office:value-type="string" office:string-value="2023-01-28T16:19:07Z">
            <text:p>2023-01-28T16:19:0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s-server">
            <text:p>ts-serv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4-09-23T19:33:20Z">
            <text:p>2014-09-23T19:33:20Z</text:p>
          </table:table-cell>
          <table:table-cell office:value-type="string" office:string-value="2014-09-23T19:33:17Z">
            <text:p>2014-09-23T19:33:17Z</text:p>
          </table:table-cell>
          <table:table-cell office:value-type="string" office:string-value="">
            <text:p/>
          </table:table-cell>
          <table:table-cell office:value-type="string" office:string-value="9">
            <text:p>9</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root']">
            <text:p>['da1nerd', 'root']</text:p>
          </table:table-cell>
          <table:table-cell office:value-type="string" office:string-value="0">
            <text:p>0</text:p>
          </table:table-cell>
          <table:table-cell office:value-type="string" office:string-value="0">
            <text:p>0</text:p>
          </table:table-cell>
          <table:table-cell office:value-type="string" office:string-value="https://github.com/unfoldingWord-dev/ts-server">
            <text:p>https://github.com/unfoldingWord-dev/ts-server</text:p>
          </table:table-cell>
          <table:table-cell office:value-type="string" office:string-value="2023-01-28T16:19:07Z">
            <text:p>2023-01-28T16:19:0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x-manager">
            <text:p>tx-manag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1-06-04T15:53:18Z">
            <text:p>2021-06-04T15:53:18Z</text:p>
          </table:table-cell>
          <table:table-cell office:value-type="string" office:string-value="2020-03-19T16:48:27Z">
            <text:p>2020-03-19T16:48:27Z</text:p>
          </table:table-cell>
          <table:table-cell office:value-type="string" office:string-value="2017-06-21T14:06:12Z">
            <text:p>2017-06-21T14:06:12Z</text:p>
          </table:table-cell>
          <table:table-cell office:value-type="string" office:string-value="6">
            <text:p>6</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otoNomad0', 'Phil Hopper', 'bspidel', 'jag3773', 'phillip-hopper', 'lversaw', 'ethantkoenig']">
            <text:p>['Richard Mahn', 'richmahn', 'PhotoNomad0', 'Phil Hopper', 'bspidel', 'jag3773', 'phillip-hopper', 'lversaw', 'ethantkoenig']</text:p>
          </table:table-cell>
          <table:table-cell office:value-type="string" office:string-value="5">
            <text:p>5</text:p>
          </table:table-cell>
          <table:table-cell office:value-type="string" office:string-value="0">
            <text:p>0</text:p>
          </table:table-cell>
          <table:table-cell office:value-type="string" office:string-value="https://github.com/unfoldingWord-dev/tx-manager">
            <text:p>https://github.com/unfoldingWord-dev/tx-manager</text:p>
          </table:table-cell>
          <table:table-cell office:value-type="string" office:string-value="2024-05-22T13:48:54Z">
            <text:p>2024-05-22T13:48:54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x-manager-lambda">
            <text:p>tx-manager-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6-07T15:44:54Z">
            <text:p>2017-06-07T15:44:54Z</text:p>
          </table:table-cell>
          <table:table-cell office:value-type="string" office:string-value="2017-06-07T15:44:53Z">
            <text:p>2017-06-07T15:44: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ichard Mahn', 'Phil Hopper', 'PhotoNomad0', 'bspidel', 'phillip-hopper', 'jag3773']">
            <text:p>['richmahn', 'Richard Mahn', 'Phil Hopper', 'PhotoNomad0', 'bspidel', 'phillip-hopper',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manager-lambda">
            <text:p>https://github.com/unfoldingWord-dev/tx-manager-lambda</text:p>
          </table:table-cell>
          <table:table-cell office:value-type="string" office:string-value="2025-10-09T10:59:32Z">
            <text:p>2025-10-09T10:59:32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tx-simple-usfm2html">
            <text:p>tx-simple-usfm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2-20T06:23:46Z">
            <text:p>2016-12-20T06:23:46Z</text:p>
          </table:table-cell>
          <table:table-cell office:value-type="string" office:string-value="2016-12-20T06:23:40Z">
            <text:p>2016-12-20T06:2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 'Richard Mahn']">
            <text:p>['Gogs',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tx-simple-usfm2html">
            <text:p>https://github.com/unfoldingWord-dev/tx-simple-usfm2html</text:p>
          </table:table-cell>
          <table:table-cell office:value-type="string" office:string-value="2023-01-28T16:19:08Z">
            <text:p>2023-01-28T16:19:0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udb-en">
            <text:p>udb-e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18:41Z">
            <text:p>2017-06-23T20:18:41Z</text:p>
          </table:table-cell>
          <table:table-cell office:value-type="string" office:string-value="2017-06-23T20:17:50Z">
            <text:p>2017-06-23T20:17:50Z</text:p>
          </table:table-cell>
          <table:table-cell office:value-type="string" office:string-value="2016-10-04T01:16:56Z">
            <text:p>2016-10-04T01:16:56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ag3773']">
            <text:p>['root', 'jag3773']</text:p>
          </table:table-cell>
          <table:table-cell office:value-type="string" office:string-value="3">
            <text:p>3</text:p>
          </table:table-cell>
          <table:table-cell office:value-type="string" office:string-value="0">
            <text:p>0</text:p>
          </table:table-cell>
          <table:table-cell office:value-type="string" office:string-value="https://github.com/unfoldingWord/udb-en">
            <text:p>https://github.com/unfoldingWord/udb-en</text:p>
          </table:table-cell>
          <table:table-cell office:value-type="string" office:string-value="2023-01-28T16:52:17Z">
            <text:p>2023-01-28T16:52: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ulb-en">
            <text:p>ulb-e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21:08Z">
            <text:p>2017-06-23T20:21:08Z</text:p>
          </table:table-cell>
          <table:table-cell office:value-type="string" office:string-value="2017-06-23T20:20:49Z">
            <text:p>2017-06-23T20:20:49Z</text:p>
          </table:table-cell>
          <table:table-cell office:value-type="string" office:string-value="2016-10-04T01:18:57Z">
            <text:p>2016-10-04T01:18:57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ag3773']">
            <text:p>['root', 'jag3773']</text:p>
          </table:table-cell>
          <table:table-cell office:value-type="string" office:string-value="3">
            <text:p>3</text:p>
          </table:table-cell>
          <table:table-cell office:value-type="string" office:string-value="0">
            <text:p>0</text:p>
          </table:table-cell>
          <table:table-cell office:value-type="string" office:string-value="https://github.com/unfoldingWord/ulb-en">
            <text:p>https://github.com/unfoldingWord/ulb-en</text:p>
          </table:table-cell>
          <table:table-cell office:value-type="string" office:string-value="2025-12-05T15:37:06Z">
            <text:p>2025-12-05T15:37:06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ulb-pt-br">
            <text:p>ulb-pt-br</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3-11T00:22:21Z">
            <text:p>2016-03-11T00:22:21Z</text:p>
          </table:table-cell>
          <table:table-cell office:value-type="string" office:string-value="2016-03-11T00:22:18Z">
            <text:p>2016-03-11T00:22: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ulb-pt-br">
            <text:p>https://github.com/unfoldingWord/ulb-pt-br</text:p>
          </table:table-cell>
          <table:table-cell office:value-type="string" office:string-value="2023-01-28T16:52:17Z">
            <text:p>2023-01-28T16:52: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unfoldingWord.github.io-old">
            <text:p>unfoldingWord.github.io-old</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11-28T20:38:37Z">
            <text:p>2018-11-28T20:38:37Z</text:p>
          </table:table-cell>
          <table:table-cell office:value-type="string" office:string-value="2018-11-28T20:31:56Z">
            <text:p>2018-11-28T20:31: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phillip-hopper', 'Tim', 'codemis', 'Jesse A. Griffin', 'Tim J', 'benjore', 'Phil Hopper', 'root', 'jesse@unfoldingword.org', 'timjore', 'Apache', 'Richard Mahn', 'toddlprice', 'Gogs', 'russp41']">
            <text:p>['jag3773', 'phillip-hopper', 'Tim', 'codemis', 'Jesse A. Griffin', 'Tim J', 'benjore', 'Phil Hopper', 'root', 'jesse@unfoldingword.org', 'timjore', 'Apache', 'Richard Mahn', 'toddlprice', 'Gogs', 'russp41']</text:p>
          </table:table-cell>
          <table:table-cell office:value-type="string" office:string-value="0">
            <text:p>0</text:p>
          </table:table-cell>
          <table:table-cell office:value-type="string" office:string-value="0">
            <text:p>0</text:p>
          </table:table-cell>
          <table:table-cell office:value-type="string" office:string-value="https://github.com/unfoldingWord/unfoldingWord.github.io-old">
            <text:p>https://github.com/unfoldingWord/unfoldingWord.github.io-old</text:p>
          </table:table-cell>
          <table:table-cell office:value-type="string" office:string-value="2025-10-02T14:12:10Z">
            <text:p>2025-10-02T14:12:10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Unlocked-Greek-Lexicon">
            <text:p>Unlocked-Greek-Lexico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23T14:19:11Z">
            <text:p>2017-03-23T14:19:11Z</text:p>
          </table:table-cell>
          <table:table-cell office:value-type="string" office:string-value="2017-03-23T14:19:10Z">
            <text:p>2017-03-23T14:19: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im', 'toddlprice', 'timjore']">
            <text:p>['Tim', 'toddlprice', 'timjore']</text:p>
          </table:table-cell>
          <table:table-cell office:value-type="string" office:string-value="0">
            <text:p>0</text:p>
          </table:table-cell>
          <table:table-cell office:value-type="string" office:string-value="0">
            <text:p>0</text:p>
          </table:table-cell>
          <table:table-cell office:value-type="string" office:string-value="https://github.com/unfoldingWord/Unlocked-Greek-Lexicon">
            <text:p>https://github.com/unfoldingWord/Unlocked-Greek-Lexicon</text:p>
          </table:table-cell>
          <table:table-cell office:value-type="string" office:string-value="2023-01-28T16:52:17Z">
            <text:p>2023-01-28T16:52: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Unlocked-Greek-New-Testament">
            <text:p>Unlocked-Greek-New-Testament</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8-09-13T14:41:31Z">
            <text:p>2018-09-13T14:41:31Z</text:p>
          </table:table-cell>
          <table:table-cell office:value-type="string" office:string-value="2018-09-13T14:41:30Z">
            <text:p>2018-09-13T14:41: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oddlprice', 'klappy', 'Tim', 'jag3773', 'timjore']">
            <text:p>['toddlprice', 'klappy', 'Tim', 'jag3773', 'timjore']</text:p>
          </table:table-cell>
          <table:table-cell office:value-type="string" office:string-value="0">
            <text:p>0</text:p>
          </table:table-cell>
          <table:table-cell office:value-type="string" office:string-value="0">
            <text:p>0</text:p>
          </table:table-cell>
          <table:table-cell office:value-type="string" office:string-value="https://github.com/unfoldingWord/Unlocked-Greek-New-Testament">
            <text:p>https://github.com/unfoldingWord/Unlocked-Greek-New-Testament</text:p>
          </table:table-cell>
          <table:table-cell office:value-type="string" office:string-value="2025-12-28T01:08:22Z">
            <text:p>2025-12-28T01:08:22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uw-publish">
            <text:p>uw-publish</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8-05-05T12:58:13Z">
            <text:p>2018-05-05T12:58:13Z</text:p>
          </table:table-cell>
          <table:table-cell office:value-type="string" office:string-value="2017-04-13T18:46:02Z">
            <text:p>2017-04-13T18:4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richmahn', 'Richard Mahn']">
            <text:p>['phillip-hopper', 'Phil Hopper', 'richmahn',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uw-publish">
            <text:p>https://github.com/unfoldingWord-dev/uw-publish</text:p>
          </table:table-cell>
          <table:table-cell office:value-type="string" office:string-value="2023-01-28T16:19:08Z">
            <text:p>2023-01-28T16:19:0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uwadmin">
            <text:p>uwadmin</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30T18:10:25Z">
            <text:p>2015-07-30T18:10:25Z</text:p>
          </table:table-cell>
          <table:table-cell office:value-type="string" office:string-value="2015-07-30T18:10:25Z">
            <text:p>2015-07-30T18:10: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ltman', 'swilcox', 'root', 'jag3773']">
            <text:p>['paltman', 'swilcox', 'root',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wadmin">
            <text:p>https://github.com/unfoldingWord-dev/uwadmin</text:p>
          </table:table-cell>
          <table:table-cell office:value-type="string" office:string-value="2023-01-28T16:19:07Z">
            <text:p>2023-01-28T16:19:0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Needs review">
            <text:p>Needs review</text:p>
          </table:table-cell>
          <table:table-cell office:value-type="string" office:string-value="No npmjs package is published for this repository.">
            <text:p>No npmjs package is published for this repository.</text:p>
          </table:table-cell>
        </table:table-row>
        <table:table-row>
          <table:table-cell office:value-type="string" office:string-value="VerseCheck">
            <text:p>VerseCheck</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5-18T14:29:02Z">
            <text:p>2018-05-18T14:29:02Z</text:p>
          </table:table-cell>
          <table:table-cell office:value-type="string" office:string-value="2018-05-17T20:00:13Z">
            <text:p>2018-05-17T20:00:1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VerseCheck">
            <text:p>VerseCheck</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lections', 'tc-strings', 'tc-tool', 'usfm-js']">
            <text:p>['selections', 'tc-strings', 'tc-tool', 'usfm-js']</text:p>
          </table:table-cell>
          <table:table-cell office:value-type="string" office:string-value="">
            <text:p/>
          </table:table-cell>
          <table:table-cell office:value-type="string" office:string-value="['mannycolon', 'klappy', 'RoyalSix', 'cdwhitfield73', 'Richard Mahn', 'ihoegen', 'EllDoubleYew', 'da1nerd', 'Sterling (Jay) Scott', 'richmahn', 'bspidel', 'PhotoNomad0']">
            <text:p>['mannycolon', 'klappy', 'RoyalSix', 'cdwhitfield73', 'Richard Mahn', 'ihoegen', 'EllDoubleYew', 'da1nerd', 'Sterling (Jay) Scott', 'richmahn', 'bspidel',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ev/VerseCheck">
            <text:p>https://github.com/unfoldingWord-dev/VerseCheck</text:p>
          </table:table-cell>
          <table:table-cell office:value-type="string" office:string-value="2023-01-28T16:35:42Z">
            <text:p>2023-01-28T16:35:42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manifest="urn:oasis:names:tc:opendocument:xmlns:manifest:1.0" xmlns:chart="urn:oasis:names:tc:opendocument:xmlns:chart:1.0" xmlns:draw="urn:oasis:names:tc:opendocument:xmlns:drawing:1.0" xmlns:presentation="urn:oasis:names:tc:opendocument:xmlns:presentation:1.0" xmlns:style="urn:oasis:names:tc:opendocument:xmlns:style:1.0" office:version="1.2">
  <office:meta>
    <meta:generator>ODFPY/1.4.1</meta:generator>
  </office:meta>
</office:document-meta>
</file>